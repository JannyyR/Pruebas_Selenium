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Cantarell" svg:font-family="Cantarell"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pitch="variable"/>
  </office:font-face-decls>
  <office:automatic-styles>
    <style:style style:name="co1" style:family="table-column">
      <style:table-column-properties fo:break-before="auto" style:column-width="1.99cm"/>
    </style:style>
    <style:style style:name="co2" style:family="table-column">
      <style:table-column-properties fo:break-before="auto" style:column-width="22.585cm"/>
    </style:style>
    <style:style style:name="co3" style:family="table-column">
      <style:table-column-properties fo:break-before="auto" style:column-width="2.265cm"/>
    </style:style>
    <style:style style:name="co4" style:family="table-column">
      <style:table-column-properties fo:break-before="auto" style:column-width="12.213cm"/>
    </style:style>
    <style:style style:name="co5" style:family="table-column">
      <style:table-column-properties fo:break-before="auto" style:column-width="12.171cm"/>
    </style:style>
    <style:style style:name="co6" style:family="table-column">
      <style:table-column-properties fo:break-before="auto" style:column-width="21.294cm"/>
    </style:style>
    <style:style style:name="co7" style:family="table-column">
      <style:table-column-properties fo:break-before="auto" style:column-width="2.244cm"/>
    </style:style>
    <style:style style:name="co8" style:family="table-column">
      <style:table-column-properties fo:break-before="auto" style:column-width="2.477cm"/>
    </style:style>
    <style:style style:name="ro1" style:family="table-row">
      <style:table-row-properties style:row-height="0.741cm" fo:break-before="auto" style:use-optimal-row-height="false"/>
    </style:style>
    <style:style style:name="ro2" style:family="table-row">
      <style:table-row-properties style:row-height="2.133cm" fo:break-before="auto" style:use-optimal-row-height="false"/>
    </style:style>
    <style:style style:name="ro3" style:family="table-row">
      <style:table-row-properties style:row-height="1.873cm" fo:break-before="auto" style:use-optimal-row-height="false"/>
    </style:style>
    <style:style style:name="ro4" style:family="table-row">
      <style:table-row-properties style:row-height="2.016cm" fo:break-before="auto" style:use-optimal-row-height="false"/>
    </style:style>
    <style:style style:name="ro5" style:family="table-row">
      <style:table-row-properties style:row-height="1.318cm" fo:break-before="auto" style:use-optimal-row-height="false"/>
    </style:style>
    <style:style style:name="ro6" style:family="table-row">
      <style:table-row-properties style:row-height="1.402cm" fo:break-before="auto" style:use-optimal-row-height="false"/>
    </style:style>
    <style:style style:name="ro7" style:family="table-row">
      <style:table-row-properties style:row-height="1.656cm" fo:break-before="auto" style:use-optimal-row-height="false"/>
    </style:style>
    <style:style style:name="ro8" style:family="table-row">
      <style:table-row-properties style:row-height="1.169cm" fo:break-before="auto" style:use-optimal-row-height="false"/>
    </style:style>
    <style:style style:name="ro9" style:family="table-row">
      <style:table-row-properties style:row-height="2.307cm" fo:break-before="auto" style:use-optimal-row-height="false"/>
    </style:style>
    <style:style style:name="ro10" style:family="table-row">
      <style:table-row-properties style:row-height="1.725cm" fo:break-before="auto" style:use-optimal-row-height="false"/>
    </style:style>
    <style:style style:name="ro11" style:family="table-row">
      <style:table-row-properties style:row-height="3.011cm" fo:break-before="auto" style:use-optimal-row-height="false"/>
    </style:style>
    <style:style style:name="ro12" style:family="table-row">
      <style:table-row-properties style:row-height="0.847cm" fo:break-before="auto" style:use-optimal-row-height="false"/>
    </style:style>
    <style:style style:name="ro13" style:family="table-row">
      <style:table-row-properties style:row-height="0.815cm" fo:break-before="auto" style:use-optimal-row-height="false"/>
    </style:style>
    <style:style style:name="ro14" style:family="table-row">
      <style:table-row-properties style:row-height="0.878cm" fo:break-before="auto" style:use-optimal-row-height="false"/>
    </style:style>
    <style:style style:name="ro15" style:family="table-row">
      <style:table-row-properties style:row-height="4.419cm" fo:break-before="auto" style:use-optimal-row-height="false"/>
    </style:style>
    <style:style style:name="ro16" style:family="table-row">
      <style:table-row-properties style:row-height="1.286cm" fo:break-before="auto" style:use-optimal-row-height="false"/>
    </style:style>
    <style:style style:name="ro17" style:family="table-row">
      <style:table-row-properties style:row-height="0.73cm" fo:break-before="auto" style:use-optimal-row-height="false"/>
    </style:style>
    <style:style style:name="ro18" style:family="table-row">
      <style:table-row-properties style:row-height="2.598cm" fo:break-before="auto" style:use-optimal-row-height="false"/>
    </style:style>
    <style:style style:name="ro19" style:family="table-row">
      <style:table-row-properties style:row-height="1.815cm" fo:break-before="auto" style:use-optimal-row-height="false"/>
    </style:style>
    <style:style style:name="ro20" style:family="table-row">
      <style:table-row-properties style:row-height="0.995cm" fo:break-before="auto" style:use-optimal-row-height="false"/>
    </style:style>
    <style:style style:name="ro21" style:family="table-row">
      <style:table-row-properties style:row-height="2.191cm" fo:break-before="auto" style:use-optimal-row-height="false"/>
    </style:style>
    <style:style style:name="ro22" style:family="table-row">
      <style:table-row-properties style:row-height="1.021cm" fo:break-before="auto" style:use-optimal-row-height="false"/>
    </style:style>
    <style:style style:name="ro23" style:family="table-row">
      <style:table-row-properties style:row-height="0.931cm" fo:break-before="auto" style:use-optimal-row-height="false"/>
    </style:style>
    <style:style style:name="ro24" style:family="table-row">
      <style:table-row-properties style:row-height="2.106cm" fo:break-before="auto" style:use-optimal-row-height="false"/>
    </style:style>
    <style:style style:name="ro25" style:family="table-row">
      <style:table-row-properties style:row-height="2.365cm" fo:break-before="auto" style:use-optimal-row-height="false"/>
    </style:style>
    <style:style style:name="ro26" style:family="table-row">
      <style:table-row-properties style:row-height="0.788cm" fo:break-before="auto" style:use-optimal-row-height="false"/>
    </style:style>
    <style:style style:name="ro27" style:family="table-row">
      <style:table-row-properties style:row-height="1.842cm" fo:break-before="auto" style:use-optimal-row-height="false"/>
    </style:style>
    <style:style style:name="ro28" style:family="table-row">
      <style:table-row-properties style:row-height="1.789cm" fo:break-before="auto" style:use-optimal-row-height="false"/>
    </style:style>
    <style:style style:name="ro29" style:family="table-row">
      <style:table-row-properties style:row-height="3.032cm" fo:break-before="auto" style:use-optimal-row-height="false"/>
    </style:style>
    <style:style style:name="ro30" style:family="table-row">
      <style:table-row-properties style:row-height="2.727cm" fo:break-before="auto" style:use-optimal-row-height="false"/>
    </style:style>
    <style:style style:name="ro31" style:family="table-row">
      <style:table-row-properties style:row-height="2.979cm" fo:break-before="auto" style:use-optimal-row-height="false"/>
    </style:style>
    <style:style style:name="ro32" style:family="table-row">
      <style:table-row-properties style:row-height="1.868cm" fo:break-before="auto" style:use-optimal-row-height="false"/>
    </style:style>
    <style:style style:name="ro33" style:family="table-row">
      <style:table-row-properties style:row-height="2.26cm" fo:break-before="auto" style:use-optimal-row-height="false"/>
    </style:style>
    <style:style style:name="ro34" style:family="table-row">
      <style:table-row-properties style:row-height="2.662cm" fo:break-before="auto" style:use-optimal-row-height="false"/>
    </style:style>
    <style:style style:name="ro35" style:family="table-row">
      <style:table-row-properties style:row-height="3.101cm" fo:break-before="auto" style:use-optimal-row-height="false"/>
    </style:style>
    <style:style style:name="ro36" style:family="table-row">
      <style:table-row-properties style:row-height="5.789cm" fo:break-before="auto" style:use-optimal-row-height="false"/>
    </style:style>
    <style:style style:name="ro37" style:family="table-row">
      <style:table-row-properties style:row-height="3.048cm" fo:break-before="auto" style:use-optimal-row-height="false"/>
    </style:style>
    <style:style style:name="ro38" style:family="table-row">
      <style:table-row-properties style:row-height="3.233cm" fo:break-before="auto" style:use-optimal-row-height="false"/>
    </style:style>
    <style:style style:name="ro39" style:family="table-row">
      <style:table-row-properties style:row-height="1.291cm" fo:break-before="auto" style:use-optimal-row-height="false"/>
    </style:style>
    <style:style style:name="ro40" style:family="table-row">
      <style:table-row-properties style:row-height="1.344cm" fo:break-before="auto" style:use-optimal-row-height="false"/>
    </style:style>
    <style:style style:name="ro41" style:family="table-row">
      <style:table-row-properties style:row-height="2.418cm" fo:break-before="auto" style:use-optimal-row-height="false"/>
    </style:style>
    <style:style style:name="ro42" style:family="table-row">
      <style:table-row-properties style:row-height="3.18cm" fo:break-before="auto" style:use-optimal-row-height="false"/>
    </style:style>
    <style:style style:name="ro43" style:family="table-row">
      <style:table-row-properties style:row-height="3.921cm" fo:break-before="auto" style:use-optimal-row-height="false"/>
    </style:style>
    <style:style style:name="ro44" style:family="table-row">
      <style:table-row-properties style:row-height="1.212cm" fo:break-before="auto" style:use-optimal-row-height="false"/>
    </style:style>
    <style:style style:name="ro45" style:family="table-row">
      <style:table-row-properties style:row-height="2cm" fo:break-before="auto" style:use-optimal-row-height="false"/>
    </style:style>
    <style:style style:name="ro46" style:family="table-row">
      <style:table-row-properties style:row-height="2.249cm" fo:break-before="auto" style:use-optimal-row-height="false"/>
    </style:style>
    <style:style style:name="ro47" style:family="table-row">
      <style:table-row-properties style:row-height="0.974cm" fo:break-before="auto" style:use-optimal-row-height="false"/>
    </style:style>
    <style:style style:name="ro48" style:family="table-row">
      <style:table-row-properties style:row-height="1.476cm" fo:break-before="auto" style:use-optimal-row-height="false"/>
    </style:style>
    <style:style style:name="ro49" style:family="table-row">
      <style:table-row-properties style:row-height="2.471cm" fo:break-before="auto" style:use-optimal-row-height="false"/>
    </style:style>
    <style:style style:name="ro50" style:family="table-row">
      <style:table-row-properties style:row-height="2.291cm" fo:break-before="auto" style:use-optimal-row-height="false"/>
    </style:style>
    <style:style style:name="ro51" style:family="table-row">
      <style:table-row-properties style:row-height="2.45cm" fo:break-before="auto" style:use-optimal-row-height="false"/>
    </style:style>
    <style:style style:name="ro52" style:family="table-row">
      <style:table-row-properties style:row-height="1.736cm" fo:break-before="auto" style:use-optimal-row-height="false"/>
    </style:style>
    <style:style style:name="ro53" style:family="table-row">
      <style:table-row-properties style:row-height="4.26cm" fo:break-before="auto" style:use-optimal-row-height="false"/>
    </style:style>
    <style:style style:name="ro54" style:family="table-row">
      <style:table-row-properties style:row-height="2.238cm" fo:break-before="auto" style:use-optimal-row-height="false"/>
    </style:style>
    <style:style style:name="ro55" style:family="table-row">
      <style:table-row-properties style:row-height="2.185cm" fo:break-before="auto" style:use-optimal-row-height="false"/>
    </style:style>
    <style:style style:name="ro56" style:family="table-row">
      <style:table-row-properties style:row-height="4.159cm" fo:break-before="auto" style:use-optimal-row-height="false"/>
    </style:style>
    <style:style style:name="ro57" style:family="table-row">
      <style:table-row-properties style:row-height="3.418cm" fo:break-before="auto" style:use-optimal-row-height="false"/>
    </style:style>
    <style:style style:name="ro58" style:family="table-row">
      <style:table-row-properties style:row-height="3.085cm" fo:break-before="auto" style:use-optimal-row-height="false"/>
    </style:style>
    <style:style style:name="ro59" style:family="table-row">
      <style:table-row-properties style:row-height="1.185cm" fo:break-before="auto" style:use-optimal-row-height="false"/>
    </style:style>
    <style:style style:name="ro60" style:family="table-row">
      <style:table-row-properties style:row-height="2.027cm" fo:break-before="auto" style:use-optimal-row-height="false"/>
    </style:style>
    <style:style style:name="ro61" style:family="table-row">
      <style:table-row-properties style:row-height="0.767cm" fo:break-before="auto" style:use-optimal-row-height="false"/>
    </style:style>
    <style:style style:name="ro62" style:family="table-row">
      <style:table-row-properties style:row-height="0.714cm" fo:break-before="auto" style:use-optimal-row-height="false"/>
    </style:style>
    <style:style style:name="ro63" style:family="table-row">
      <style:table-row-properties style:row-height="1.889cm" fo:break-before="auto" style:use-optimal-row-height="false"/>
    </style:style>
    <style:style style:name="ro64" style:family="table-row">
      <style:table-row-properties style:row-height="1.762cm" fo:break-before="auto" style:use-optimal-row-height="false"/>
    </style:style>
    <style:style style:name="ro65" style:family="table-row">
      <style:table-row-properties style:row-height="2.053cm" fo:break-before="auto" style:use-optimal-row-height="false"/>
    </style:style>
    <style:style style:name="ro66" style:family="table-row">
      <style:table-row-properties style:row-height="3.043cm" fo:break-before="auto" style:use-optimal-row-height="false"/>
    </style:style>
    <style:style style:name="ro67" style:family="table-row">
      <style:table-row-properties style:row-height="4.011cm" fo:break-before="auto" style:use-optimal-row-height="false"/>
    </style:style>
    <style:style style:name="ro68" style:family="table-row">
      <style:table-row-properties style:row-height="2.926cm" fo:break-before="auto" style:use-optimal-row-height="false"/>
    </style:style>
    <style:style style:name="ro69" style:family="table-row">
      <style:table-row-properties style:row-height="3.127cm" fo:break-before="auto" style:use-optimal-row-height="false"/>
    </style:style>
    <style:style style:name="ro70" style:family="table-row">
      <style:table-row-properties style:row-height="3.974cm" fo:break-before="auto" style:use-optimal-row-height="false"/>
    </style:style>
    <style:style style:name="ro71" style:family="table-row">
      <style:table-row-properties style:row-height="5.614cm" fo:break-before="auto" style:use-optimal-row-height="false"/>
    </style:style>
    <style:style style:name="ro72" style:family="table-row">
      <style:table-row-properties style:row-height="4.36cm" fo:break-before="auto" style:use-optimal-row-height="false"/>
    </style:style>
    <style:style style:name="ro73" style:family="table-row">
      <style:table-row-properties style:row-height="6.551cm" fo:break-before="auto" style:use-optimal-row-height="false"/>
    </style:style>
    <style:style style:name="ro74" style:family="table-row">
      <style:table-row-properties style:row-height="3.948cm" fo:break-before="auto" style:use-optimal-row-height="false"/>
    </style:style>
    <style:style style:name="ro75" style:family="table-row">
      <style:table-row-properties style:row-height="4.768cm" fo:break-before="auto" style:use-optimal-row-height="false"/>
    </style:style>
    <style:style style:name="ro76" style:family="table-row">
      <style:table-row-properties style:row-height="4.794cm" fo:break-before="auto" style:use-optimal-row-height="false"/>
    </style:style>
    <style:style style:name="ro77" style:family="table-row">
      <style:table-row-properties style:row-height="2.08cm" fo:break-before="auto" style:use-optimal-row-height="false"/>
    </style:style>
    <style:style style:name="ro78" style:family="table-row">
      <style:table-row-properties style:row-height="1.371cm" fo:break-before="auto" style:use-optimal-row-height="false"/>
    </style:style>
    <style:style style:name="ro79" style:family="table-row">
      <style:table-row-properties style:row-height="4.366cm" fo:break-before="auto" style:use-optimal-row-height="false"/>
    </style:style>
    <style:style style:name="ro80" style:family="table-row">
      <style:table-row-properties style:row-height="4.498cm" fo:break-before="auto" style:use-optimal-row-height="false"/>
    </style:style>
    <style:style style:name="ro81" style:family="table-row">
      <style:table-row-properties style:row-height="1.265cm" fo:break-before="auto" style:use-optimal-row-height="false"/>
    </style:style>
    <style:style style:name="ro82" style:family="table-row">
      <style:table-row-properties style:row-height="3.683cm" fo:break-before="auto" style:use-optimal-row-height="false"/>
    </style:style>
    <style:style style:name="ro83" style:family="table-row">
      <style:table-row-properties style:row-height="1.947cm" fo:break-before="auto" style:use-optimal-row-height="false"/>
    </style:style>
    <style:style style:name="ro84" style:family="table-row">
      <style:table-row-properties style:row-height="4.789cm" fo:break-before="auto" style:use-optimal-row-height="false"/>
    </style:style>
    <style:style style:name="ro85" style:family="table-row">
      <style:table-row-properties style:row-height="4.921cm" fo:break-before="auto" style:use-optimal-row-height="false"/>
    </style:style>
    <style:style style:name="ro86" style:family="table-row">
      <style:table-row-properties style:row-height="4.503cm" fo:break-before="auto" style:use-optimal-row-height="false"/>
    </style:style>
    <style:style style:name="ro87" style:family="table-row">
      <style:table-row-properties style:row-height="2.995cm" fo:break-before="auto" style:use-optimal-row-height="false"/>
    </style:style>
    <style:style style:name="ro88" style:family="table-row">
      <style:table-row-properties style:row-height="2.72cm" fo:break-before="auto" style:use-optimal-row-height="false"/>
    </style:style>
    <style:style style:name="ro89" style:family="table-row">
      <style:table-row-properties style:row-height="4.149cm" fo:break-before="auto" style:use-optimal-row-height="false"/>
    </style:style>
    <style:style style:name="ro90" style:family="table-row">
      <style:table-row-properties style:row-height="4.821cm" fo:break-before="auto" style:use-optimal-row-height="false"/>
    </style:style>
    <style:style style:name="ro91" style:family="table-row">
      <style:table-row-properties style:row-height="1.958cm" fo:break-before="auto" style:use-optimal-row-height="false"/>
    </style:style>
    <style:style style:name="ro92" style:family="table-row">
      <style:table-row-properties style:row-height="4.445cm" fo:break-before="auto" style:use-optimal-row-height="false"/>
    </style:style>
    <style:style style:name="ro93" style:family="table-row">
      <style:table-row-properties style:row-height="5.207cm" fo:break-before="auto" style:use-optimal-row-height="false"/>
    </style:style>
    <style:style style:name="ro94" style:family="table-row">
      <style:table-row-properties style:row-height="6.498cm" fo:break-before="auto" style:use-optimal-row-height="false"/>
    </style:style>
    <style:style style:name="ro95" style:family="table-row">
      <style:table-row-properties style:row-height="4.858cm" fo:break-before="auto" style:use-optimal-row-height="false"/>
    </style:style>
    <style:style style:name="ro96" style:family="table-row">
      <style:table-row-properties style:row-height="5.678cm" fo:break-before="auto" style:use-optimal-row-height="false"/>
    </style:style>
    <style:style style:name="ro97" style:family="table-row">
      <style:table-row-properties style:row-height="3.366cm" fo:break-before="auto" style:use-optimal-row-height="false"/>
    </style:style>
    <style:style style:name="ro98" style:family="table-row">
      <style:table-row-properties style:row-height="3.773cm" fo:break-before="auto" style:use-optimal-row-height="false"/>
    </style:style>
    <style:style style:name="ro99" style:family="table-row">
      <style:table-row-properties style:row-height="7.017cm" fo:break-before="auto" style:use-optimal-row-height="false"/>
    </style:style>
    <style:style style:name="ro100" style:family="table-row">
      <style:table-row-properties style:row-height="5.704cm" fo:break-before="auto" style:use-optimal-row-height="false"/>
    </style:style>
    <style:style style:name="ro101" style:family="table-row">
      <style:table-row-properties style:row-height="3.598cm" fo:break-before="auto" style:use-optimal-row-height="false"/>
    </style:style>
    <style:style style:name="ro102" style:family="table-row">
      <style:table-row-properties style:row-height="2.524cm" fo:break-before="auto" style:use-optimal-row-height="false"/>
    </style:style>
    <style:style style:name="ro103" style:family="table-row">
      <style:table-row-properties style:row-height="7.186cm" fo:break-before="auto" style:use-optimal-row-height="false"/>
    </style:style>
    <style:style style:name="ro104" style:family="table-row">
      <style:table-row-properties style:row-height="5.736cm" fo:break-before="auto" style:use-optimal-row-height="false"/>
    </style:style>
    <style:style style:name="ro105" style:family="table-row">
      <style:table-row-properties style:row-height="5.366cm" fo:break-before="auto" style:use-optimal-row-height="false"/>
    </style:style>
    <style:style style:name="ro106" style:family="table-row">
      <style:table-row-properties style:row-height="4.657cm" fo:break-before="auto" style:use-optimal-row-height="false"/>
    </style:style>
    <style:style style:name="ro107" style:family="table-row">
      <style:table-row-properties style:row-height="1.974cm" fo:break-before="auto" style:use-optimal-row-height="false"/>
    </style:style>
    <style:style style:name="ro108" style:family="table-row">
      <style:table-row-properties style:row-height="5.503cm" fo:break-before="auto" style:use-optimal-row-height="false"/>
    </style:style>
    <style:style style:name="ro109" style:family="table-row">
      <style:table-row-properties style:row-height="4.551cm" fo:break-before="auto" style:use-optimal-row-height="false"/>
    </style:style>
    <style:style style:name="ro110" style:family="table-row">
      <style:table-row-properties style:row-height="3.286cm" fo:break-before="auto" style:use-optimal-row-height="false"/>
    </style:style>
    <style:style style:name="ro111" style:family="table-row">
      <style:table-row-properties style:row-height="1.423cm" fo:break-before="auto" style:use-optimal-row-height="false"/>
    </style:style>
    <style:style style:name="ro112" style:family="table-row">
      <style:table-row-properties style:row-height="4.186cm" fo:break-before="auto" style:use-optimal-row-height="false"/>
    </style:style>
    <style:style style:name="ro113" style:family="table-row">
      <style:table-row-properties style:row-height="1.582cm" fo:break-before="auto" style:use-optimal-row-height="false"/>
    </style:style>
    <style:style style:name="ro114" style:family="table-row">
      <style:table-row-properties style:row-height="3.302cm" fo:break-before="auto" style:use-optimal-row-height="false"/>
    </style:style>
    <style:style style:name="ro115" style:family="table-row">
      <style:table-row-properties style:row-height="2.736cm" fo:break-before="auto" style:use-optimal-row-height="false"/>
    </style:style>
    <style:style style:name="ro116" style:family="table-row">
      <style:table-row-properties style:row-height="4.477cm" fo:break-before="auto" style:use-optimal-row-height="false"/>
    </style:style>
    <style:style style:name="ro117" style:family="table-row">
      <style:table-row-properties style:row-height="7.636cm" fo:break-before="auto" style:use-optimal-row-height="false"/>
    </style:style>
    <style:style style:name="ro118" style:family="table-row">
      <style:table-row-properties style:row-height="6.636cm" fo:break-before="auto" style:use-optimal-row-height="false"/>
    </style:style>
    <style:style style:name="ro119" style:family="table-row">
      <style:table-row-properties style:row-height="6.816cm" fo:break-before="auto" style:use-optimal-row-height="false"/>
    </style:style>
    <style:style style:name="ro120" style:family="table-row">
      <style:table-row-properties style:row-height="5.345cm" fo:break-before="auto" style:use-optimal-row-height="false"/>
    </style:style>
    <style:style style:name="ro121" style:family="table-row">
      <style:table-row-properties style:row-height="2.895cm" fo:break-before="auto" style:use-optimal-row-height="false"/>
    </style:style>
    <style:style style:name="ro122" style:family="table-row">
      <style:table-row-properties style:row-height="6.662cm" fo:break-before="auto" style:use-optimal-row-height="false"/>
    </style:style>
    <style:style style:name="ro123" style:family="table-row">
      <style:table-row-properties style:row-height="7.689cm" fo:break-before="auto" style:use-optimal-row-height="false"/>
    </style:style>
    <style:style style:name="ro124" style:family="table-row">
      <style:table-row-properties style:row-height="4.053cm" fo:break-before="auto" style:use-optimal-row-height="false"/>
    </style:style>
    <style:style style:name="ro125" style:family="table-row">
      <style:table-row-properties style:row-height="2.212cm" fo:break-before="auto" style:use-optimal-row-height="false"/>
    </style:style>
    <style:style style:name="ro126" style:family="table-row">
      <style:table-row-properties style:row-height="2.842cm" fo:break-before="auto" style:use-optimal-row-height="false"/>
    </style:style>
    <style:style style:name="ro127" style:family="table-row">
      <style:table-row-properties style:row-height="5.313cm" fo:break-before="auto" style:use-optimal-row-height="false"/>
    </style:style>
    <style:style style:name="ro128" style:family="table-row">
      <style:table-row-properties style:row-height="8.112cm" fo:break-before="auto" style:use-optimal-row-height="false"/>
    </style:style>
    <style:style style:name="ro129" style:family="table-row">
      <style:table-row-properties style:row-height="1.688cm" fo:break-before="auto" style:use-optimal-row-height="false"/>
    </style:style>
    <style:style style:name="ro130" style:family="table-row">
      <style:table-row-properties style:row-height="2.556cm" fo:break-before="auto" style:use-optimal-row-height="false"/>
    </style:style>
    <style:style style:name="ro131" style:family="table-row">
      <style:table-row-properties style:row-height="5.683cm" fo:break-before="auto" style:use-optimal-row-height="false"/>
    </style:style>
    <style:style style:name="ro132" style:family="table-row">
      <style:table-row-properties style:row-height="5.868cm" fo:break-before="auto" style:use-optimal-row-height="false"/>
    </style:style>
    <style:style style:name="ro133" style:family="table-row">
      <style:table-row-properties style:row-height="2.312cm" fo:break-before="auto" style:use-optimal-row-height="false"/>
    </style:style>
    <style:style style:name="ro134" style:family="table-row">
      <style:table-row-properties style:row-height="3.551cm" fo:break-before="auto" style:use-optimal-row-height="false"/>
    </style:style>
    <style:style style:name="ro135" style:family="table-row">
      <style:table-row-properties style:row-height="1.445cm" fo:break-before="auto" style:use-optimal-row-height="false"/>
    </style:style>
    <style:style style:name="ro136" style:family="table-row">
      <style:table-row-properties style:row-height="2.82cm" fo:break-before="auto" style:use-optimal-row-height="false"/>
    </style:style>
    <style:style style:name="ro137" style:family="table-row">
      <style:table-row-properties style:row-height="3.498cm" fo:break-before="auto" style:use-optimal-row-height="false"/>
    </style:style>
    <style:style style:name="ro138" style:family="table-row">
      <style:table-row-properties style:row-height="3.392cm" fo:break-before="auto" style:use-optimal-row-height="false"/>
    </style:style>
    <style:style style:name="ro139" style:family="table-row">
      <style:table-row-properties style:row-height="6.477cm" fo:break-before="auto" style:use-optimal-row-height="false"/>
    </style:style>
    <style:style style:name="ro140" style:family="table-row">
      <style:table-row-properties style:row-height="6.265cm" fo:break-before="auto" style:use-optimal-row-height="false"/>
    </style:style>
    <style:style style:name="ro141" style:family="table-row">
      <style:table-row-properties style:row-height="6.239cm" fo:break-before="auto" style:use-optimal-row-height="false"/>
    </style:style>
    <style:style style:name="ro142" style:family="table-row">
      <style:table-row-properties style:row-height="3.895cm" fo:break-before="auto" style:use-optimal-row-height="false"/>
    </style:style>
    <style:style style:name="ro143" style:family="table-row">
      <style:table-row-properties style:row-height="2.577cm" fo:break-before="auto" style:use-optimal-row-height="false"/>
    </style:style>
    <style:style style:name="ro144" style:family="table-row">
      <style:table-row-properties style:row-height="0.688cm" fo:break-before="auto" style:use-optimal-row-height="false"/>
    </style:style>
    <style:style style:name="ro145" style:family="table-row">
      <style:table-row-properties style:row-height="2.159cm" fo:break-before="auto" style:use-optimal-row-height="false"/>
    </style:style>
    <style:style style:name="ro146" style:family="table-row">
      <style:table-row-properties style:row-height="4.604cm" fo:break-before="auto" style:use-optimal-row-height="false"/>
    </style:style>
    <style:style style:name="ro147" style:family="table-row">
      <style:table-row-properties style:row-height="3.657cm" fo:break-before="auto" style:use-optimal-row-height="false"/>
    </style:style>
    <style:style style:name="ro148" style:family="table-row">
      <style:table-row-properties style:row-height="2.715cm" fo:break-before="auto" style:use-optimal-row-height="false"/>
    </style:style>
    <style:style style:name="ro149" style:family="table-row">
      <style:table-row-properties style:row-height="0.894cm" fo:break-before="auto" style:use-optimal-row-height="false"/>
    </style:style>
    <style:style style:name="ro150" style:family="table-row">
      <style:table-row-properties style:row-height="1.397cm" fo:break-before="auto" style:use-optimal-row-height="false"/>
    </style:style>
    <style:style style:name="ro151" style:family="table-row">
      <style:table-row-properties style:row-height="1.635cm" fo:break-before="auto" style:use-optimal-row-height="false"/>
    </style:style>
    <style:style style:name="ro152" style:family="table-row">
      <style:table-row-properties style:row-height="1.132cm" fo:break-before="auto" style:use-optimal-row-height="false"/>
    </style:style>
    <style:style style:name="ro153" style:family="table-row">
      <style:table-row-properties style:row-height="0.45cm" fo:break-before="auto" style:use-optimal-row-height="false"/>
    </style:style>
    <style:style style:name="ro154" style:family="table-row">
      <style:table-row-properties style:row-height="0.45cm" fo:break-before="auto" style:use-optimal-row-height="true"/>
    </style:style>
    <style:style style:name="ro155" style:family="table-row">
      <style:table-row-properties style:row-height="0.452cm" fo:break-before="auto" style:use-optimal-row-height="true"/>
    </style:style>
    <style:style style:name="ta1" style:family="table" style:master-page-name="mp1">
      <style:table-properties table:display="true" style:writing-mode="lr-tb"/>
    </style:style>
    <number:text-style style:name="N100">
      <number:text-content/>
    </number:text-style>
    <style:style style:name="ce49" style:family="table-cell" style:parent-style-name="Default" style:data-style-name="N0">
      <style:table-cell-properties fo:background-color="#c6c6c6"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2" style:family="table-cell" style:parent-style-name="Default" style:data-style-name="N0">
      <style:table-cell-properties fo:background-color="#ffff00" style:text-align-source="fix" style:repeat-content="false" fo:border="0.06pt solid #000000" style:vertical-align="middle"/>
      <style:paragraph-properties fo:text-align="center"/>
    </style:style>
    <style:style style:name="ce18" style:family="table-cell" style:parent-style-name="Default" style:data-style-name="N0">
      <style:table-cell-properties fo:background-color="#ffff00" style:text-align-source="fix" style:repeat-content="false" fo:wrap-option="wrap" fo:border="0.06pt solid #000000" style:vertical-align="middle"/>
      <style:paragraph-properties fo:text-align="center"/>
    </style:style>
    <style:style style:name="ce57" style:family="table-cell" style:parent-style-name="Default" style:data-style-name="N0">
      <style:table-cell-properties fo:background-color="#ff8000" style:text-align-source="fix" style:repeat-content="false" fo:wrap-option="wrap" fo:border="0.06pt solid #000000" style:vertical-align="middle"/>
      <style:paragraph-properties fo:text-align="center"/>
    </style:style>
    <style:style style:name="ce58" style:family="table-cell" style:parent-style-name="Default" style:data-style-name="N0">
      <style:table-cell-properties fo:background-color="#ff0000" style:text-align-source="fix" style:repeat-content="false" fo:wrap-option="wrap" fo:border="0.06pt solid #000000" style:vertical-align="middle"/>
      <style:paragraph-properties fo:text-align="center"/>
    </style:style>
    <style:style style:name="ce59" style:family="table-cell" style:parent-style-name="Default" style:data-style-name="N0">
      <style:table-cell-properties fo:background-color="#ff8000" style:text-align-source="fix" style:repeat-content="false" fo:border="0.06pt solid #000000" style:vertical-align="middle"/>
      <style:paragraph-properties fo:text-align="center"/>
      <style:text-properties fo:color="#000000"/>
    </style:style>
    <style:style style:name="ce23" style:family="table-cell" style:parent-style-name="Default" style:data-style-name="N0">
      <style:table-cell-properties fo:background-color="#ff8000" style:text-align-source="fix" style:repeat-content="false" fo:border="0.06pt solid #000000" style:vertical-align="middle"/>
      <style:paragraph-properties fo:text-align="center"/>
    </style:style>
    <style:style style:name="ce66" style:family="table-cell" style:parent-style-name="Default" style:data-style-name="N0">
      <style:table-cell-properties fo:background-color="#cccccc" style:text-align-source="fix" style:repeat-content="false" fo:wrap-option="wrap"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 style:family="table-cell" style:parent-style-name="Default" style:data-style-name="N0">
      <style:table-cell-properties fo:background-color="#ffff00"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7"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text-underline-style="none" fo:font-weight="normal" style:font-weight-asian="normal" style:font-weight-complex="normal"/>
    </style:style>
    <style:style style:name="ce68" style:family="table-cell" style:parent-style-name="Default" style:data-style-name="N0">
      <style:table-cell-properties style:text-align-source="fix" style:repeat-content="false" fo:background-color="transparent" fo:border="0.06pt solid #000000" style:vertical-align="middle"/>
      <style:paragraph-properties fo:text-align="center"/>
    </style:style>
    <style:style style:name="ce26" style:family="table-cell" style:parent-style-name="Default" style:data-style-name="N0">
      <style:table-cell-properties style:text-align-source="fix" style:repeat-content="false" fo:border="0.06pt solid #000000" style:vertical-align="middle"/>
      <style:paragraph-properties fo:text-align="center"/>
      <style:text-properties fo:color="#ff0000"/>
    </style:style>
    <style:style style:name="ce70" style:family="table-cell" style:parent-style-name="Default" style:data-style-name="N0">
      <style:table-cell-properties style:text-align-source="fix" style:repeat-content="false" fo:border="0.06pt solid #000000" style:vertical-align="middle"/>
      <style:paragraph-properties fo:text-align="center"/>
      <style:text-properties fo:color="#000000"/>
    </style:style>
    <style:style style:name="ce65" style:family="table-cell" style:parent-style-name="Default" style:data-style-name="N0">
      <style:table-cell-properties style:text-align-source="fix" style:repeat-content="false" fo:border="0.06pt solid #000000" style:vertical-align="middle"/>
      <style:paragraph-properties fo:text-align="center"/>
      <style:text-properties fo:color="#c9211e"/>
    </style:style>
    <style:style style:name="ce6" style:family="table-cell" style:parent-style-name="Default" style:data-style-name="N0">
      <style:table-cell-properties style:text-align-source="fix" style:repeat-content="false" fo:border="0.06pt solid #000000" style:vertical-align="middle"/>
      <style:paragraph-properties fo:text-align="center"/>
    </style:style>
    <style:style style:name="ce54"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color="#c9211e"/>
    </style:style>
    <style:style style:name="ce74"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color="#000000"/>
    </style:style>
    <style:style style:name="ce75"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use-window-font-color="true"/>
    </style:style>
    <style:style style:name="ce62" style:family="table-cell" style:parent-style-name="Default" style:data-style-name="N0">
      <style:table-cell-properties fo:background-color="#ff0000" style:text-align-source="fix" style:repeat-content="false" fo:border="0.06pt solid #000000" style:vertical-align="middle"/>
      <style:paragraph-properties fo:text-align="center"/>
    </style:style>
    <style:style style:name="ce63" style:family="table-cell" style:parent-style-name="Default" style:data-style-name="N0">
      <style:table-cell-properties style:vertical-align="automatic"/>
    </style:style>
    <style:style style:name="ce64" style:family="table-cell" style:parent-style-name="Default" style:data-style-name="N0">
      <style:table-cell-properties fo:wrap-option="wrap" fo:border="0.06pt solid #000000" style:vertical-align="middle"/>
    </style:style>
    <style:style style:name="ce12" style:family="table-cell" style:parent-style-name="Default" style:data-style-name="N0">
      <style:table-cell-properties fo:background-color="#ffffff" fo:wrap-option="wrap" fo:border="0.06pt solid #000000" style:vertical-align="middle"/>
    </style:style>
    <style:style style:name="ce8" style:family="table-cell" style:parent-style-name="Default" style:data-style-name="N0">
      <style:table-cell-properties style:text-align-source="fix" style:repeat-content="false" fo:wrap-option="wrap" fo:border="0.06pt solid #000000" style:vertical-align="middle"/>
      <style:paragraph-properties fo:text-align="start" fo:margin-left="0cm"/>
    </style:style>
    <style:style style:name="ce21" style:family="table-cell" style:parent-style-name="Default" style:data-style-name="N100">
      <style:table-cell-properties fo:wrap-option="wrap" fo:border="0.06pt solid #000000" style:vertical-align="middle"/>
    </style:style>
    <style:style style:name="ce81" style:family="table-cell" style:parent-style-name="Default">
      <style:table-cell-properties fo:wrap-option="wrap" fo:border="0.06pt solid #000000" style:vertical-align="middle"/>
      <style:text-properties style:use-window-font-color="true" style:font-name="Liberation Sans" fo:font-size="10pt" fo:language="es" fo:country="ES" style:font-name-asian="Noto Serif CJK SC" style:font-size-asian="10pt" style:font-name-complex="Lucida Sans" style:font-size-complex="10pt"/>
    </style:style>
    <style:style style:name="ce33" style:family="table-cell" style:parent-style-name="Default" style:data-style-name="N0">
      <style:table-cell-properties fo:border-bottom="0.06pt solid #000000" fo:wrap-option="wrap" fo:border-left="none" fo:border-right="0.06pt solid #000000" fo:border-top="0.06pt solid #000000" style:vertical-align="middle"/>
    </style:style>
    <style:style style:name="ce37" style:family="table-cell" style:parent-style-name="Default" style:data-style-name="N0">
      <style:table-cell-properties fo:border-bottom="0.06pt solid #000000" fo:wrap-option="wrap" fo:border-left="none" fo:border-right="0.06pt solid #000000" fo:border-top="none" style:vertical-align="middle"/>
    </style:style>
    <style:style style:name="ce87" style:family="table-cell" style:parent-style-name="Default" style:data-style-name="N0">
      <style:table-cell-properties fo:wrap-option="wrap" style:vertical-align="middle"/>
    </style:style>
    <style:style style:name="ce2" style:family="table-cell" style:parent-style-name="Default" style:data-style-name="N0">
      <style:table-cell-properties fo:background-color="#c6c6c6" style:text-align-source="fix" style:repeat-content="false" fo:border="0.06pt solid #000000" style:vertical-align="middle"/>
      <style:paragraph-properties fo:text-align="center"/>
      <style:text-properties fo:font-weight="bold" style:font-weight-asian="bold" style:font-weight-complex="bold"/>
    </style:style>
    <style:style style:name="ce11" style:family="table-cell" style:parent-style-name="Default" style:data-style-name="N0">
      <style:table-cell-properties fo:background-color="#ffffff" style:text-align-source="fix" style:repeat-content="false" fo:border="0.06pt solid #000000" style:vertical-align="middle"/>
      <style:paragraph-properties fo:text-align="center"/>
    </style:style>
    <style:style style:name="ce34" style:family="table-cell" style:parent-style-name="Default" style:data-style-name="N0">
      <style:table-cell-properties fo:border-bottom="0.06pt solid #000000" style:text-align-source="fix" style:repeat-content="false" fo:border-left="none" fo:border-right="0.06pt solid #000000" fo:border-top="0.06pt solid #000000" style:vertical-align="middle"/>
      <style:paragraph-properties fo:text-align="center"/>
    </style:style>
    <style:style style:name="ce38" style:family="table-cell" style:parent-style-name="Default" style:data-style-name="N0">
      <style:table-cell-properties fo:border-bottom="0.06pt solid #000000" style:text-align-source="fix" style:repeat-content="false" fo:border-left="none" fo:border-right="0.06pt solid #000000" fo:border-top="none" style:vertical-align="middle"/>
      <style:paragraph-properties fo:text-align="center"/>
    </style:style>
    <style:style style:name="ce16"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92"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3" style:family="table-cell" style:parent-style-name="Default" style:data-style-name="N0">
      <style:table-cell-properties fo:background-color="#c6c6c6"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3" style:family="table-cell" style:parent-style-name="Default" style:data-style-name="N0">
      <style:table-cell-properties fo:background-color="#ffffff" style:text-align-source="fix" style:repeat-content="false" fo:wrap-option="wrap" fo:border="0.06pt solid #000000" style:vertical-align="middle"/>
      <style:paragraph-properties fo:text-align="start" fo:margin-left="0cm"/>
    </style:style>
    <style:style style:name="ce90"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style>
    <style:style style:name="ce91" style:family="table-cell" style:parent-style-name="Default" style:data-style-name="N0">
      <style:table-cell-properties fo:wrap-option="wrap" style:vertical-align="automatic"/>
    </style:style>
    <style:style style:name="ce95"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weight="bold" style:font-weight-asian="bold" style:font-weight-complex="bold"/>
    </style:style>
    <style:style style:name="ce83"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font-name="Liberation Serif" style:font-name-asian="Cantarell" style:font-name-complex="Noto Sans Arabic"/>
    </style:style>
    <style:style style:name="ce28"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style:style>
    <style:style style:name="ce52" style:family="table-cell" style:parent-style-name="Default" style:data-style-name="N0">
      <style:table-cell-properties fo:background-color="transparent" fo:wrap-option="wrap" fo:border="0.06pt solid #000000" style:vertical-align="middle"/>
    </style:style>
    <style:style style:name="ce35" style:family="table-cell" style:parent-style-name="Default" style:data-style-name="N0">
      <style:table-cell-properties fo:border-bottom="0.06pt solid #000000" style:text-align-source="fix" style:repeat-content="false" fo:wrap-option="wrap" fo:border-left="none" fo:border-right="0.06pt solid #000000" fo:border-top="0.06pt solid #000000" style:vertical-align="middle"/>
      <style:paragraph-properties fo:text-align="center"/>
    </style:style>
    <style:style style:name="ce39" style:family="table-cell" style:parent-style-name="Default" style:data-style-name="N0">
      <style:table-cell-properties fo:border-bottom="0.06pt solid #000000" style:text-align-source="fix" style:repeat-content="false" fo:wrap-option="wrap" fo:border-left="none" fo:border-right="0.06pt solid #000000" fo:border-top="none" style:vertical-align="middle"/>
      <style:paragraph-properties fo:text-align="center"/>
    </style:style>
    <style:style style:name="ce106"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style>
    <style:style style:name="ce110" style:family="table-cell" style:parent-style-name="Default" style:data-style-name="N0">
      <style:table-cell-properties fo:border-bottom="0.06pt solid #000000" style:text-align-source="fix" style:repeat-content="false" fo:wrap-option="wrap" fo:border-left="none" fo:border-right="0.06pt solid #000000" fo:border-top="none" style:vertical-align="middle"/>
      <style:paragraph-properties fo:text-align="start" fo:margin-left="0cm"/>
    </style:style>
    <style:style style:name="ce111"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19" style:family="table-cell" style:parent-style-name="Default" style:data-style-name="N0">
      <style:table-cell-properties style:text-align-source="fix" style:repeat-content="false" fo:border="0.06pt solid #000000" style:vertical-align="middle"/>
      <style:paragraph-properties fo:text-align="start" fo:margin-left="0cm"/>
      <style:text-properties fo:font-size="12pt" style:font-size-asian="12pt" style:font-size-complex="12pt"/>
    </style:style>
    <style:style style:name="ce105" style:family="table-cell" style:parent-style-name="Default" style:data-style-name="N0">
      <style:table-cell-properties fo:wrap-option="wrap" fo:border="0.06pt solid #000000" style:vertical-align="middle"/>
      <style:text-properties fo:font-size="10.5pt" style:font-size-asian="10.5pt" style:font-size-complex="10.5pt"/>
    </style:style>
    <style:style style:name="ce20" style:family="table-cell" style:parent-style-name="Default" style:data-style-name="N0">
      <style:table-cell-properties fo:wrap-option="wrap" fo:border="0.06pt solid #000000" style:vertical-align="middle"/>
      <style:text-properties fo:font-size="12pt" style:font-size-asian="12pt" style:font-size-complex="12pt"/>
    </style:style>
    <style:style style:name="ce107" style:family="table-cell" style:parent-style-name="Default" style:data-style-name="N0">
      <style:table-cell-properties fo:wrap-option="wrap" fo:border="0.06pt solid #000000" style:vertical-align="middle"/>
      <style:text-properties fo:color="#000000" style:text-outline="false" style:text-line-through-style="none" style:text-line-through-type="none" style:font-name="Liberation Sans1" fo:font-size="10.5pt" fo:language="es" fo:country="CO" fo:font-style="normal" fo:text-shadow="none" style:text-underline-style="none" fo:font-weight="normal" style:text-underline-mode="continuous" style:text-overline-mode="continuous" style:text-line-through-mode="continuous" style:font-name-asian="Liberation Sans1" style:font-size-asian="10.5pt" style:language-asian="zh" style:country-asian="CN" style:font-style-asian="normal" style:font-weight-asian="normal" style:font-name-complex="Liberation Sans1" style:font-size-complex="10.5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data-style-name="N0">
      <style:table-cell-properties fo:wrap-option="wrap" fo:border="0.06pt solid #000000" style:vertical-align="middle"/>
      <style:text-properties fo:font-size="10pt" style:font-size-asian="10pt" style:font-size-complex="10pt"/>
    </style:style>
    <style:style style:name="ce109" style:family="table-cell" style:parent-style-name="Default" style:data-style-name="N0">
      <style:table-cell-properties fo:wrap-option="wrap" fo:border="0.06pt solid #000000" style:vertical-align="middle"/>
      <style:text-properties fo:color="#000000" style:text-outline="false" style:text-line-through-style="none" style:text-line-through-type="none" style:font-name="Liberation Sans1" fo:font-size="10pt" fo:language="es" fo:country="CO" fo:font-style="normal" fo:text-shadow="none" style:text-underline-style="none" fo:font-weight="normal" style:text-underline-mode="continuous" style:text-overline-mode="continuous" style:text-line-through-mode="continuous" style:font-name-asian="Liberation Sans1" style:font-size-asian="10pt" style:language-asian="zh" style:country-asian="CN" style:font-style-asian="normal" style:font-weight-asian="normal" style:font-name-complex="Liberation Sans1"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data-style-name="N0">
      <style:table-cell-properties fo:border="0.06pt solid #000000" style:vertical-align="automatic"/>
    </style:style>
    <style:style style:name="ce36" style:family="table-cell" style:parent-style-name="Default" style:data-style-name="N0">
      <style:table-cell-properties fo:border-bottom="0.06pt solid #000000" fo:border-left="none" fo:border-right="0.06pt solid #000000" fo:border-top="0.06pt solid #000000" style:vertical-align="middle"/>
    </style:style>
    <style:style style:name="ce40" style:family="table-cell" style:parent-style-name="Default" style:data-style-name="N0">
      <style:table-cell-properties fo:border-bottom="0.06pt solid #000000" fo:border-left="none" fo:border-right="0.06pt solid #000000" fo:border-top="none" style:vertical-align="middle"/>
    </style:style>
    <style:style style:name="ce122" style:family="table-cell" style:parent-style-name="Default" style:data-style-name="N0">
      <style:table-cell-properties fo:border-bottom="0.06pt solid #000000" fo:border-left="none" fo:border-right="0.06pt solid #000000" fo:border-top="0.06pt solid #000000" style:vertical-align="automatic"/>
    </style:style>
    <style:style style:name="ce124" style:family="table-cell" style:parent-style-name="Default" style:data-style-name="N0">
      <style:table-cell-properties fo:background-color="#ffffff" fo:border="0.06pt solid #000000" style:vertical-align="middle"/>
      <style:text-properties fo:color="#1f1f1f" fo:font-size="9pt" style:font-size-asian="9pt" style:font-size-complex="9pt"/>
    </style:style>
    <style:style style:name="ce125" style:family="table-cell" style:parent-style-name="Default" style:data-style-name="N0">
      <style:table-cell-properties fo:border="0.06pt solid #000000" style:vertical-align="middle"/>
    </style:style>
    <style:style style:name="ce4" style:family="table-cell" style:parent-style-name="Default" style:data-style-name="N0">
      <style:table-cell-properties style:text-align-source="fix" style:repeat-content="false" style:vertical-align="automatic"/>
      <style:paragraph-properties fo:text-align="center"/>
    </style:style>
    <style:style style:name="ce9" style:family="table-cell" style:parent-style-name="Default" style:data-style-name="N0">
      <style:table-cell-properties style:text-align-source="fix" style:repeat-content="false" style:vertical-align="middle"/>
      <style:paragraph-properties fo:text-align="center"/>
    </style:style>
    <style:style style:name="ce14" style:family="table-cell" style:parent-style-name="Default" style:data-style-name="N0">
      <style:table-cell-properties fo:background-color="#ffffff" style:text-align-source="fix" style:repeat-content="false" style:vertical-align="middle"/>
      <style:paragraph-properties fo:text-align="center"/>
    </style:style>
    <style:style style:name="ce17" style:family="table-cell" style:parent-style-name="Default" style:data-style-name="N0">
      <style:table-cell-properties style:text-align-source="fix" style:repeat-content="false" fo:wrap-option="wrap" style:vertical-align="automatic"/>
      <style:paragraph-properties fo:text-align="center"/>
    </style:style>
    <style:style style:name="ce29" style:family="table-cell" style:parent-style-name="Default" style:data-style-name="N0">
      <style:table-cell-properties fo:background-color="#ffffff" style:text-align-source="fix" style:repeat-content="false" style:vertical-align="automatic"/>
      <style:paragraph-properties fo:text-align="center"/>
    </style:style>
    <style:style style:name="ce51" style:family="table-cell" style:parent-style-name="Default" style:data-style-name="N0">
      <style:table-cell-properties fo:background-color="transparent" fo:border="0.06pt solid #000000"/>
    </style:style>
    <style:style style:name="ce10" style:family="table-cell" style:parent-style-name="Default" style:data-style-name="N0">
      <style:table-cell-properties style:vertical-align="middle"/>
    </style:style>
    <style:style style:name="ce15" style:family="table-cell" style:parent-style-name="Default" style:data-style-name="N0">
      <style:table-cell-properties fo:background-color="#ffffff" style:vertical-align="middle"/>
    </style:style>
    <style:style style:name="ce30" style:family="table-cell" style:parent-style-name="Default" style:data-style-name="N0">
      <style:table-cell-properties fo:background-color="#ffffff" style:vertical-align="automatic"/>
    </style:style>
    <style:style style:name="ce137" style:family="table-cell" style:parent-style-name="Default" style:data-style-name="N0">
      <style:table-cell-properties fo:background-color="#ffffff" fo:wrap-option="wrap" style:vertical-align="automatic"/>
    </style:style>
    <style:style style:name="ce31" style:family="table-cell" style:parent-style-name="Default" style:data-style-name="N0">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16" style:family="table-cell" style:parent-style-name="Default" style:data-style-name="N0">
      <style:table-cell-properties fo:background-color="#ffff00" fo:wrap-option="wrap" fo:border="0.74pt solid #000000" style:vertical-align="automatic"/>
    </style:style>
    <style:style style:name="ce132" style:family="table-cell" style:parent-style-name="Default" style:data-style-name="N0">
      <style:table-cell-properties fo:background-color="#ed4c05" style:text-align-source="fix" style:repeat-content="false" style:vertical-align="middle"/>
      <style:paragraph-properties fo:text-align="justify" fo:margin-left="0cm"/>
    </style:style>
    <style:style style:name="ce133" style:family="table-cell" style:parent-style-name="Default" style:data-style-name="N0">
      <style:table-cell-properties fo:background-color="#ff0000" style:text-align-source="fix" style:repeat-content="false" fo:border="0.74pt solid #000000" style:vertical-align="middle"/>
      <style:paragraph-properties fo:text-align="justify" fo:margin-left="0cm"/>
    </style:style>
    <style:style style:name="ce32" style:family="table-cell" style:parent-style-name="Default" style:data-style-name="N0">
      <style:table-cell-properties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T1" style:family="text">
      <style:text-properties fo:color="#000000" fo:font-size="11pt" fo:font-weight="bold" style:text-underline-style="none" style:text-underline-color="font-color" style:text-line-through-type="none" fo:font-style="normal" style:text-outline="false" fo:text-shadow="none" style:font-name-asian="Arial" style:font-name-complex="Arial" style:font-size-asian="11pt" style:font-size-complex="11pt" style:font-weight-asian="bold" style:font-weight-complex="bold" style:font-style-asian="normal" style:font-style-complex="normal"/>
    </style:style>
    <style:style style:name="T2" style:family="text">
      <style:text-properties fo:color="#000000" style:font-name="Liberation Sans1" fo:font-size="10pt" fo:font-weight="normal" style:text-underline-style="none" style:text-underline-color="font-color" style:text-line-through-type="none" fo:font-style="normal" style:text-outline="false" fo:text-shadow="none" style:text-line-through-mode="continuous" fo:language="es" fo:country="CO" style:language-asian="zh" style:country-asian="CN" style:language-complex="hi" style:country-complex="IN" style:font-name-asian="Liberation Sans1" style:font-name-complex="Liberation Sans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Arial1" fo:font-size="11pt" fo:font-weight="normal" style:text-underline-style="none" style:text-underline-color="font-color" style:text-line-through-type="none" fo:font-style="normal" style:text-outline="false" fo:text-shadow="none" style:font-name-asian="Arial1" style:font-name-complex="Arial1" style:font-size-asian="11pt" style:font-size-complex="11pt" style:font-weight-asian="normal" style:font-weight-complex="normal" style:font-style-asian="normal" style:font-style-complex="normal"/>
    </style:style>
    <style:style style:name="T4" style:family="text">
      <style:text-properties fo:color="#000000" style:font-name="Liberation Sans1" fo:font-size="10.5pt" fo:font-weight="normal" style:text-underline-style="none" style:text-underline-color="font-color" style:text-line-through-type="none" fo:font-style="normal" style:text-outline="false" fo:text-shadow="none" style:text-line-through-mode="continuous" fo:language="es" fo:country="CO" style:language-asian="zh" style:country-asian="CN" style:language-complex="hi" style:country-complex="IN" style:font-name-asian="Liberation Sans1" style:font-name-complex="Liberation Sans1"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00" style:font-name="Liberation Sans1" fo:font-weight="normal" style:text-underline-style="none" style:text-underline-color="font-color" style:text-line-through-type="none" fo:font-style="normal" style:text-outline="false" fo:text-shadow="none" style:text-line-through-mode="continuous" fo:language="es" fo:country="CO" style:language-asian="zh" style:country-asian="CN" style:language-complex="hi" style:country-complex="IN" style:font-name-asian="Liberation Sans1" style:font-name-complex="Liberation Sans1" style:font-weight-asian="normal" style:font-weight-complex="normal" style:font-style-asian="normal" style:font-style-complex="normal" style:text-emphasize="none" style:font-relief="none" style:text-overline-style="none" style:text-overline-color="font-color" fo:font-size="10pt" style:font-size-asian="10pt" style:font-size-complex="10pt"/>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ce63"/>
        <table:table-column table:style-name="co2" table:default-cell-style-name="ce63"/>
        <table:table-column table:style-name="co3" table:default-cell-style-name="ce63"/>
        <table:table-column table:style-name="co4" table:default-cell-style-name="ce91"/>
        <table:table-column table:style-name="co5" table:default-cell-style-name="ce63"/>
        <table:table-column table:style-name="co6" table:default-cell-style-name="ce63"/>
        <table:table-column table:style-name="co7" table:number-columns-repeated="19" table:default-cell-style-name="ce63"/>
        <table:table-column table:style-name="co8" table:number-columns-repeated="2" table:default-cell-style-name="ce63"/>
        <table:table-column table:style-name="co8" table:number-columns-repeated="16357" table:default-cell-style-name="Default"/>
        <table:table-row table:style-name="ro1">
          <table:table-cell table:style-name="ce49" office:value-type="string" calcext:value-type="string" table:number-columns-spanned="2" table:number-rows-spanned="1">
            <text:p>CP01 – <text:s/>Ingreso al Sistema de Gestión Documental ORFEO</text:p>
          </table:table-cell>
          <table:covered-table-cell/>
          <table:table-cell table:style-name="ce2" office:value-type="string" calcext:value-type="string">
            <text:p>Resultado</text:p>
          </table:table-cell>
          <table:table-cell table:style-name="ce3" office:value-type="string" calcext:value-type="string">
            <text:p>Prueba Realizada</text:p>
          </table:table-cell>
          <table:table-cell table:style-name="ce3" office:value-type="string" calcext:value-type="string">
            <text:p>Observaciones</text:p>
          </table:table-cell>
          <table:table-cell table:style-name="ce4"/>
          <table:table-cell table:number-columns-repeated="9"/>
          <table:table-cell table:style-name="ce116" office:value-type="string" calcext:value-type="string">
            <text:p>Ya estaban </text:p>
          </table:table-cell>
          <table:table-cell table:style-name="Default"/>
          <table:table-cell table:number-columns-repeated="10"/>
          <table:table-cell table:style-name="ce63" table:number-columns-repeated="16357"/>
        </table:table-row>
        <table:table-row table:style-name="ro2">
          <table:table-cell table:style-name="ce22" office:value-type="string" calcext:value-type="string">
            <text:p>CP1-01</text:p>
          </table:table-cell>
          <table:table-cell table:style-name="ce64" office:value-type="string" calcext:value-type="string">
            <text:p>Ingresar a la herramienta con un Usuario Activo</text:p>
          </table:table-cell>
          <table:table-cell table:style-name="ce6" office:value-type="string" calcext:value-type="string">
            <text:p>ok</text:p>
          </table:table-cell>
          <table:table-cell table:style-name="ce8" office:value-type="string" calcext:value-type="string">
            <text:p>1. Se ingresa con el usuario admin, el cual se encuentra activo y tiene el tipo de usuario administrador del sistema</text:p>
            <text:p>2. Al ingresar se despliega el tablero y los módulos a los que el usuario tiene permiso</text:p>
          </table:table-cell>
          <table:table-cell table:style-name="ce64"/>
          <table:table-cell table:style-name="ce9"/>
          <table:table-cell table:style-name="ce10" table:number-columns-repeated="9"/>
          <table:table-cell table:style-name="ce132" office:value-type="string" calcext:value-type="string">
            <text:p>La prueba ya esta, pero no se puede validar </text:p>
          </table:table-cell>
          <table:table-cell table:style-name="Default"/>
          <table:table-cell table:style-name="ce10" table:number-columns-repeated="10"/>
          <table:table-cell table:style-name="ce63" table:number-columns-repeated="16357"/>
        </table:table-row>
        <table:table-row table:style-name="ro3">
          <table:table-cell table:style-name="ce22" office:value-type="string" calcext:value-type="string">
            <text:p>CP1-02</text:p>
          </table:table-cell>
          <table:table-cell table:style-name="ce64" office:value-type="string" calcext:value-type="string">
            <text:p>Validar la opción ¿Olvido su contraseña?</text:p>
          </table:table-cell>
          <table:table-cell table:style-name="ce6" office:value-type="string" calcext:value-type="string">
            <text:p>ok</text:p>
          </table:table-cell>
          <table:table-cell table:style-name="ce8" office:value-type="string" calcext:value-type="string">
            <text:p>1. Se da clic a la opción ¿Olvido su contraseña? Se despliega los campos relacionados al correo y usuario una vez diligenciado el formulario se da clic en el botón “RECUPERAR CONTRASEÑA”</text:p>
          </table:table-cell>
          <table:table-cell table:style-name="ce64"/>
          <table:table-cell table:style-name="ce9"/>
          <table:table-cell table:style-name="ce10" table:number-columns-repeated="9"/>
          <table:table-cell table:style-name="ce133" office:value-type="string" calcext:value-type="string">
            <text:p>Error del sistema</text:p>
          </table:table-cell>
          <table:table-cell table:style-name="Default"/>
          <table:table-cell table:style-name="ce10" table:number-columns-repeated="10"/>
          <table:table-cell table:style-name="ce63" table:number-columns-repeated="16357"/>
        </table:table-row>
        <table:table-row table:style-name="ro4">
          <table:table-cell table:style-name="ce22" office:value-type="string" calcext:value-type="string">
            <text:p>CP1-03</text:p>
          </table:table-cell>
          <table:table-cell table:style-name="ce64" office:value-type="string" calcext:value-type="string">
            <text:p>Ingresar correo electrónico y usuario al que se va a restablecer contraseña</text:p>
          </table:table-cell>
          <table:table-cell table:style-name="ce6" office:value-type="string" calcext:value-type="string">
            <text:p>ok</text:p>
          </table:table-cell>
          <table:table-cell table:style-name="ce8" office:value-type="string" calcext:value-type="string">
            <text:p>1. Se ingresa el correo arodriguez@skinatech.com y el usuario admin,acorde a como se solicita</text:p>
            <text:p>2. Se da clic en el botón y se muestra mensaje de confirmación de la notificación</text:p>
          </table:table-cell>
          <table:table-cell table:style-name="ce64" office:value-type="string" calcext:value-type="string">
            <text:p>Sale mensaje no se pudo procesar el formulario</text:p>
          </table:table-cell>
          <table:table-cell table:style-name="ce9"/>
          <table:table-cell table:style-name="ce10" table:number-columns-repeated="9"/>
          <table:table-cell table:style-name="Default"/>
          <table:table-cell table:style-name="ce10" table:number-columns-repeated="11"/>
          <table:table-cell table:style-name="ce63" table:number-columns-repeated="16357"/>
        </table:table-row>
        <table:table-row table:style-name="ro5">
          <table:table-cell table:style-name="ce22" office:value-type="string" calcext:value-type="string">
            <text:p>CP1-04</text:p>
          </table:table-cell>
          <table:table-cell table:style-name="ce64" office:value-type="string" calcext:value-type="string">
            <text:p>Validar que se muestre mensaje “Los datos ingresados no coinciden con ningún usuario registrado” en caso de ingresar un usuario que no exista</text:p>
          </table:table-cell>
          <table:table-cell table:style-name="ce6" office:value-type="string" calcext:value-type="string">
            <text:p>ok</text:p>
          </table:table-cell>
          <table:table-cell table:style-name="ce8" office:value-type="string" calcext:value-type="string">
            <text:p>1. Se ingresa un correo y un usuario incorrectos y luego se procede a dar clic en el botón</text:p>
          </table:table-cell>
          <table:table-cell table:style-name="ce64" office:value-type="string" calcext:value-type="string">
            <text:p>Sale el mensaje indicando que no existe ningun usuario con los datos ingresados</text:p>
          </table:table-cell>
          <table:table-cell table:style-name="ce9"/>
          <table:table-cell table:style-name="ce10" table:number-columns-repeated="21"/>
          <table:table-cell table:style-name="ce63" table:number-columns-repeated="16357"/>
        </table:table-row>
        <table:table-row table:style-name="ro6">
          <table:table-cell table:style-name="ce22" office:value-type="string" calcext:value-type="string">
            <text:p>CP1-05</text:p>
          </table:table-cell>
          <table:table-cell table:style-name="ce64" office:value-type="string" calcext:value-type="string">
            <text:p>Validar que los campos sean obligatorios de ser diligenciados para restablecer la contraseña</text:p>
          </table:table-cell>
          <table:table-cell table:style-name="ce6" office:value-type="string" calcext:value-type="string">
            <text:p>ok</text:p>
          </table:table-cell>
          <table:table-cell table:style-name="ce8" office:value-type="string" calcext:value-type="string">
            <text:p>1. Se valida que si no se ingresa información en ambos campos el botón se desahabilite para usar</text:p>
          </table:table-cell>
          <table:table-cell table:style-name="ce64"/>
          <table:table-cell table:style-name="ce9" office:value-type="string" calcext:value-type="string">
            <text:p>Falta</text:p>
          </table:table-cell>
          <table:table-cell table:style-name="ce10" table:number-columns-repeated="21"/>
          <table:table-cell table:style-name="ce63" table:number-columns-repeated="16357"/>
        </table:table-row>
        <table:table-row table:style-name="ro7">
          <table:table-cell table:style-name="ce22" office:value-type="string" calcext:value-type="string">
            <text:p>CP1-06</text:p>
          </table:table-cell>
          <table:table-cell table:style-name="ce64" office:value-type="string" calcext:value-type="string">
            <text:p>Validar que cuando se ingresen los datos del usuario y se de clic en el botón “RECUPERAR CONTRAEÑA” se muestre mensaje de confirmación “Notificación enviada al correo registrado para el restablecimiento de la contraseña”</text:p>
          </table:table-cell>
          <table:table-cell table:style-name="ce6" office:value-type="string" calcext:value-type="string">
            <text:p>ok</text:p>
          </table:table-cell>
          <table:table-cell table:style-name="ce8" office:value-type="string" calcext:value-type="string">
            <text:p>1. Se hace el proceso indicado en el item a probar y se muestra el mensaje de confirmación y llega la notificación indicada</text:p>
          </table:table-cell>
          <table:table-cell table:style-name="ce64" office:value-type="string" calcext:value-type="string">
            <text:p>Las notifiaciones llegan, pero no estala configuración del cliente</text:p>
          </table:table-cell>
          <table:table-cell table:style-name="ce9" office:value-type="string" calcext:value-type="string">
            <text:p>Falta</text:p>
          </table:table-cell>
          <table:table-cell table:style-name="ce10" table:number-columns-repeated="21"/>
          <table:table-cell table:style-name="ce63" table:number-columns-repeated="16357"/>
        </table:table-row>
        <table:table-row table:style-name="ro8">
          <table:table-cell table:style-name="ce22" office:value-type="string" calcext:value-type="string">
            <text:p>CP1-07</text:p>
          </table:table-cell>
          <table:table-cell table:style-name="ce64" office:value-type="string" calcext:value-type="string">
            <text:p>Validar que se muestre mensaje de confirmación “se envio notificación de correo”</text:p>
          </table:table-cell>
          <table:table-cell table:style-name="ce6" office:value-type="string" calcext:value-type="string">
            <text:p>ok</text:p>
          </table:table-cell>
          <table:table-cell table:style-name="ce8" office:value-type="string" calcext:value-type="string">
            <text:p>1. Se muestra el mensaje indicado</text:p>
          </table:table-cell>
          <table:table-cell table:style-name="ce64"/>
          <table:table-cell table:style-name="ce9" office:value-type="string" calcext:value-type="string">
            <text:p>Falta</text:p>
          </table:table-cell>
          <table:table-cell table:style-name="ce10" table:number-columns-repeated="21"/>
          <table:table-cell table:style-name="ce63" table:number-columns-repeated="16357"/>
        </table:table-row>
        <table:table-row table:style-name="ro9">
          <table:table-cell table:style-name="ce22" office:value-type="string" calcext:value-type="string">
            <text:p>CP1-08</text:p>
          </table:table-cell>
          <table:table-cell table:style-name="ce12" office:value-type="string" calcext:value-type="string">
            <text:p>Validar que al correo del usuario haya llegado una notificación por correo mostrando un botón de “Restablecer”, validar que cuando se ingrese a dicho botón se despliegue un formulario donde se pueda ingresar las contraseñas</text:p>
          </table:table-cell>
          <table:table-cell table:style-name="ce11" office:value-type="string" calcext:value-type="string">
            <text:p>ok</text:p>
          </table:table-cell>
          <table:table-cell table:style-name="ce13" office:value-type="string" calcext:value-type="string">
            <text:p>1. Se valida que la notificación llega a la cuenta de correo indicado.</text:p>
            <text:p>2. Luego se valida el acceso al botón de restablecer contraseña y se valida que se muestren los campos asociados a la contraseña a asignar</text:p>
          </table:table-cell>
          <table:table-cell table:style-name="ce64"/>
          <table:table-cell table:style-name="ce14" office:value-type="string" calcext:value-type="string">
            <text:p>Falta</text:p>
          </table:table-cell>
          <table:table-cell table:style-name="ce15" table:number-columns-repeated="21"/>
          <table:table-cell table:style-name="ce63" table:number-columns-repeated="16357"/>
        </table:table-row>
        <table:table-row table:style-name="ro10">
          <table:table-cell table:style-name="ce22" office:value-type="string" calcext:value-type="string">
            <text:p>CP1-09</text:p>
          </table:table-cell>
          <table:table-cell table:style-name="ce12" office:value-type="string" calcext:value-type="string">
            <text:p>Validar que los campos de “Contraseña” y “Confirmar Contraseña” sean iguales para restablecer la contraseña</text:p>
          </table:table-cell>
          <table:table-cell table:style-name="ce11" office:value-type="string" calcext:value-type="string">
            <text:p>ok</text:p>
          </table:table-cell>
          <table:table-cell table:style-name="ce13" office:value-type="string" calcext:value-type="string">
            <text:p>1. Se ingresa una contraseña incorrecta en ambos campos para que asi se vea la validación de las contraseñas</text:p>
            <text:p>2. El sistema muestra el mensaje de la validación realizada</text:p>
          </table:table-cell>
          <table:table-cell table:style-name="ce64"/>
          <table:table-cell table:style-name="ce14" office:value-type="string" calcext:value-type="string">
            <text:p>Falta</text:p>
          </table:table-cell>
          <table:table-cell table:style-name="ce15" table:number-columns-repeated="21"/>
          <table:table-cell table:style-name="ce63" table:number-columns-repeated="16357"/>
        </table:table-row>
        <table:table-row table:style-name="ro7">
          <table:table-cell table:style-name="ce22" office:value-type="string" calcext:value-type="string">
            <text:p>CP1-10</text:p>
          </table:table-cell>
          <table:table-cell table:style-name="ce64" office:value-type="string" calcext:value-type="string">
            <text:p>Validar que se ingrese con un usuario y con una contraseña incorrecta, esto debe mostrar un mensaje de error “Usuario o contraseña incorrecto”</text:p>
          </table:table-cell>
          <table:table-cell table:style-name="ce6" office:value-type="string" calcext:value-type="string">
            <text:p>ok</text:p>
          </table:table-cell>
          <table:table-cell table:style-name="ce8" office:value-type="string" calcext:value-type="string">
            <text:p>1. Se realiza el proceso descrito y se evidencia el problema y mensaje que se indica.</text:p>
          </table:table-cell>
          <table:table-cell table:style-name="ce64"/>
          <table:table-cell table:style-name="ce9"/>
          <table:table-cell table:style-name="ce10" table:number-columns-repeated="21"/>
          <table:table-cell table:style-name="ce63" table:number-columns-repeated="16357"/>
        </table:table-row>
        <table:table-row table:style-name="ro7">
          <table:table-cell table:style-name="ce22" office:value-type="string" calcext:value-type="string">
            <text:p>CP1-11</text:p>
          </table:table-cell>
          <table:table-cell table:style-name="ce64" office:value-type="string" calcext:value-type="string">
            <text:p>Validar que cuando se ingrese una contraseña incorrecta 3 veces el sistema muestre mensaje indicando “El usuario superó la cantidad máxima de intentos fallidos, por favor seleccione la opción de ¿olvidó su contraseña?”</text:p>
          </table:table-cell>
          <table:table-cell table:style-name="ce6" office:value-type="string" calcext:value-type="string">
            <text:p>ok</text:p>
          </table:table-cell>
          <table:table-cell table:style-name="ce8" office:value-type="string" calcext:value-type="string">
            <text:p>1. Se ingresa 3 veces la contraseña incorrecta para el usuario admin</text:p>
            <text:p>2. Se muestra mensaje que ya a intentando muchas veces y se debe restablecer la contraseña</text:p>
          </table:table-cell>
          <table:table-cell table:style-name="ce64"/>
          <table:table-cell table:style-name="ce9"/>
          <table:table-cell table:style-name="ce10" table:number-columns-repeated="21"/>
          <table:table-cell table:style-name="ce63" table:number-columns-repeated="16357"/>
        </table:table-row>
        <table:table-row table:style-name="ro1">
          <table:table-cell table:style-name="ce49" office:value-type="string" calcext:value-type="string" table:number-columns-spanned="2" table:number-rows-spanned="1">
            <text:p>CP02 – <text:s/>Tablero de Inicio</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21"/>
          <table:table-cell table:style-name="ce63" table:number-columns-repeated="16357"/>
        </table:table-row>
        <table:table-row table:style-name="ro7">
          <table:table-cell table:style-name="ce18" office:value-type="string" calcext:value-type="string">
            <text:p>CP02-01</text:p>
          </table:table-cell>
          <table:table-cell table:style-name="ce64" office:value-type="string" calcext:value-type="string">
            <text:p>Ingresar al sistema con un usuario tipo de usuario “Administrador del Sistema”</text:p>
          </table:table-cell>
          <table:table-cell table:style-name="ce6" office:value-type="string" calcext:value-type="string">
            <text:p>ok</text:p>
          </table:table-cell>
          <table:table-cell table:style-name="ce8" office:value-type="string" calcext:value-type="string">
            <text:p>1. Se ingresa con el usuario admin, el cual tiene el rol de administrador del sistema y se muestra el tablero de inicio que corresponde</text:p>
          </table:table-cell>
          <table:table-cell table:style-name="ce64"/>
          <table:table-cell table:style-name="ce17"/>
          <table:table-cell table:style-name="ce91" table:number-columns-repeated="21"/>
          <table:table-cell table:style-name="ce63" table:number-columns-repeated="16357"/>
        </table:table-row>
        <table:table-row table:style-name="ro5">
          <table:table-cell table:style-name="ce18" office:value-type="string" calcext:value-type="string">
            <text:p>CP02-02</text:p>
          </table:table-cell>
          <table:table-cell table:style-name="ce64" office:value-type="string" calcext:value-type="string">
            <text:p>Validar que se muestre la cantidad de usuarios activos y usuarios inactivos</text:p>
          </table:table-cell>
          <table:table-cell table:style-name="ce6" office:value-type="string" calcext:value-type="string">
            <text:p>ok</text:p>
          </table:table-cell>
          <table:table-cell table:style-name="ce8" office:value-type="string" calcext:value-type="string">
            <text:p>1. Se ingresa con el usuario admin, y en el tablero de inicio se muestra la cantidad de usuario activo y de usuarios inactivos</text:p>
          </table:table-cell>
          <table:table-cell table:style-name="ce19"/>
          <table:table-cell table:style-name="ce17"/>
          <table:table-cell table:style-name="ce91" table:number-columns-repeated="21"/>
          <table:table-cell table:style-name="ce63" table:number-columns-repeated="16357"/>
        </table:table-row>
        <table:table-row table:style-name="ro11">
          <table:table-cell table:style-name="ce18" office:value-type="string" calcext:value-type="string">
            <text:p>CP02-03</text:p>
          </table:table-cell>
          <table:table-cell table:style-name="ce64" office:value-type="string" calcext:value-type="string">
            <text:p>Validar que cuando se de clic a la opción de “Usuarios Activos”, redirija al modulo de usuarios con el filtro estado activo</text:p>
          </table:table-cell>
          <table:table-cell table:style-name="ce6" office:value-type="string" calcext:value-type="string">
            <text:p>ok</text:p>
          </table:table-cell>
          <table:table-cell table:style-name="ce8" office:value-type="string" calcext:value-type="string">
            <text:p>1. Se ingresa con el usuario admin, y en el tablero de inicio se muestra la cantidad de usuario activo y de usuarios inactivos</text:p>
            <text:p>2. Se da clic en la opción de usuarios activos, y el sistema lo envia al módulo de usuarios con el filtro de activos aplicado</text:p>
            <text:p>3. Se valida que los resultamos mostrados si correspondan a usuarios activos</text:p>
          </table:table-cell>
          <table:table-cell table:style-name="ce19"/>
          <table:table-cell table:style-name="ce17"/>
          <table:table-cell table:style-name="ce91" table:number-columns-repeated="21"/>
          <table:table-cell table:style-name="ce63" table:number-columns-repeated="16357"/>
        </table:table-row>
        <table:table-row table:style-name="ro11">
          <table:table-cell table:style-name="ce18" office:value-type="string" calcext:value-type="string">
            <text:p>CP02-04</text:p>
          </table:table-cell>
          <table:table-cell table:style-name="ce64" office:value-type="string" calcext:value-type="string">
            <text:p>Validar que cuando se de clic a la opción de “Usuarios Inactivos”, rediriga al modulo de usuarios con el filtro estado inactivo</text:p>
          </table:table-cell>
          <table:table-cell table:style-name="ce6" office:value-type="string" calcext:value-type="string">
            <text:p>ok</text:p>
          </table:table-cell>
          <table:table-cell table:style-name="ce8" office:value-type="string" calcext:value-type="string">
            <text:p>1. Se ingresa con el usuario admin, y en el tablero de inicio se muestra la cantidad de usuario activo y de usuarios inactivos</text:p>
            <text:p>2. Se da clic en la opción de usuarios activos, y el sistema lo envia al módulo de usuarios con el filtro de inactivos aplicado</text:p>
            <text:p>3. Se valida que los resultamos mostrados si correspondan a usuarios inactivos</text:p>
          </table:table-cell>
          <table:table-cell table:style-name="ce64"/>
          <table:table-cell table:style-name="ce17"/>
          <table:table-cell table:style-name="ce91" table:number-columns-repeated="21"/>
          <table:table-cell table:style-name="ce63" table:number-columns-repeated="16357"/>
        </table:table-row>
        <table:table-row table:style-name="ro12">
          <table:table-cell table:style-name="ce18" office:value-type="string" calcext:value-type="string">
            <text:p>CP02-05</text:p>
          </table:table-cell>
          <table:table-cell table:style-name="ce64" office:value-type="string" calcext:value-type="string">
            <text:p>Validar que se muestre tabla de usuarios por dependencia</text:p>
          </table:table-cell>
          <table:table-cell table:style-name="ce6" office:value-type="string" calcext:value-type="string">
            <text:p>ok</text:p>
          </table:table-cell>
          <table:table-cell table:style-name="ce90" office:value-type="string" calcext:value-type="string" table:number-columns-spanned="1" table:number-rows-spanned="4">
            <text:p>1. Se ingresa con el usuario admin, y en el tablero de inicio se muestra una tabla asociada a todas las dependencias que existen en el sistema y por cada una mostrar la cantidad de usuarios que hay</text:p>
            <text:p>2. Seleccionar uno de los registros mostrados y se valida que en el botón dinámico se muestra la opción de “Ver”</text:p>
            <text:p>3. Se da clic en la opción “ver”, me redirige al modulo de usuario filtrando por la dependencia seleccionada</text:p>
          </table:table-cell>
          <table:table-cell table:style-name="ce64"/>
          <table:table-cell table:style-name="ce17"/>
          <table:table-cell table:style-name="ce91" table:number-columns-repeated="21"/>
          <table:table-cell table:style-name="ce63" table:number-columns-repeated="16357"/>
        </table:table-row>
        <table:table-row table:style-name="ro13">
          <table:table-cell table:style-name="ce18" office:value-type="string" calcext:value-type="string">
            <text:p>CP02-06</text:p>
          </table:table-cell>
          <table:table-cell table:style-name="ce64" office:value-type="string" calcext:value-type="string">
            <text:p>Validar que se muestre por cada dependencia la cantidad de usuarios que hay en el sistema</text:p>
          </table:table-cell>
          <table:table-cell table:style-name="ce6" office:value-type="string" calcext:value-type="string">
            <text:p>ok</text:p>
          </table:table-cell>
          <table:covered-table-cell/>
          <table:table-cell table:style-name="ce64"/>
          <table:table-cell table:style-name="ce17"/>
          <table:table-cell table:style-name="ce91" table:number-columns-repeated="9"/>
          <table:table-cell table:style-name="Default" table:number-columns-repeated="2"/>
          <table:table-cell table:style-name="ce91" table:number-columns-repeated="10"/>
          <table:table-cell table:style-name="ce63" table:number-columns-repeated="16357"/>
        </table:table-row>
        <table:table-row table:style-name="ro7">
          <table:table-cell table:style-name="ce18" office:value-type="string" calcext:value-type="string">
            <text:p>CP02-07</text:p>
          </table:table-cell>
          <table:table-cell table:style-name="ce64" office:value-type="string" calcext:value-type="string">
            <text:p>Validar que cuando se seleccione alguno de los registros mostrados y se de clic en el botón dinámico de color naranja en la pare inferior y se muestre la opción de “Ver”</text:p>
          </table:table-cell>
          <table:table-cell table:style-name="ce6" office:value-type="string" calcext:value-type="string">
            <text:p>ok</text:p>
          </table:table-cell>
          <table:covered-table-cell/>
          <table:table-cell table:style-name="ce64"/>
          <table:table-cell table:style-name="ce17"/>
          <table:table-cell table:style-name="ce91" table:number-columns-repeated="9"/>
          <table:table-cell table:style-name="Default" table:number-columns-repeated="2"/>
          <table:table-cell table:style-name="ce91" table:number-columns-repeated="10"/>
          <table:table-cell table:style-name="ce63" table:number-columns-repeated="16357"/>
        </table:table-row>
        <table:table-row table:style-name="ro14">
          <table:table-cell table:style-name="ce18" office:value-type="string" calcext:value-type="string">
            <text:p>CP02-08</text:p>
          </table:table-cell>
          <table:table-cell table:style-name="ce64" office:value-type="string" calcext:value-type="string">
            <text:p>Validar que cuando se de clic en el botón de “Ver”, redirigir al modulo de usuarios con el filtro de dependencia aplicado</text:p>
          </table:table-cell>
          <table:table-cell table:style-name="ce6" office:value-type="string" calcext:value-type="string">
            <text:p>ok</text:p>
          </table:table-cell>
          <table:covered-table-cell/>
          <table:table-cell table:style-name="ce64"/>
          <table:table-cell table:style-name="ce17"/>
          <table:table-cell table:style-name="ce91" table:number-columns-repeated="21"/>
          <table:table-cell table:style-name="ce63" table:number-columns-repeated="16357"/>
        </table:table-row>
        <table:table-row table:style-name="ro15">
          <table:table-cell table:style-name="ce18" office:value-type="string" calcext:value-type="string">
            <text:p>CP02-09</text:p>
          </table:table-cell>
          <table:table-cell table:style-name="ce64" office:value-type="string" calcext:value-type="string">
            <text:p>Validar la exportacion del listado de usuarios por dependencia a los formatos CSV, EXCEL, PDF, IMPRIMIR</text:p>
          </table:table-cell>
          <table:table-cell table:style-name="ce6" office:value-type="string" calcext:value-type="string">
            <text:p>ok</text:p>
          </table:table-cell>
          <table:table-cell table:style-name="ce8" office:value-type="string" calcext:value-type="string">
            <text:p>1. Se da clic en la opción de EXCEL que se muestra en la parte inferior, al hacer este proceso se descarga un archivo con el nombre listado de usuarios.xlsx</text:p>
            <text:p>2. Se da clic en la opción de CSV que se muestra en la parte inferior, al hacer este proceso se descarga un archivo con el nombre listado de usuarios.csv</text:p>
            <text:p>3. Se da clic en la opción de PDF que se muestra en la parte inferior, al hacer este proceso se descarga un archivo con el nombre listado de usuarios.pdf</text:p>
          </table:table-cell>
          <table:table-cell table:style-name="ce64"/>
          <table:table-cell table:style-name="ce17"/>
          <table:table-cell table:style-name="ce91" table:number-columns-repeated="21"/>
          <table:table-cell table:style-name="ce63" table:number-columns-repeated="16357"/>
        </table:table-row>
        <table:table-row table:style-name="ro13">
          <table:table-cell table:style-name="ce18" office:value-type="string" calcext:value-type="string">
            <text:p>CP02-09</text:p>
          </table:table-cell>
          <table:table-cell table:style-name="ce64" office:value-type="string" calcext:value-type="string">
            <text:p>Validar que se muestre tabla de usuarios por perfil</text:p>
          </table:table-cell>
          <table:table-cell table:style-name="ce6" office:value-type="string" calcext:value-type="string">
            <text:p>ok</text:p>
          </table:table-cell>
          <table:table-cell table:style-name="ce90" office:value-type="string" calcext:value-type="string" table:number-columns-spanned="1" table:number-rows-spanned="4">
            <text:p>1. Se ingresa con el usuario admin y en el tablero de inicio se muestra una tabla asociada a todos los usuarios asignados a un perfil en especifico.</text:p>
            <text:p>2. Seleccionar uno de los registros mostrados y se valida que en el botón dinámico se muestra la opción de “Ver”</text:p>
            <text:p>3. Se da clic en la opción “ver”, me redirige al modulo de usuario filtrando por el perfil seleccionado</text:p>
          </table:table-cell>
          <table:table-cell table:style-name="ce64"/>
          <table:table-cell table:style-name="ce17"/>
          <table:table-cell table:style-name="ce91" table:number-columns-repeated="21"/>
          <table:table-cell table:style-name="ce63" table:number-columns-repeated="16357"/>
        </table:table-row>
        <table:table-row table:style-name="ro13">
          <table:table-cell table:style-name="ce18" office:value-type="string" calcext:value-type="string">
            <text:p>CP02-10</text:p>
          </table:table-cell>
          <table:table-cell table:style-name="ce64" office:value-type="string" calcext:value-type="string">
            <text:p>Validar que se muestre por cada perfil la cantidad de usuarios que hay en el sistema</text:p>
          </table:table-cell>
          <table:table-cell table:style-name="ce6" office:value-type="string" calcext:value-type="string">
            <text:p>ok</text:p>
          </table:table-cell>
          <table:covered-table-cell/>
          <table:table-cell table:style-name="ce64"/>
          <table:table-cell table:style-name="ce17"/>
          <table:table-cell table:style-name="ce91" table:number-columns-repeated="21"/>
          <table:table-cell table:style-name="ce63" table:number-columns-repeated="16357"/>
        </table:table-row>
        <table:table-row table:style-name="ro16">
          <table:table-cell table:style-name="ce18" office:value-type="string" calcext:value-type="string">
            <text:p>CP02-11</text:p>
          </table:table-cell>
          <table:table-cell table:style-name="ce64" office:value-type="string" calcext:value-type="string">
            <text:p>Validar que cuando se seleccione alguno de los registros mostrados y se de clic en el botón dinámico de color naranja en la pare inferior y se muestre la opción de “Ver”</text:p>
          </table:table-cell>
          <table:table-cell table:style-name="ce6" office:value-type="string" calcext:value-type="string">
            <text:p>ok</text:p>
          </table:table-cell>
          <table:covered-table-cell/>
          <table:table-cell table:style-name="ce64"/>
          <table:table-cell table:style-name="ce17"/>
          <table:table-cell table:style-name="ce91" table:number-columns-repeated="21"/>
          <table:table-cell table:style-name="ce63" table:number-columns-repeated="16357"/>
        </table:table-row>
        <table:table-row table:style-name="ro17">
          <table:table-cell table:style-name="ce18" office:value-type="string" calcext:value-type="string">
            <text:p>CP02-12</text:p>
          </table:table-cell>
          <table:table-cell table:style-name="ce64" office:value-type="string" calcext:value-type="string">
            <text:p>Validar que cuando se de clic en el botón de “Ver”, redirigir al modulo de usuarios con el filtro de perfil aplicado</text:p>
          </table:table-cell>
          <table:table-cell table:style-name="ce6" office:value-type="string" calcext:value-type="string">
            <text:p>ok</text:p>
          </table:table-cell>
          <table:covered-table-cell/>
          <table:table-cell table:style-name="ce64"/>
          <table:table-cell table:style-name="ce17"/>
          <table:table-cell table:style-name="ce91" table:number-columns-repeated="21"/>
          <table:table-cell table:style-name="ce63" table:number-columns-repeated="16357"/>
        </table:table-row>
        <table:table-row table:style-name="ro7">
          <table:table-cell table:style-name="ce18" office:value-type="string" calcext:value-type="string">
            <text:p>CP02-13</text:p>
          </table:table-cell>
          <table:table-cell table:style-name="ce64" office:value-type="string" calcext:value-type="string">
            <text:p>Ingresar al sistema con un usuario tipo de usuario “Usuario Funcional”</text:p>
          </table:table-cell>
          <table:table-cell table:style-name="ce6" office:value-type="string" calcext:value-type="string">
            <text:p>ok</text:p>
          </table:table-cell>
          <table:table-cell table:style-name="ce8" office:value-type="string" calcext:value-type="string">
            <text:p>1. Se ingresa con el usuario funcional y al ingresar se muestra en el tablero de inicio lo relacionado a Radicados asignados, Radicados Informados, Radicados en respuesta parcial</text:p>
          </table:table-cell>
          <table:table-cell table:style-name="ce64"/>
          <table:table-cell table:style-name="ce17"/>
          <table:table-cell table:style-name="ce91" table:number-columns-repeated="21"/>
          <table:table-cell table:style-name="ce63" table:number-columns-repeated="16357"/>
        </table:table-row>
        <table:table-row table:style-name="ro13">
          <table:table-cell table:style-name="ce18" office:value-type="string" calcext:value-type="string">
            <text:p>CP02-14</text:p>
          </table:table-cell>
          <table:table-cell table:style-name="ce64" office:value-type="string" calcext:value-type="string">
            <text:p>Validar que se muestre tabla con el listado de los “Radicados Asignados”</text:p>
          </table:table-cell>
          <table:table-cell table:style-name="ce6" office:value-type="string" calcext:value-type="string">
            <text:p>ok</text:p>
          </table:table-cell>
          <table:table-cell table:style-name="ce90" office:value-type="string" calcext:value-type="string" table:number-columns-spanned="1" table:number-rows-spanned="2">
            <text:p>1. Se ingresa con el usuario funcional y en el tablero de inicio se muestra una tabla asociada a todos los radicados que se han asignado al usuario con el que se inicio sesión</text:p>
            <text:p>2. Se selecciona uno de los registros mostrados y se valida que en el botón dinámico se muestra la opción de “Ver”</text:p>
            <text:p>3. Se da clic en dicha opción y el sistema muestra el detalle del radicado seleccionado</text:p>
          </table:table-cell>
          <table:table-cell/>
          <table:table-cell table:style-name="ce17"/>
          <table:table-cell table:style-name="ce91" table:number-columns-repeated="21"/>
          <table:table-cell table:style-name="ce63" table:number-columns-repeated="16357"/>
        </table:table-row>
        <table:table-row table:style-name="ro18">
          <table:table-cell table:style-name="ce18" office:value-type="string" calcext:value-type="string">
            <text:p>CP02-15</text:p>
          </table:table-cell>
          <table:table-cell table:style-name="ce64" office:value-type="string" calcext:value-type="string">
            <text:p>Validar que cuando se seleccione alguno de los registros mostrados y se de clic en el botón dinámico de color naranja en la pare inferior y se muestre la opción de “Ver”</text:p>
          </table:table-cell>
          <table:table-cell table:style-name="ce6" office:value-type="string" calcext:value-type="string">
            <text:p>ok</text:p>
          </table:table-cell>
          <table:covered-table-cell/>
          <table:table-cell table:style-name="ce64"/>
          <table:table-cell table:style-name="ce17"/>
          <table:table-cell table:style-name="ce91" table:number-columns-repeated="21"/>
          <table:table-cell table:style-name="ce63" table:number-columns-repeated="16357"/>
        </table:table-row>
        <table:table-row table:style-name="ro19">
          <table:table-cell table:style-name="ce18" office:value-type="string" calcext:value-type="string">
            <text:p>CP02-16</text:p>
          </table:table-cell>
          <table:table-cell table:style-name="ce64" office:value-type="string" calcext:value-type="string">
            <text:p>Validar que si alguno de los radicados esta vencido se muestre de color rojo</text:p>
          </table:table-cell>
          <table:table-cell table:style-name="ce6" office:value-type="string" calcext:value-type="string">
            <text:p>ok</text:p>
          </table:table-cell>
          <table:table-cell table:style-name="ce8" office:value-type="string" calcext:value-type="string">
            <text:p>1. Se ingresa con el usuario funcional y se valida que en los radicados asignado hay radicados vencidos y los cuales se muestran de color rojo</text:p>
          </table:table-cell>
          <table:table-cell table:style-name="ce64"/>
          <table:table-cell table:style-name="ce17"/>
          <table:table-cell table:style-name="ce91" table:number-columns-repeated="21"/>
          <table:table-cell table:style-name="ce63" table:number-columns-repeated="16357"/>
        </table:table-row>
        <table:table-row table:style-name="ro7">
          <table:table-cell table:style-name="ce18" office:value-type="string" calcext:value-type="string">
            <text:p>CP02-17</text:p>
          </table:table-cell>
          <table:table-cell table:style-name="ce64" office:value-type="string" calcext:value-type="string">
            <text:p>Validar que si alguno de los radicados esta pronto a vencerse se muestre de color amarillo</text:p>
          </table:table-cell>
          <table:table-cell table:style-name="ce6" office:value-type="string" calcext:value-type="string">
            <text:p>ok</text:p>
          </table:table-cell>
          <table:table-cell table:style-name="ce8" office:value-type="string" calcext:value-type="string">
            <text:p>1. Se ingresa con el usuario funcional y se valida que en los radicados asignado hay radicados próximos a vencerse y los cuales se muestran de color amarillo</text:p>
          </table:table-cell>
          <table:table-cell table:style-name="ce64"/>
          <table:table-cell table:style-name="ce17"/>
          <table:table-cell table:style-name="ce91" table:number-columns-repeated="21"/>
          <table:table-cell table:style-name="ce63" table:number-columns-repeated="16357"/>
        </table:table-row>
        <table:table-row table:style-name="ro20">
          <table:table-cell table:style-name="ce18" office:value-type="string" calcext:value-type="string">
            <text:p>CP02-18</text:p>
          </table:table-cell>
          <table:table-cell table:style-name="ce64" office:value-type="string" calcext:value-type="string">
            <text:p>Validar que se muestre tabla con el listado de los “Radicados Informados”</text:p>
          </table:table-cell>
          <table:table-cell table:style-name="ce6" office:value-type="string" calcext:value-type="string">
            <text:p>ok</text:p>
          </table:table-cell>
          <table:table-cell table:style-name="ce90" office:value-type="string" calcext:value-type="string" table:number-columns-spanned="1" table:number-rows-spanned="3">
            <text:p>1. Se ingresa con el usuario funcional y en el tablero de inicio se muestra una tabla asociada a todos los radicados que se han sido informados al usuario con el que se inicio sesión</text:p>
            <text:p>2. Se selecciona uno de los registros mostrados y se valida que en el botón dinámico se muestra la opción de “Ver”</text:p>
            <text:p>3. Se da clic en dicha opción y el sistema muestra el detalle del radicado seleccionado</text:p>
          </table:table-cell>
          <table:table-cell table:style-name="ce64"/>
          <table:table-cell table:style-name="ce17"/>
          <table:table-cell table:style-name="ce91" table:number-columns-repeated="21"/>
          <table:table-cell table:style-name="ce63" table:number-columns-repeated="16357"/>
        </table:table-row>
        <table:table-row table:style-name="ro7">
          <table:table-cell table:style-name="ce18" office:value-type="string" calcext:value-type="string">
            <text:p>CP02-19</text:p>
          </table:table-cell>
          <table:table-cell table:style-name="ce64" office:value-type="string" calcext:value-type="string">
            <text:p>Validar que cuando se seleccione alguno de los registros mostrados y se de clic en el botón dinámico de color naranja en la parte inferior y se muestre la opción de “Ver”</text:p>
          </table:table-cell>
          <table:table-cell table:style-name="ce6" office:value-type="string" calcext:value-type="string">
            <text:p>ok</text:p>
          </table:table-cell>
          <table:covered-table-cell/>
          <table:table-cell table:style-name="ce64"/>
          <table:table-cell table:style-name="ce17"/>
          <table:table-cell table:style-name="ce91" table:number-columns-repeated="21"/>
          <table:table-cell table:style-name="ce63" table:number-columns-repeated="16357"/>
        </table:table-row>
        <table:table-row table:style-name="ro20">
          <table:table-cell table:style-name="ce18" office:value-type="string" calcext:value-type="string">
            <text:p>CP02-20</text:p>
          </table:table-cell>
          <table:table-cell table:style-name="ce64" office:value-type="string" calcext:value-type="string">
            <text:p>Validar que al dar clic en la opción “Ver” se rediriga a la visualización del radicado</text:p>
          </table:table-cell>
          <table:table-cell table:style-name="ce6" office:value-type="string" calcext:value-type="string">
            <text:p>ok</text:p>
          </table:table-cell>
          <table:covered-table-cell/>
          <table:table-cell table:style-name="ce64"/>
          <table:table-cell table:style-name="ce17"/>
          <table:table-cell table:style-name="ce91" table:number-columns-repeated="21"/>
          <table:table-cell table:style-name="ce63" table:number-columns-repeated="16357"/>
        </table:table-row>
        <table:table-row table:style-name="ro7">
          <table:table-cell table:style-name="ce57" office:value-type="string" calcext:value-type="string">
            <text:p>CP02-21</text:p>
          </table:table-cell>
          <table:table-cell table:style-name="ce64" office:value-type="string" calcext:value-type="string">
            <text:p>Validar que si alguno de los radicados esta vencido se muestre de color rojo</text:p>
          </table:table-cell>
          <table:table-cell table:style-name="ce6" office:value-type="string" calcext:value-type="string">
            <text:p>ok</text:p>
          </table:table-cell>
          <table:table-cell table:style-name="ce8" office:value-type="string" calcext:value-type="string">
            <text:p>1. Se ingresa con el usuario funcional y se valida que en los radicados asignado hay radicados vencidos y los cuales se muestran de color rojo</text:p>
          </table:table-cell>
          <table:table-cell table:style-name="ce64" office:value-type="string" calcext:value-type="string">
            <text:p>Al enviar al usuario funcional un radicado informado, no esta mostrando la semaforizacion indicada</text:p>
          </table:table-cell>
          <table:table-cell table:style-name="ce17"/>
          <table:table-cell table:style-name="ce91" table:number-columns-repeated="21"/>
          <table:table-cell table:style-name="ce63" table:number-columns-repeated="16357"/>
        </table:table-row>
        <table:table-row table:style-name="ro7">
          <table:table-cell table:style-name="ce57" office:value-type="string" calcext:value-type="string">
            <text:p>CP02-22</text:p>
          </table:table-cell>
          <table:table-cell table:style-name="ce64" office:value-type="string" calcext:value-type="string">
            <text:p>Validar que si alguno de los radicados esta pronto a vencerse se muestre de color amarillo</text:p>
          </table:table-cell>
          <table:table-cell table:style-name="ce6" office:value-type="string" calcext:value-type="string">
            <text:p>ok</text:p>
          </table:table-cell>
          <table:table-cell table:style-name="ce8" office:value-type="string" calcext:value-type="string">
            <text:p>1. Se ingresa con el usuario funcional y se valida que en los radicados asignado hay radicados próximos a vencerse y los cuales se muestran de color amarillo</text:p>
          </table:table-cell>
          <table:table-cell table:style-name="ce64" office:value-type="string" calcext:value-type="string">
            <text:p>Al enviar al usuario funcional un radicado informado, no esta mostrando la semaforizacion indicada</text:p>
          </table:table-cell>
          <table:table-cell table:style-name="ce17"/>
          <table:table-cell table:style-name="ce91" table:number-columns-repeated="21"/>
          <table:table-cell table:style-name="ce63" table:number-columns-repeated="16357"/>
        </table:table-row>
        <table:table-row table:style-name="ro21">
          <table:table-cell table:style-name="ce18" office:value-type="string" calcext:value-type="string">
            <text:p>CP02-23</text:p>
          </table:table-cell>
          <table:table-cell table:style-name="ce64" office:value-type="string" calcext:value-type="string">
            <text:p>Ingresar al sistema con un usuario tipo de usuario “Usuario Jefe”</text:p>
          </table:table-cell>
          <table:table-cell table:style-name="ce6" office:value-type="string" calcext:value-type="string">
            <text:p>ok</text:p>
          </table:table-cell>
          <table:table-cell table:style-name="ce8" office:value-type="string" calcext:value-type="string">
            <text:p>1. Se ingresa con el usuario funcional y al ingresar se muestra en el tablero de inicio lo relacionado a Radicados informados, Solicitudes de visto bueno, Documentos pendientes firma, Radicados asignados a la dependencia y Radicados de respuesta parcial</text:p>
          </table:table-cell>
          <table:table-cell table:style-name="ce64"/>
          <table:table-cell table:style-name="ce17"/>
          <table:table-cell table:style-name="ce91" table:number-columns-repeated="21"/>
          <table:table-cell table:style-name="ce63" table:number-columns-repeated="16357"/>
        </table:table-row>
        <table:table-row table:style-name="ro22">
          <table:table-cell table:style-name="ce18" office:value-type="string" calcext:value-type="string">
            <text:p>CP02-24</text:p>
          </table:table-cell>
          <table:table-cell table:style-name="ce64" office:value-type="string" calcext:value-type="string">
            <text:p>Validar que se muestre tabla con el listado de los “Solicitudes de visto bueno”</text:p>
          </table:table-cell>
          <table:table-cell table:style-name="ce6" office:value-type="string" calcext:value-type="string">
            <text:p>ok</text:p>
          </table:table-cell>
          <table:table-cell table:style-name="ce90" office:value-type="string" calcext:value-type="string" table:number-columns-spanned="1" table:number-rows-spanned="3">
            <text:p>1. Se ingresa con el usuario jefe y en el tablero de inicio se muestra una tabla asociada a todos los radicados que se han enviado al jefe de la dependencia para dar visto bueno de los documentos</text:p>
            <text:p>2. Se selecciona uno de los registros mostrados y se valida que en el botón dinámico se muestra la opción de “Ver”</text:p>
            <text:p>3. Se da clic en dicha opción y el sistema muestra el detalle del radicado seleccionado</text:p>
          </table:table-cell>
          <table:table-cell table:style-name="ce64"/>
          <table:table-cell table:style-name="ce17"/>
          <table:table-cell table:style-name="ce91" table:number-columns-repeated="21"/>
          <table:table-cell table:style-name="ce63" table:number-columns-repeated="16357"/>
        </table:table-row>
        <table:table-row table:style-name="ro7">
          <table:table-cell table:style-name="ce18" office:value-type="string" calcext:value-type="string">
            <text:p>CP02-25</text:p>
          </table:table-cell>
          <table:table-cell table:style-name="ce64" office:value-type="string" calcext:value-type="string">
            <text:p>Validar que cuando se seleccione alguno de los registros mostrados y se de clic en el <text:s/>botón dinámico de color naranja en la pare inferior y se muestre la opción de “Ver”</text:p>
          </table:table-cell>
          <table:table-cell table:style-name="ce6" office:value-type="string" calcext:value-type="string">
            <text:p>ok</text:p>
          </table:table-cell>
          <table:covered-table-cell/>
          <table:table-cell table:style-name="ce64"/>
          <table:table-cell table:style-name="ce17"/>
          <table:table-cell table:style-name="ce91" table:number-columns-repeated="21"/>
          <table:table-cell table:style-name="ce63" table:number-columns-repeated="16357"/>
        </table:table-row>
        <table:table-row table:style-name="ro22">
          <table:table-cell table:style-name="ce18" office:value-type="string" calcext:value-type="string">
            <text:p>CP02-26</text:p>
          </table:table-cell>
          <table:table-cell table:style-name="ce64" office:value-type="string" calcext:value-type="string">
            <text:p>Validar que al dar clic en la opción “Ver” se rediriga a la visualización del radicado</text:p>
          </table:table-cell>
          <table:table-cell table:style-name="ce6" office:value-type="string" calcext:value-type="string">
            <text:p>ok</text:p>
          </table:table-cell>
          <table:covered-table-cell/>
          <table:table-cell table:style-name="ce64"/>
          <table:table-cell table:style-name="ce17"/>
          <table:table-cell table:style-name="ce91" table:number-columns-repeated="21"/>
          <table:table-cell table:style-name="ce63" table:number-columns-repeated="16357"/>
        </table:table-row>
        <table:table-row table:style-name="ro7">
          <table:table-cell table:style-name="ce57" office:value-type="string" calcext:value-type="string">
            <text:p>CP02-27</text:p>
          </table:table-cell>
          <table:table-cell table:style-name="ce64" office:value-type="string" calcext:value-type="string">
            <text:p>Validar que si alguno de los radicados esta vencido se muestre de color rojo</text:p>
          </table:table-cell>
          <table:table-cell table:style-name="ce6" office:value-type="string" calcext:value-type="string">
            <text:p>ok</text:p>
          </table:table-cell>
          <table:table-cell table:style-name="ce8" office:value-type="string" calcext:value-type="string">
            <text:p>1. Se ingresa con el usuario jefe y se valida que en los radicados asignado hay radicados vencidos y los cuales se muestran de color rojo</text:p>
          </table:table-cell>
          <table:table-cell table:style-name="ce64" office:value-type="string" calcext:value-type="string">
            <text:p>Al enviar al usuario jefe un radicado para visto y bueno, no esta mostrando la semaforizacion indicada</text:p>
          </table:table-cell>
          <table:table-cell table:style-name="ce17"/>
          <table:table-cell table:style-name="ce91" table:number-columns-repeated="21"/>
          <table:table-cell table:style-name="ce63" table:number-columns-repeated="16357"/>
        </table:table-row>
        <table:table-row table:style-name="ro7">
          <table:table-cell table:style-name="ce57" office:value-type="string" calcext:value-type="string">
            <text:p>CP02-28</text:p>
          </table:table-cell>
          <table:table-cell table:style-name="ce64" office:value-type="string" calcext:value-type="string">
            <text:p>Validar que si alguno de los radicados esta pronto a vencerse se muestre de color amarillo</text:p>
          </table:table-cell>
          <table:table-cell table:style-name="ce6" office:value-type="string" calcext:value-type="string">
            <text:p>ok</text:p>
          </table:table-cell>
          <table:table-cell table:style-name="ce8" office:value-type="string" calcext:value-type="string">
            <text:p>1. Se ingresa con el usuario jefe y se valida que en los radicados asignado hay radicados próximos a vencerse y los cuales se muestran de color amarillo</text:p>
          </table:table-cell>
          <table:table-cell table:style-name="ce64" office:value-type="string" calcext:value-type="string">
            <text:p>Al enviar al usuario jefe un radicado para visto y bueno, no esta mostrando la semaforizacion indicada</text:p>
          </table:table-cell>
          <table:table-cell table:style-name="ce17"/>
          <table:table-cell table:style-name="ce91" table:number-columns-repeated="21"/>
          <table:table-cell table:style-name="ce63" table:number-columns-repeated="16357"/>
        </table:table-row>
        <table:table-row table:style-name="ro23">
          <table:table-cell table:style-name="ce18" office:value-type="string" calcext:value-type="string">
            <text:p>CP02-29</text:p>
          </table:table-cell>
          <table:table-cell table:style-name="ce64" office:value-type="string" calcext:value-type="string">
            <text:p>Validar que se muestre tabla con el listado de los “Radicados Informados”</text:p>
          </table:table-cell>
          <table:table-cell table:style-name="ce6" office:value-type="string" calcext:value-type="string">
            <text:p>ok</text:p>
          </table:table-cell>
          <table:table-cell table:style-name="ce90" office:value-type="string" calcext:value-type="string" table:number-columns-spanned="1" table:number-rows-spanned="3">
            <text:p>1. Se ingresa con el usuario jefe y en el tablero de inicio se muestra una tabla asociada a todos los radicados que se han sido informados al jefe de la dependencia</text:p>
            <text:p>2. Se selecciona uno de los registros mostrados y se valida que en el botón dinámico se muestra la opción de “Ver”</text:p>
            <text:p>3. Se da clic en dicha opción y el sistema muestra el detalle del radicado seleccionado</text:p>
          </table:table-cell>
          <table:table-cell table:style-name="ce64"/>
          <table:table-cell table:style-name="ce17"/>
          <table:table-cell table:style-name="ce91" table:number-columns-repeated="21"/>
          <table:table-cell table:style-name="ce63" table:number-columns-repeated="16357"/>
        </table:table-row>
        <table:table-row table:style-name="ro7">
          <table:table-cell table:style-name="ce18" office:value-type="string" calcext:value-type="string">
            <text:p>CP02-30</text:p>
          </table:table-cell>
          <table:table-cell table:style-name="ce64" office:value-type="string" calcext:value-type="string">
            <text:p>Validar que cuando se seleccione alguno de los registros mostrados y se de clic en el <text:s/>botón dinámico de color naranja en la pare inferior y se muestre la opción de “Ver”</text:p>
          </table:table-cell>
          <table:table-cell table:style-name="ce6" office:value-type="string" calcext:value-type="string">
            <text:p>ok</text:p>
          </table:table-cell>
          <table:covered-table-cell/>
          <table:table-cell table:style-name="ce64"/>
          <table:table-cell table:style-name="ce17"/>
          <table:table-cell table:style-name="ce91" table:number-columns-repeated="21"/>
          <table:table-cell table:style-name="ce63" table:number-columns-repeated="16357"/>
        </table:table-row>
        <table:table-row table:style-name="ro23">
          <table:table-cell table:style-name="ce18" office:value-type="string" calcext:value-type="string">
            <text:p>CP02-31</text:p>
          </table:table-cell>
          <table:table-cell table:style-name="ce64" office:value-type="string" calcext:value-type="string">
            <text:p>Validar que al dar clic en la opción “Ver” se rediriga a la visualización del radicado</text:p>
          </table:table-cell>
          <table:table-cell table:style-name="ce6" office:value-type="string" calcext:value-type="string">
            <text:p>ok</text:p>
          </table:table-cell>
          <table:covered-table-cell/>
          <table:table-cell table:style-name="ce64"/>
          <table:table-cell table:style-name="ce17"/>
          <table:table-cell table:style-name="ce91" table:number-columns-repeated="21"/>
          <table:table-cell table:style-name="ce63" table:number-columns-repeated="16357"/>
        </table:table-row>
        <table:table-row table:style-name="ro7">
          <table:table-cell table:style-name="ce57" office:value-type="string" calcext:value-type="string">
            <text:p>CP02-32</text:p>
          </table:table-cell>
          <table:table-cell table:style-name="ce64" office:value-type="string" calcext:value-type="string">
            <text:p>Validar que si alguno de los radicados esta vencido se muestre de color rojo</text:p>
          </table:table-cell>
          <table:table-cell table:style-name="ce6" office:value-type="string" calcext:value-type="string">
            <text:p>ok</text:p>
          </table:table-cell>
          <table:table-cell table:style-name="ce8" office:value-type="string" calcext:value-type="string">
            <text:p>1. Se ingresa con el usuario jefe y se valida que en los radicados asignado hay radicados vencidos y los cuales se muestran de color rojo</text:p>
          </table:table-cell>
          <table:table-cell table:style-name="ce64" office:value-type="string" calcext:value-type="string">
            <text:p>Al enviar al usuario jefe como radicado informado, no esta mostrando la semaforizacion indicada</text:p>
          </table:table-cell>
          <table:table-cell table:style-name="ce17"/>
          <table:table-cell table:style-name="ce91" table:number-columns-repeated="21"/>
          <table:table-cell table:style-name="ce63" table:number-columns-repeated="16357"/>
        </table:table-row>
        <table:table-row table:style-name="ro7">
          <table:table-cell table:style-name="ce57" office:value-type="string" calcext:value-type="string">
            <text:p>CP02-33</text:p>
          </table:table-cell>
          <table:table-cell table:style-name="ce64" office:value-type="string" calcext:value-type="string">
            <text:p>Validar que si alguno de los radicados esta pronto a vencerse se muestre de color amarillo</text:p>
          </table:table-cell>
          <table:table-cell table:style-name="ce6" office:value-type="string" calcext:value-type="string">
            <text:p>ok</text:p>
          </table:table-cell>
          <table:table-cell table:style-name="ce8" office:value-type="string" calcext:value-type="string">
            <text:p>1. Se ingresa con el usuario jefe y se valida que en los radicados asignado hay radicados próximos a vencerse y los cuales se muestran de color amarillo</text:p>
          </table:table-cell>
          <table:table-cell table:style-name="ce64" office:value-type="string" calcext:value-type="string">
            <text:p>Al enviar al usuario jefe como radicado informado, no esta mostrando la semaforizacion indicada</text:p>
          </table:table-cell>
          <table:table-cell table:style-name="ce17"/>
          <table:table-cell table:style-name="ce91" table:number-columns-repeated="21"/>
          <table:table-cell table:style-name="ce63" table:number-columns-repeated="16357"/>
        </table:table-row>
        <table:table-row table:style-name="ro23">
          <table:table-cell table:style-name="ce18" office:value-type="string" calcext:value-type="string">
            <text:p>CP02-34</text:p>
          </table:table-cell>
          <table:table-cell table:style-name="ce64" office:value-type="string" calcext:value-type="string">
            <text:p>Validar que se muestre tabla con el listado de los “Documentos pendientes firma”</text:p>
          </table:table-cell>
          <table:table-cell table:style-name="ce6" office:value-type="string" calcext:value-type="string">
            <text:p>ok</text:p>
          </table:table-cell>
          <table:table-cell table:style-name="ce90" office:value-type="string" calcext:value-type="string" table:number-columns-spanned="1" table:number-rows-spanned="3">
            <text:p>1. Se ingresa con el usuario jefe y en el tablero de inicio se muestra una tabla asociada a todos los radicados que se encuentren en estado pendiente por firmar.</text:p>
            <text:p>2. Se selecciona uno de los registros mostrados y se valida que en el botón dinámico se muestra la opción de “Ver”</text:p>
            <text:p>3. Se da clic en dicha opción y el sistema muestra el detalle del radicado seleccionado</text:p>
          </table:table-cell>
          <table:table-cell table:style-name="ce64"/>
          <table:table-cell table:style-name="ce17"/>
          <table:table-cell table:style-name="ce91" table:number-columns-repeated="21"/>
          <table:table-cell table:style-name="ce63" table:number-columns-repeated="16357"/>
        </table:table-row>
        <table:table-row table:style-name="ro7">
          <table:table-cell table:style-name="ce58" office:value-type="string" calcext:value-type="string">
            <text:p>CP02-35</text:p>
          </table:table-cell>
          <table:table-cell table:style-name="ce64" office:value-type="string" calcext:value-type="string">
            <text:p>Validar que cuando se seleccione alguno de los registros mostrados y se de clic en el <text:s/>botón dinámico de color naranja en la pare inferior y se muestre la opción de “Ver”</text:p>
          </table:table-cell>
          <table:table-cell table:style-name="ce6" office:value-type="string" calcext:value-type="string">
            <text:p>ok</text:p>
          </table:table-cell>
          <table:covered-table-cell/>
          <table:table-cell table:style-name="ce64" office:value-type="string" calcext:value-type="string">
            <text:p>No esta trayendo los radicados pendientes firma</text:p>
          </table:table-cell>
          <table:table-cell table:style-name="ce17"/>
          <table:table-cell table:style-name="ce91" table:number-columns-repeated="21"/>
          <table:table-cell table:style-name="ce63" table:number-columns-repeated="16357"/>
        </table:table-row>
        <table:table-row table:style-name="ro23">
          <table:table-cell table:style-name="ce58" office:value-type="string" calcext:value-type="string">
            <text:p>CP02-36</text:p>
          </table:table-cell>
          <table:table-cell table:style-name="ce64" office:value-type="string" calcext:value-type="string">
            <text:p>Validar que al dar clic en la opción “Ver” se rediriga a la visualización del radicado</text:p>
          </table:table-cell>
          <table:table-cell table:style-name="ce6" office:value-type="string" calcext:value-type="string">
            <text:p>ok</text:p>
          </table:table-cell>
          <table:covered-table-cell/>
          <table:table-cell table:style-name="ce64" office:value-type="string" calcext:value-type="string">
            <text:p>No esta trayendo los radicados pendientes firma</text:p>
          </table:table-cell>
          <table:table-cell table:style-name="ce17"/>
          <table:table-cell table:style-name="ce91" table:number-columns-repeated="21"/>
          <table:table-cell table:style-name="ce63" table:number-columns-repeated="16357"/>
        </table:table-row>
        <table:table-row table:style-name="ro7">
          <table:table-cell table:style-name="ce58" office:value-type="string" calcext:value-type="string">
            <text:p>CP02-37</text:p>
          </table:table-cell>
          <table:table-cell table:style-name="ce64" office:value-type="string" calcext:value-type="string">
            <text:p>Validar que si alguno de los radicados esta vencido se muestre de color rojo</text:p>
          </table:table-cell>
          <table:table-cell table:style-name="ce6" office:value-type="string" calcext:value-type="string">
            <text:p>ok</text:p>
          </table:table-cell>
          <table:table-cell table:style-name="ce8" office:value-type="string" calcext:value-type="string">
            <text:p>1. Se ingresa con el usuario jefe y se valida que en los radicados asignado hay radicados vencidos y los cuales se muestran de color rojo</text:p>
          </table:table-cell>
          <table:table-cell table:style-name="ce64" office:value-type="string" calcext:value-type="string">
            <text:p>No hay radicados pendientes firma para validar</text:p>
          </table:table-cell>
          <table:table-cell table:style-name="ce17"/>
          <table:table-cell table:style-name="ce91" table:number-columns-repeated="21"/>
          <table:table-cell table:style-name="ce63" table:number-columns-repeated="16357"/>
        </table:table-row>
        <table:table-row table:style-name="ro7">
          <table:table-cell table:style-name="ce58" office:value-type="string" calcext:value-type="string">
            <text:p>CP02-38</text:p>
          </table:table-cell>
          <table:table-cell table:style-name="ce64" office:value-type="string" calcext:value-type="string">
            <text:p>Validar que si alguno de los radicados esta pronto a vencerse se muestre de color amarillo</text:p>
          </table:table-cell>
          <table:table-cell table:style-name="ce6" office:value-type="string" calcext:value-type="string">
            <text:p>ok</text:p>
          </table:table-cell>
          <table:table-cell table:style-name="ce8" office:value-type="string" calcext:value-type="string">
            <text:p>1. Se ingresa con el usuario jefe y se valida que en los radicados asignado hay radicados próximos a vencerse y los cuales se muestran de color amarillo</text:p>
          </table:table-cell>
          <table:table-cell table:style-name="ce64" office:value-type="string" calcext:value-type="string">
            <text:p>No hay radicados pendientes firma para validar</text:p>
          </table:table-cell>
          <table:table-cell table:style-name="ce17"/>
          <table:table-cell table:style-name="ce91" table:number-columns-repeated="21"/>
          <table:table-cell table:style-name="ce63" table:number-columns-repeated="16357"/>
        </table:table-row>
        <table:table-row table:style-name="ro14">
          <table:table-cell table:style-name="ce18" office:value-type="string" calcext:value-type="string">
            <text:p>CP02-39</text:p>
          </table:table-cell>
          <table:table-cell table:style-name="ce64" office:value-type="string" calcext:value-type="string">
            <text:p>Validar que se muestre tabla con el listado de los “Radicados asignados a la dependencia ”</text:p>
          </table:table-cell>
          <table:table-cell table:style-name="ce6" office:value-type="string" calcext:value-type="string">
            <text:p>ok</text:p>
          </table:table-cell>
          <table:table-cell table:style-name="ce90" office:value-type="string" calcext:value-type="string" table:number-columns-spanned="1" table:number-rows-spanned="3">
            <text:p>1. Se ingresa con el usuario jefe y en el tablero de inicio se muestra una tabla asociada a todos los radicados que se han asignado a cualquier usuario de la dependencia.</text:p>
            <text:p>2. Se selecciona uno de los registros mostrados y se valida que en el botón dinámico se muestra la opción de “Ver”</text:p>
            <text:p>3. Se da clic en dicha opción y el sistema muestra el detalle del radicado seleccionado</text:p>
          </table:table-cell>
          <table:table-cell table:style-name="ce64"/>
          <table:table-cell table:style-name="ce17"/>
          <table:table-cell table:style-name="ce91" table:number-columns-repeated="21"/>
          <table:table-cell table:style-name="ce63" table:number-columns-repeated="16357"/>
        </table:table-row>
        <table:table-row table:style-name="ro7">
          <table:table-cell table:style-name="ce18" office:value-type="string" calcext:value-type="string">
            <text:p>CP02-40</text:p>
          </table:table-cell>
          <table:table-cell table:style-name="ce64" office:value-type="string" calcext:value-type="string">
            <text:p>Validar que cuando se seleccione alguno de los registros mostrados y se de clic en el botón dinámico de color naranja en la pare inferior y se muestre la opción de “Ver”</text:p>
          </table:table-cell>
          <table:table-cell table:style-name="ce6" office:value-type="string" calcext:value-type="string">
            <text:p>ok</text:p>
          </table:table-cell>
          <table:covered-table-cell/>
          <table:table-cell table:style-name="ce64"/>
          <table:table-cell table:style-name="ce17"/>
          <table:table-cell table:style-name="ce91" table:number-columns-repeated="21"/>
          <table:table-cell table:style-name="ce63" table:number-columns-repeated="16357"/>
        </table:table-row>
        <table:table-row table:style-name="ro20">
          <table:table-cell table:style-name="ce18" office:value-type="string" calcext:value-type="string">
            <text:p>CP02-41</text:p>
          </table:table-cell>
          <table:table-cell table:style-name="ce64" office:value-type="string" calcext:value-type="string">
            <text:p>Validar que al dar clic en la opción “Ver” se rediriga a la visualización del radicado</text:p>
          </table:table-cell>
          <table:table-cell table:style-name="ce6" office:value-type="string" calcext:value-type="string">
            <text:p>ok</text:p>
          </table:table-cell>
          <table:covered-table-cell/>
          <table:table-cell table:style-name="ce64"/>
          <table:table-cell table:style-name="ce17"/>
          <table:table-cell table:style-name="ce91" table:number-columns-repeated="21"/>
          <table:table-cell table:style-name="ce63" table:number-columns-repeated="16357"/>
        </table:table-row>
        <table:table-row table:style-name="ro7">
          <table:table-cell table:style-name="ce18" office:value-type="string" calcext:value-type="string">
            <text:p>CP02-42</text:p>
          </table:table-cell>
          <table:table-cell table:style-name="ce64" office:value-type="string" calcext:value-type="string">
            <text:p>Validar que si alguno de los radicados esta vencido se muestre de color rojo</text:p>
          </table:table-cell>
          <table:table-cell table:style-name="ce6" office:value-type="string" calcext:value-type="string">
            <text:p>ok</text:p>
          </table:table-cell>
          <table:table-cell table:style-name="ce8" office:value-type="string" calcext:value-type="string">
            <text:p>1. Se ingresa con el usuario jefe y se valida que en los radicados asignado hay radicados vencidos y los cuales se muestran de color rojo</text:p>
          </table:table-cell>
          <table:table-cell table:style-name="ce64"/>
          <table:table-cell table:style-name="ce17"/>
          <table:table-cell table:style-name="ce91" table:number-columns-repeated="21"/>
          <table:table-cell table:style-name="ce63" table:number-columns-repeated="16357"/>
        </table:table-row>
        <table:table-row table:style-name="ro7">
          <table:table-cell table:style-name="ce18" office:value-type="string" calcext:value-type="string">
            <text:p>CP02-43</text:p>
          </table:table-cell>
          <table:table-cell table:style-name="ce64" office:value-type="string" calcext:value-type="string">
            <text:p>Validar que si alguno de los radicados esta pronto a vencerse se muestre de color amarillo</text:p>
          </table:table-cell>
          <table:table-cell table:style-name="ce6" office:value-type="string" calcext:value-type="string">
            <text:p>ok</text:p>
          </table:table-cell>
          <table:table-cell table:style-name="ce8" office:value-type="string" calcext:value-type="string">
            <text:p>1. Se ingresa con el usuario jefe y se valida que en los radicados asignado hay radicados próximos a vencerse y los cuales se muestran de color amarillo</text:p>
          </table:table-cell>
          <table:table-cell table:style-name="ce64"/>
          <table:table-cell table:style-name="ce17"/>
          <table:table-cell table:style-name="ce91" table:number-columns-repeated="21"/>
          <table:table-cell table:style-name="ce63" table:number-columns-repeated="16357"/>
        </table:table-row>
        <table:table-row table:style-name="ro24">
          <table:table-cell table:style-name="ce18" office:value-type="string" calcext:value-type="string">
            <text:p>CP02-44</text:p>
          </table:table-cell>
          <table:table-cell table:style-name="ce64" office:value-type="string" calcext:value-type="string">
            <text:p>Ingresar al sistema con un usuario tipo de usuario “Administrador de Gestión Documental”</text:p>
          </table:table-cell>
          <table:table-cell table:style-name="ce6" office:value-type="string" calcext:value-type="string">
            <text:p>ok</text:p>
          </table:table-cell>
          <table:table-cell table:style-name="ce8" office:value-type="string" calcext:value-type="string">
            <text:p>1. Se ingresa con el usuario gestion.documental y en el tablero de inicio se muestra Préstamos abiertos por documento, Transferencias realizadas, Transferencias de gestión documental y Radicados creados hoy</text:p>
          </table:table-cell>
          <table:table-cell table:style-name="ce64"/>
          <table:table-cell table:style-name="ce17"/>
          <table:table-cell table:style-name="ce91" table:number-columns-repeated="21"/>
          <table:table-cell table:style-name="ce63" table:number-columns-repeated="16357"/>
        </table:table-row>
        <table:table-row table:style-name="ro7">
          <table:table-cell table:style-name="ce18" office:value-type="string" calcext:value-type="string">
            <text:p>CP02-45</text:p>
          </table:table-cell>
          <table:table-cell table:style-name="ce64" office:value-type="string" calcext:value-type="string">
            <text:p>Validar que se muestre tabla con el listado de los “Préstamos abiertos por documento ”</text:p>
          </table:table-cell>
          <table:table-cell table:style-name="ce6" office:value-type="string" calcext:value-type="string">
            <text:p>ok</text:p>
          </table:table-cell>
          <table:table-cell table:style-name="ce8" office:value-type="string" calcext:value-type="string">
            <text:p>1. Se ingresa con el usuario gestion.documental y en el tablero de inicio se muestra una tabla asociada a los Préstamos abiertos que se han solicitado a nivel de todo el sistema.</text:p>
          </table:table-cell>
          <table:table-cell table:style-name="ce64"/>
          <table:table-cell table:style-name="ce17"/>
          <table:table-cell table:style-name="ce91" table:number-columns-repeated="21"/>
          <table:table-cell table:style-name="ce63" table:number-columns-repeated="16357"/>
        </table:table-row>
        <table:table-row table:style-name="ro7">
          <table:table-cell table:style-name="ce58" office:value-type="string" calcext:value-type="string">
            <text:p>CP02-46</text:p>
          </table:table-cell>
          <table:table-cell table:style-name="ce64" office:value-type="string" calcext:value-type="string">
            <text:p>Validar que cuando se seleccione alguno de los registros mostrados y se de clic en el botón dinámico de color naranja en la pare inferior y se muestre la opción de “Ver”</text:p>
          </table:table-cell>
          <table:table-cell table:style-name="ce6" office:value-type="string" calcext:value-type="string">
            <text:p>ok</text:p>
          </table:table-cell>
          <table:table-cell table:style-name="ce16"/>
          <table:table-cell table:style-name="ce105" office:value-type="string" calcext:value-type="string">
            <text:p>Si trae los radicados pero, pero el boton dinamico no permite seleccionar los radicados de la tabla “ Préstamos abiertos por documento”</text:p>
          </table:table-cell>
          <table:table-cell table:style-name="ce17"/>
          <table:table-cell table:style-name="ce91" table:number-columns-repeated="21"/>
          <table:table-cell table:style-name="ce63" table:number-columns-repeated="16357"/>
        </table:table-row>
        <table:table-row table:style-name="ro7">
          <table:table-cell table:style-name="ce18" office:value-type="string" calcext:value-type="string">
            <text:p>CP02-47</text:p>
          </table:table-cell>
          <table:table-cell table:style-name="ce64" office:value-type="string" calcext:value-type="string">
            <text:p>Validar que si alguno de los radicados esta vencido se muestre de color rojo</text:p>
          </table:table-cell>
          <table:table-cell table:style-name="ce6" office:value-type="string" calcext:value-type="string">
            <text:p>ok</text:p>
          </table:table-cell>
          <table:table-cell table:style-name="ce8" office:value-type="string" calcext:value-type="string">
            <text:p>1. Se ingresa con el usuario jefe y se valida que en los radicados asignado hay radicados vencidos y los cuales se muestran de color rojo</text:p>
          </table:table-cell>
          <table:table-cell table:style-name="ce20"/>
          <table:table-cell table:style-name="ce17"/>
          <table:table-cell table:style-name="ce91" table:number-columns-repeated="21"/>
          <table:table-cell table:style-name="ce63" table:number-columns-repeated="16357"/>
        </table:table-row>
        <table:table-row table:style-name="ro7">
          <table:table-cell table:style-name="ce18" office:value-type="string" calcext:value-type="string">
            <text:p>CP02-48</text:p>
          </table:table-cell>
          <table:table-cell table:style-name="ce64" office:value-type="string" calcext:value-type="string">
            <text:p>Validar que si alguno de los radicados esta pronto a vencerse se muestre de color amarillo</text:p>
          </table:table-cell>
          <table:table-cell table:style-name="ce6" office:value-type="string" calcext:value-type="string">
            <text:p>ok</text:p>
          </table:table-cell>
          <table:table-cell table:style-name="ce8" office:value-type="string" calcext:value-type="string">
            <text:p>1. Se ingresa con el usuario jefe y se valida que en los radicados asignado hay radicados próximos a vencerse y los cuales se muestran de color amarillo</text:p>
          </table:table-cell>
          <table:table-cell table:style-name="ce20"/>
          <table:table-cell table:style-name="ce17"/>
          <table:table-cell table:style-name="ce91" table:number-columns-repeated="21"/>
          <table:table-cell table:style-name="ce63" table:number-columns-repeated="16357"/>
        </table:table-row>
        <table:table-row table:style-name="ro7">
          <table:table-cell table:style-name="ce18" office:value-type="string" calcext:value-type="string">
            <text:p>CP02-49</text:p>
          </table:table-cell>
          <table:table-cell table:style-name="ce64" office:value-type="string" calcext:value-type="string">
            <text:p>Validar que se muestre tabla con el listado de los “Transferencias realizadas ”</text:p>
          </table:table-cell>
          <table:table-cell table:style-name="ce6" office:value-type="string" calcext:value-type="string">
            <text:p>ok</text:p>
          </table:table-cell>
          <table:table-cell table:style-name="ce16"/>
          <table:table-cell table:style-name="ce105"/>
          <table:table-cell table:style-name="ce17"/>
          <table:table-cell table:style-name="ce91" table:number-columns-repeated="21"/>
          <table:table-cell table:style-name="ce63" table:number-columns-repeated="16357"/>
        </table:table-row>
        <table:table-row table:style-name="ro7">
          <table:table-cell table:style-name="ce58" office:value-type="string" calcext:value-type="string">
            <text:p>CP02-50</text:p>
          </table:table-cell>
          <table:table-cell table:style-name="ce64" office:value-type="string" calcext:value-type="string">
            <text:p>Validar que cuando se seleccione alguno de los registros mostrados y se de clic en el botón dinámico de color naranja en la pare inferior y se muestre la opción de “Ver”</text:p>
          </table:table-cell>
          <table:table-cell table:style-name="ce6" office:value-type="string" calcext:value-type="string">
            <text:p>ok</text:p>
          </table:table-cell>
          <table:table-cell table:style-name="ce16"/>
          <table:table-cell table:style-name="ce107" office:value-type="string" calcext:value-type="string">
            <text:p>Si trae los radicados pero, pero el boton dinamico no permite seleccionar los radicados de la tabla “Transferencias realizadas”</text:p>
          </table:table-cell>
          <table:table-cell table:style-name="ce17"/>
          <table:table-cell table:style-name="ce91" table:number-columns-repeated="21"/>
          <table:table-cell table:style-name="ce63" table:number-columns-repeated="16357"/>
        </table:table-row>
        <table:table-row table:style-name="ro7">
          <table:table-cell table:style-name="ce57" office:value-type="string" calcext:value-type="string">
            <text:p>CP02-51</text:p>
          </table:table-cell>
          <table:table-cell table:style-name="ce64" office:value-type="string" calcext:value-type="string">
            <text:p>Validar que si alguno de los radicados esta vencido se muestre de color rojo</text:p>
          </table:table-cell>
          <table:table-cell table:style-name="ce6" office:value-type="string" calcext:value-type="string">
            <text:p>ok</text:p>
          </table:table-cell>
          <table:table-cell table:style-name="ce16"/>
          <table:table-cell table:style-name="ce108" office:value-type="string" calcext:value-type="string">
            <text:p>No muestra la semaforización correcta</text:p>
          </table:table-cell>
          <table:table-cell table:style-name="ce17"/>
          <table:table-cell table:style-name="ce91" table:number-columns-repeated="21"/>
          <table:table-cell table:style-name="ce63" table:number-columns-repeated="16357"/>
        </table:table-row>
        <table:table-row table:style-name="ro7">
          <table:table-cell table:style-name="ce57" office:value-type="string" calcext:value-type="string">
            <text:p>CP02-52</text:p>
          </table:table-cell>
          <table:table-cell table:style-name="ce64" office:value-type="string" calcext:value-type="string">
            <text:p>Validar que si alguno de los radicados esta pronto a vencerse se muestre de color amarillo</text:p>
          </table:table-cell>
          <table:table-cell table:style-name="ce6" office:value-type="string" calcext:value-type="string">
            <text:p>ok</text:p>
          </table:table-cell>
          <table:table-cell table:style-name="ce16"/>
          <table:table-cell table:style-name="ce108" office:value-type="string" calcext:value-type="string">
            <text:p>No muestra la semaforización correcta</text:p>
          </table:table-cell>
          <table:table-cell table:style-name="ce17"/>
          <table:table-cell table:style-name="ce91" table:number-columns-repeated="21"/>
          <table:table-cell table:style-name="ce63" table:number-columns-repeated="16357"/>
        </table:table-row>
        <table:table-row table:style-name="ro7">
          <table:table-cell table:style-name="ce18" office:value-type="string" calcext:value-type="string">
            <text:p>CP02-53</text:p>
          </table:table-cell>
          <table:table-cell table:style-name="ce64" office:value-type="string" calcext:value-type="string">
            <text:p>Validar que se muestre tabla con el listado de los “Transferencias de gestión documental”</text:p>
          </table:table-cell>
          <table:table-cell table:style-name="ce6" office:value-type="string" calcext:value-type="string">
            <text:p>ok</text:p>
          </table:table-cell>
          <table:table-cell table:style-name="ce16"/>
          <table:table-cell table:style-name="ce64"/>
          <table:table-cell table:style-name="ce17"/>
          <table:table-cell table:style-name="ce91" table:number-columns-repeated="21"/>
          <table:table-cell table:style-name="ce63" table:number-columns-repeated="16357"/>
        </table:table-row>
        <table:table-row table:style-name="ro7">
          <table:table-cell table:style-name="ce58" office:value-type="string" calcext:value-type="string">
            <text:p>CP02-54</text:p>
          </table:table-cell>
          <table:table-cell table:style-name="ce64" office:value-type="string" calcext:value-type="string">
            <text:p>Validar que cuando se seleccione alguno de los registros mostrados y se de clic en el botón dinámico de color naranja en la pare inferior y se muestre la opción de “Ver”</text:p>
          </table:table-cell>
          <table:table-cell table:style-name="ce6" office:value-type="string" calcext:value-type="string">
            <text:p>ok</text:p>
          </table:table-cell>
          <table:table-cell table:style-name="ce16"/>
          <table:table-cell table:style-name="ce105" office:value-type="string" calcext:value-type="string">
            <text:p><text:span text:style-name="T4">Si trae los radicados pero, pero el boton dinamico no permite seleccionar los radicados de la tabla “</text:span><text:span text:style-name="T5">Transferencias de gestión documental</text:span>”</text:p>
          </table:table-cell>
          <table:table-cell table:style-name="ce17"/>
          <table:table-cell table:style-name="ce91" table:number-columns-repeated="21"/>
          <table:table-cell table:style-name="ce63" table:number-columns-repeated="16357"/>
        </table:table-row>
        <table:table-row table:style-name="ro7">
          <table:table-cell table:style-name="ce57" office:value-type="string" calcext:value-type="string">
            <text:p>CP02-55</text:p>
          </table:table-cell>
          <table:table-cell table:style-name="ce64" office:value-type="string" calcext:value-type="string">
            <text:p>Validar que si alguno de los radicados esta vencido se muestre de color rojo</text:p>
          </table:table-cell>
          <table:table-cell table:style-name="ce6" office:value-type="string" calcext:value-type="string">
            <text:p>ok</text:p>
          </table:table-cell>
          <table:table-cell table:style-name="ce16"/>
          <table:table-cell table:style-name="ce109" office:value-type="string" calcext:value-type="string">
            <text:p>No muestra la semaforización correcta</text:p>
          </table:table-cell>
          <table:table-cell table:style-name="ce17"/>
          <table:table-cell table:style-name="ce91" table:number-columns-repeated="21"/>
          <table:table-cell table:style-name="ce63" table:number-columns-repeated="16357"/>
        </table:table-row>
        <table:table-row table:style-name="ro7">
          <table:table-cell table:style-name="ce57" office:value-type="string" calcext:value-type="string">
            <text:p>CP02-56</text:p>
          </table:table-cell>
          <table:table-cell table:style-name="ce64" office:value-type="string" calcext:value-type="string">
            <text:p>Validar que si alguno de los radicados esta pronto a vencerse se muestre de color amarillo</text:p>
          </table:table-cell>
          <table:table-cell table:style-name="ce6" office:value-type="string" calcext:value-type="string">
            <text:p>ok</text:p>
          </table:table-cell>
          <table:table-cell table:style-name="ce16"/>
          <table:table-cell table:style-name="ce109" office:value-type="string" calcext:value-type="string">
            <text:p>No muestra la semaforización correcta</text:p>
          </table:table-cell>
          <table:table-cell table:style-name="ce17"/>
          <table:table-cell table:style-name="ce91" table:number-columns-repeated="21"/>
          <table:table-cell table:style-name="ce63" table:number-columns-repeated="16357"/>
        </table:table-row>
        <table:table-row table:style-name="ro7">
          <table:table-cell table:style-name="ce18" office:value-type="string" calcext:value-type="string">
            <text:p>CP02-57</text:p>
          </table:table-cell>
          <table:table-cell table:style-name="ce64" office:value-type="string" calcext:value-type="string">
            <text:p>Validar que se muestre tabla con el listado de los “Radicados creados hoy ”</text:p>
          </table:table-cell>
          <table:table-cell table:style-name="ce6" office:value-type="string" calcext:value-type="string">
            <text:p>ok</text:p>
          </table:table-cell>
          <table:table-cell table:style-name="ce16"/>
          <table:table-cell table:style-name="ce64"/>
          <table:table-cell table:style-name="ce17"/>
          <table:table-cell table:style-name="ce91" table:number-columns-repeated="21"/>
          <table:table-cell table:style-name="ce63" table:number-columns-repeated="16357"/>
        </table:table-row>
        <table:table-row table:style-name="ro7">
          <table:table-cell table:style-name="ce18" office:value-type="string" calcext:value-type="string">
            <text:p>CP02-58</text:p>
          </table:table-cell>
          <table:table-cell table:style-name="ce64" office:value-type="string" calcext:value-type="string">
            <text:p>Validar que cuando se seleccione alguno de los registros mostrados y se de clic en el botón dinámico de color naranja en la pare inferior y se muestre la opción de “Ver”</text:p>
          </table:table-cell>
          <table:table-cell table:style-name="ce6" office:value-type="string" calcext:value-type="string">
            <text:p>ok</text:p>
          </table:table-cell>
          <table:table-cell table:style-name="ce16"/>
          <table:table-cell table:style-name="ce64"/>
          <table:table-cell table:style-name="ce17"/>
          <table:table-cell table:style-name="ce91" table:number-columns-repeated="21"/>
          <table:table-cell table:style-name="ce63" table:number-columns-repeated="16357"/>
        </table:table-row>
        <table:table-row table:style-name="ro7">
          <table:table-cell table:style-name="ce18" office:value-type="string" calcext:value-type="string">
            <text:p>CP02-59</text:p>
          </table:table-cell>
          <table:table-cell table:style-name="ce64" office:value-type="string" calcext:value-type="string">
            <text:p>Validar que al dar clic en la opción “Ver” se rediriga a la visualización del radicado</text:p>
          </table:table-cell>
          <table:table-cell table:style-name="ce6" office:value-type="string" calcext:value-type="string">
            <text:p>ok</text:p>
          </table:table-cell>
          <table:table-cell table:style-name="ce16"/>
          <table:table-cell table:style-name="ce64"/>
          <table:table-cell table:style-name="ce17"/>
          <table:table-cell table:style-name="ce91" table:number-columns-repeated="21"/>
          <table:table-cell table:style-name="ce63" table:number-columns-repeated="16357"/>
        </table:table-row>
        <table:table-row table:style-name="ro7">
          <table:table-cell table:style-name="ce57" office:value-type="string" calcext:value-type="string">
            <text:p>CP02-60</text:p>
          </table:table-cell>
          <table:table-cell table:style-name="ce64" office:value-type="string" calcext:value-type="string">
            <text:p>Validar que si alguno de los radicados esta vencido se muestre de color rojo</text:p>
          </table:table-cell>
          <table:table-cell table:style-name="ce6" office:value-type="string" calcext:value-type="string">
            <text:p>ok</text:p>
          </table:table-cell>
          <table:table-cell table:style-name="ce16"/>
          <table:table-cell table:style-name="ce64" office:value-type="string" calcext:value-type="string">
            <text:p>No muestra la semaforización correcta</text:p>
          </table:table-cell>
          <table:table-cell table:style-name="ce17"/>
          <table:table-cell table:style-name="ce91" table:number-columns-repeated="21"/>
          <table:table-cell table:style-name="ce63" table:number-columns-repeated="16357"/>
        </table:table-row>
        <table:table-row table:style-name="ro7">
          <table:table-cell table:style-name="ce57" office:value-type="string" calcext:value-type="string">
            <text:p>CP02-61</text:p>
          </table:table-cell>
          <table:table-cell table:style-name="ce64" office:value-type="string" calcext:value-type="string">
            <text:p>Validar que si alguno de los radicados esta pronto a vencerse se muestre de color amarillo</text:p>
          </table:table-cell>
          <table:table-cell table:style-name="ce6" office:value-type="string" calcext:value-type="string">
            <text:p>ok</text:p>
          </table:table-cell>
          <table:table-cell table:style-name="ce16"/>
          <table:table-cell table:style-name="ce64" office:value-type="string" calcext:value-type="string">
            <text:p>No muestra la semaforización correcta</text:p>
          </table:table-cell>
          <table:table-cell table:style-name="ce17"/>
          <table:table-cell table:style-name="ce91" table:number-columns-repeated="21"/>
          <table:table-cell table:style-name="ce63" table:number-columns-repeated="16357"/>
        </table:table-row>
        <table:table-row table:style-name="ro7">
          <table:table-cell table:style-name="ce18" office:value-type="string" calcext:value-type="string">
            <text:p>CP02-62</text:p>
          </table:table-cell>
          <table:table-cell table:style-name="ce64" office:value-type="string" calcext:value-type="string">
            <text:p>Ingresar al sistema con un usuario tipo de usuario “Ventanilla Radicación”</text:p>
          </table:table-cell>
          <table:table-cell table:style-name="ce6" office:value-type="string" calcext:value-type="string">
            <text:p>ok</text:p>
          </table:table-cell>
          <table:table-cell table:style-name="ce16"/>
          <table:table-cell table:style-name="ce64"/>
          <table:table-cell table:style-name="ce17"/>
          <table:table-cell table:style-name="ce91" table:number-columns-repeated="21"/>
          <table:table-cell table:style-name="ce63" table:number-columns-repeated="16357"/>
        </table:table-row>
        <table:table-row table:style-name="ro7">
          <table:table-cell table:style-name="ce18" office:value-type="string" calcext:value-type="string">
            <text:p>CP02-63</text:p>
          </table:table-cell>
          <table:table-cell table:style-name="ce64" office:value-type="string" calcext:value-type="string">
            <text:p>Validar que se muestre tabla con el listado de los “Radicados devueltos ”</text:p>
          </table:table-cell>
          <table:table-cell table:style-name="ce6" office:value-type="string" calcext:value-type="string">
            <text:p>ok</text:p>
          </table:table-cell>
          <table:table-cell table:style-name="ce16"/>
          <table:table-cell table:style-name="ce64"/>
          <table:table-cell table:style-name="ce17"/>
          <table:table-cell table:style-name="ce91" table:number-columns-repeated="21"/>
          <table:table-cell table:style-name="ce63" table:number-columns-repeated="16357"/>
        </table:table-row>
        <table:table-row table:style-name="ro7">
          <table:table-cell table:style-name="ce18" office:value-type="string" calcext:value-type="string">
            <text:p>CP02-64</text:p>
          </table:table-cell>
          <table:table-cell table:style-name="ce64" office:value-type="string" calcext:value-type="string">
            <text:p>Validar que cuando se seleccione alguno de los registros mostrados y se de clic en el botón dinámico de color naranja en la pare inferior y se muestre la opción de “Ver”</text:p>
          </table:table-cell>
          <table:table-cell table:style-name="ce6" office:value-type="string" calcext:value-type="string">
            <text:p>ok</text:p>
          </table:table-cell>
          <table:table-cell table:style-name="ce16"/>
          <table:table-cell table:style-name="ce64"/>
          <table:table-cell table:style-name="ce17"/>
          <table:table-cell table:style-name="ce91" table:number-columns-repeated="21"/>
          <table:table-cell table:style-name="ce63" table:number-columns-repeated="16357"/>
        </table:table-row>
        <table:table-row table:style-name="ro7">
          <table:table-cell table:style-name="ce18" office:value-type="string" calcext:value-type="string">
            <text:p>CP02-65</text:p>
          </table:table-cell>
          <table:table-cell table:style-name="ce64" office:value-type="string" calcext:value-type="string">
            <text:p>Validar que al dar clic en la opción “Ver” se rediriga a la visualización del radicado</text:p>
          </table:table-cell>
          <table:table-cell table:style-name="ce6" office:value-type="string" calcext:value-type="string">
            <text:p>ok</text:p>
          </table:table-cell>
          <table:table-cell table:style-name="ce16"/>
          <table:table-cell table:style-name="ce64"/>
          <table:table-cell table:style-name="ce17"/>
          <table:table-cell table:style-name="ce91" table:number-columns-repeated="21"/>
          <table:table-cell table:style-name="ce63" table:number-columns-repeated="16357"/>
        </table:table-row>
        <table:table-row table:style-name="ro7">
          <table:table-cell table:style-name="ce57" office:value-type="string" calcext:value-type="string">
            <text:p>CP02-66</text:p>
          </table:table-cell>
          <table:table-cell table:style-name="ce64" office:value-type="string" calcext:value-type="string">
            <text:p>Validar que si alguno de los radicados esta vencido se muestre de color rojo</text:p>
          </table:table-cell>
          <table:table-cell table:style-name="ce6" office:value-type="string" calcext:value-type="string">
            <text:p>ok</text:p>
          </table:table-cell>
          <table:table-cell table:style-name="ce16"/>
          <table:table-cell table:style-name="ce64" office:value-type="string" calcext:value-type="string">
            <text:p>No muestra la semaforización correcta</text:p>
          </table:table-cell>
          <table:table-cell table:style-name="ce17"/>
          <table:table-cell table:style-name="ce91" table:number-columns-repeated="21"/>
          <table:table-cell table:style-name="ce63" table:number-columns-repeated="16357"/>
        </table:table-row>
        <table:table-row table:style-name="ro7">
          <table:table-cell table:style-name="ce57" office:value-type="string" calcext:value-type="string">
            <text:p>CP02-67</text:p>
          </table:table-cell>
          <table:table-cell table:style-name="ce64" office:value-type="string" calcext:value-type="string">
            <text:p>Validar que si alguno de los radicados esta pronto a vencerse se muestre de color amarillo</text:p>
          </table:table-cell>
          <table:table-cell table:style-name="ce6" office:value-type="string" calcext:value-type="string">
            <text:p>ok</text:p>
          </table:table-cell>
          <table:table-cell table:style-name="ce16"/>
          <table:table-cell table:style-name="ce64" office:value-type="string" calcext:value-type="string">
            <text:p>No muestra la semaforización correcta</text:p>
          </table:table-cell>
          <table:table-cell table:style-name="ce17"/>
          <table:table-cell table:style-name="ce91" table:number-columns-repeated="21"/>
          <table:table-cell table:style-name="ce63" table:number-columns-repeated="16357"/>
        </table:table-row>
        <table:table-row table:style-name="ro7">
          <table:table-cell table:style-name="ce18" office:value-type="string" calcext:value-type="string">
            <text:p>CP02-68</text:p>
          </table:table-cell>
          <table:table-cell table:style-name="ce64" office:value-type="string" calcext:value-type="string">
            <text:p>Validar que se muestre tabla con el listado de los “Radicados Informados”</text:p>
          </table:table-cell>
          <table:table-cell table:style-name="ce6" office:value-type="string" calcext:value-type="string">
            <text:p>ok</text:p>
          </table:table-cell>
          <table:table-cell table:style-name="ce16"/>
          <table:table-cell table:style-name="ce64"/>
          <table:table-cell table:style-name="ce17"/>
          <table:table-cell table:style-name="ce91" table:number-columns-repeated="21"/>
          <table:table-cell table:style-name="ce63" table:number-columns-repeated="16357"/>
        </table:table-row>
        <table:table-row table:style-name="ro7">
          <table:table-cell table:style-name="ce18" office:value-type="string" calcext:value-type="string">
            <text:p>CP02-69</text:p>
          </table:table-cell>
          <table:table-cell table:style-name="ce64" office:value-type="string" calcext:value-type="string">
            <text:p>Validar que cuando se seleccione alguno de los registros mostrados y se de clic en el botón dinámico de color naranja en la pare inferior y se muestre la opción de “Ver”</text:p>
          </table:table-cell>
          <table:table-cell table:style-name="ce6" office:value-type="string" calcext:value-type="string">
            <text:p>ok</text:p>
          </table:table-cell>
          <table:table-cell table:style-name="ce16"/>
          <table:table-cell table:style-name="ce64"/>
          <table:table-cell table:style-name="ce17"/>
          <table:table-cell table:style-name="ce91" table:number-columns-repeated="21"/>
          <table:table-cell table:style-name="ce63" table:number-columns-repeated="16357"/>
        </table:table-row>
        <table:table-row table:style-name="ro7">
          <table:table-cell table:style-name="ce18" office:value-type="string" calcext:value-type="string">
            <text:p>CP02-70</text:p>
          </table:table-cell>
          <table:table-cell table:style-name="ce64" office:value-type="string" calcext:value-type="string">
            <text:p>Validar que al dar clic en la opción “Ver” se rediriga a la visualización del radicado</text:p>
          </table:table-cell>
          <table:table-cell table:style-name="ce6" office:value-type="string" calcext:value-type="string">
            <text:p>ok</text:p>
          </table:table-cell>
          <table:table-cell table:style-name="ce16"/>
          <table:table-cell table:style-name="ce64"/>
          <table:table-cell table:style-name="ce17"/>
          <table:table-cell table:style-name="ce91" table:number-columns-repeated="21"/>
          <table:table-cell table:style-name="ce63" table:number-columns-repeated="16357"/>
        </table:table-row>
        <table:table-row table:style-name="ro7">
          <table:table-cell table:style-name="ce57" office:value-type="string" calcext:value-type="string">
            <text:p>CP02-71</text:p>
          </table:table-cell>
          <table:table-cell table:style-name="ce64" office:value-type="string" calcext:value-type="string">
            <text:p>Validar que si alguno de los radicados esta vencido se muestre de color rojo</text:p>
          </table:table-cell>
          <table:table-cell table:style-name="ce6" office:value-type="string" calcext:value-type="string">
            <text:p>ok</text:p>
          </table:table-cell>
          <table:table-cell table:style-name="ce16"/>
          <table:table-cell table:style-name="ce64" office:value-type="string" calcext:value-type="string">
            <text:p>No muestra la semaforización correcta</text:p>
          </table:table-cell>
          <table:table-cell table:style-name="ce17"/>
          <table:table-cell table:style-name="ce91" table:number-columns-repeated="21"/>
          <table:table-cell table:style-name="ce63" table:number-columns-repeated="16357"/>
        </table:table-row>
        <table:table-row table:style-name="ro7">
          <table:table-cell table:style-name="ce57" office:value-type="string" calcext:value-type="string">
            <text:p>CP02-72</text:p>
          </table:table-cell>
          <table:table-cell table:style-name="ce64" office:value-type="string" calcext:value-type="string">
            <text:p>Validar que si alguno de los radicados esta pronto a vencerse se muestre de color amarillo</text:p>
          </table:table-cell>
          <table:table-cell table:style-name="ce6" office:value-type="string" calcext:value-type="string">
            <text:p>ok</text:p>
          </table:table-cell>
          <table:table-cell table:style-name="ce16"/>
          <table:table-cell table:style-name="ce64" office:value-type="string" calcext:value-type="string">
            <text:p>No muestra la semaforización correcta</text:p>
          </table:table-cell>
          <table:table-cell table:style-name="ce17"/>
          <table:table-cell table:style-name="ce91" table:number-columns-repeated="21"/>
          <table:table-cell table:style-name="ce63" table:number-columns-repeated="16357"/>
        </table:table-row>
        <table:table-row table:style-name="ro7">
          <table:table-cell table:style-name="ce18" office:value-type="string" calcext:value-type="string">
            <text:p>CP02-73</text:p>
          </table:table-cell>
          <table:table-cell table:style-name="ce64" office:value-type="string" calcext:value-type="string">
            <text:p>Validar que se muestre tabla con el listado de los “Radicados creados hoy ”</text:p>
          </table:table-cell>
          <table:table-cell table:style-name="ce6" office:value-type="string" calcext:value-type="string">
            <text:p>ok</text:p>
          </table:table-cell>
          <table:table-cell table:style-name="ce16"/>
          <table:table-cell table:style-name="ce64"/>
          <table:table-cell table:style-name="ce17"/>
          <table:table-cell table:style-name="ce91" table:number-columns-repeated="21"/>
          <table:table-cell table:style-name="ce63" table:number-columns-repeated="16357"/>
        </table:table-row>
        <table:table-row table:style-name="ro7">
          <table:table-cell table:style-name="ce18" office:value-type="string" calcext:value-type="string">
            <text:p>CP02-74</text:p>
          </table:table-cell>
          <table:table-cell table:style-name="ce64" office:value-type="string" calcext:value-type="string">
            <text:p>Validar que cuando se seleccione alguno de los registros mostrados y se de clic en el botón dinámico de color naranja en la parte inferior y se muestre la opción de “Ver”</text:p>
          </table:table-cell>
          <table:table-cell table:style-name="ce6" office:value-type="string" calcext:value-type="string">
            <text:p>ok</text:p>
          </table:table-cell>
          <table:table-cell table:style-name="ce16"/>
          <table:table-cell table:style-name="ce64"/>
          <table:table-cell table:style-name="ce17"/>
          <table:table-cell table:style-name="ce91" table:number-columns-repeated="21"/>
          <table:table-cell table:style-name="ce63" table:number-columns-repeated="16357"/>
        </table:table-row>
        <table:table-row table:style-name="ro7">
          <table:table-cell table:style-name="ce18" office:value-type="string" calcext:value-type="string">
            <text:p>CP02-75</text:p>
          </table:table-cell>
          <table:table-cell table:style-name="ce64" office:value-type="string" calcext:value-type="string">
            <text:p>Validar que al dar clic en la opción “Ver” se rediriga a la visualización del radicado</text:p>
          </table:table-cell>
          <table:table-cell table:style-name="ce6" office:value-type="string" calcext:value-type="string">
            <text:p>ok</text:p>
          </table:table-cell>
          <table:table-cell table:style-name="ce16"/>
          <table:table-cell table:style-name="ce64"/>
          <table:table-cell table:style-name="ce17"/>
          <table:table-cell table:style-name="ce91" table:number-columns-repeated="21"/>
          <table:table-cell table:style-name="ce63" table:number-columns-repeated="16357"/>
        </table:table-row>
        <table:table-row table:style-name="ro7">
          <table:table-cell table:style-name="ce57" office:value-type="string" calcext:value-type="string">
            <text:p>CP02-76</text:p>
          </table:table-cell>
          <table:table-cell table:style-name="ce64" office:value-type="string" calcext:value-type="string">
            <text:p>Validar que si alguno de los radicados esta vencido se muestre de color rojo</text:p>
          </table:table-cell>
          <table:table-cell table:style-name="ce6" office:value-type="string" calcext:value-type="string">
            <text:p>ok</text:p>
          </table:table-cell>
          <table:table-cell table:style-name="ce16"/>
          <table:table-cell table:style-name="ce64" office:value-type="string" calcext:value-type="string">
            <text:p>No muestra la semaforización correcta</text:p>
          </table:table-cell>
          <table:table-cell table:style-name="ce17"/>
          <table:table-cell table:style-name="ce91" table:number-columns-repeated="21"/>
          <table:table-cell table:style-name="ce63" table:number-columns-repeated="16357"/>
        </table:table-row>
        <table:table-row table:style-name="ro7">
          <table:table-cell table:style-name="ce57" office:value-type="string" calcext:value-type="string">
            <text:p>CP02-77</text:p>
          </table:table-cell>
          <table:table-cell table:style-name="ce64" office:value-type="string" calcext:value-type="string">
            <text:p>Validar que si alguno de los radicados esta pronto a vencerse se muestre de color amarillo</text:p>
          </table:table-cell>
          <table:table-cell table:style-name="ce6" office:value-type="string" calcext:value-type="string">
            <text:p>ok</text:p>
          </table:table-cell>
          <table:table-cell table:style-name="ce16"/>
          <table:table-cell table:style-name="ce64" office:value-type="string" calcext:value-type="string">
            <text:p>No muestra la semaforización correcta</text:p>
          </table:table-cell>
          <table:table-cell table:style-name="ce17"/>
          <table:table-cell table:style-name="ce91" table:number-columns-repeated="21"/>
          <table:table-cell table:style-name="ce63" table:number-columns-repeated="16357"/>
        </table:table-row>
        <table:table-row table:style-name="ro1">
          <table:table-cell table:style-name="ce49" office:value-type="string" calcext:value-type="string" table:number-columns-spanned="2" table:number-rows-spanned="1">
            <text:p>CP03 – Gestión de Usuarios – Administrar Usuarios</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21"/>
          <table:table-cell table:style-name="ce63" table:number-columns-repeated="16357"/>
        </table:table-row>
        <table:table-row table:style-name="ro7">
          <table:table-cell table:style-name="ce22" office:value-type="string" calcext:value-type="string">
            <text:p>CP03-01</text:p>
          </table:table-cell>
          <table:table-cell table:style-name="ce8" office:value-type="string" calcext:value-type="string">
            <text:p>Validar que se muestre una tabla con el listado de todos los usuarios existentes en el sistema</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3-02</text:p>
          </table:table-cell>
          <table:table-cell table:style-name="ce8" office:value-type="string" calcext:value-type="string">
            <text:p>Validar que se muestre un botón de filtros en la parte superior, botón dinámico de color naranja en la pare inferior y botones para descargar la información</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3-03</text:p>
          </table:table-cell>
          <table:table-cell table:style-name="ce21" office:value-type="string" calcext:value-type="string">
            <text:p>Validar que cuando se seleccione un registro en el botón dinámico de color naranja, se muestren las opciones de “Editar”, “Ver”, “Cambiar Estado” y “Crea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3-04</text:p>
          </table:table-cell>
          <table:table-cell table:style-name="ce64" office:value-type="string" calcext:value-type="string">
            <text:p>Validar que cuando no se ha seleccionado ningun registro y se de clic en el botón naranja, se muestren las opciones “Agregar” y “Proceso Masiv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3-05</text:p>
          </table:table-cell>
          <table:table-cell table:style-name="ce64" office:value-type="string" calcext:value-type="string">
            <text:p>Validar que al dar clic en la opción “proceso Masivo” se muestre campo para cargar archiv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3-06</text:p>
          </table:table-cell>
          <table:table-cell table:style-name="ce64" office:value-type="string" calcext:value-type="string">
            <text:p>Validar que al dar clic en la opción “proceso Masivo” se muestre botón de Descargar Format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59" office:value-type="string" calcext:value-type="string">
            <text:p>CP03-07</text:p>
          </table:table-cell>
          <table:table-cell table:style-name="ce64" office:value-type="string" calcext:value-type="string">
            <text:p>Validar que cuando se descargue el formato de usuarios, este se descargue con las columnas "Nombre dependencia","Nombre de Usuario","Apellido de Usuario","Tipo identificación","Documento identidad","Cargo","Correo electrónico institucional","Tipo de usuario","Perfil","Usuario de autenticación","Autenticación por LDAP"</text:p>
          </table:table-cell>
          <table:table-cell table:style-name="ce6" office:value-type="string" calcext:value-type="string">
            <text:p>ok</text:p>
          </table:table-cell>
          <table:table-cell table:style-name="ce16"/>
          <table:table-cell table:style-name="ce64" office:value-type="string" calcext:value-type="string">
            <text:p>Si se descarga el formato de usurios, pero Selenium IDE no puede validar el contenido interno de un archivo Excel descargado.</text:p>
          </table:table-cell>
          <table:table-cell table:style-name="ce4"/>
          <table:table-cell table:number-columns-repeated="21"/>
          <table:table-cell table:style-name="ce63" table:number-columns-repeated="16357"/>
        </table:table-row>
        <table:table-row table:style-name="ro25">
          <table:table-cell table:style-name="ce59" office:value-type="string" calcext:value-type="string">
            <text:p>CP03-08</text:p>
          </table:table-cell>
          <table:table-cell table:style-name="ce64" office:value-type="string" calcext:value-type="string">
            <text:p>Validar que cuando se cargue el archivo, si hay alguna columna que es obligatoria y se encuentra vacia, se debe mostrar un mensaje de error que indique la fila y el campo donde se encuentra el error adicional de mostrar el nombre de la columna. Ej: “Fila 2 error en columna (Documento Usuario), no puede ser vacía,Fila 2 error en columna (Correo Electrónico), no puede ser vacía,Fila 2 error en columna (Autenticación Externa), el valor ingresado: , no es válido”</text:p>
          </table:table-cell>
          <table:table-cell table:style-name="ce6" office:value-type="string" calcext:value-type="string">
            <text:p>ok</text:p>
          </table:table-cell>
          <table:table-cell table:style-name="ce16"/>
          <table:table-cell table:style-name="ce64" office:value-type="string" calcext:value-type="string">
            <text:p>Ya se hizo la prueba, pero el cargue de archivos solo es compatible con Chrome, pero si muestra el mensaje de error.</text:p>
          </table:table-cell>
          <table:table-cell table:style-name="ce4"/>
          <table:table-cell table:number-columns-repeated="21"/>
          <table:table-cell table:style-name="ce63" table:number-columns-repeated="16357"/>
        </table:table-row>
        <table:table-row table:style-name="ro7">
          <table:table-cell table:style-name="ce23" office:value-type="string" calcext:value-type="string">
            <text:p>CP03-09</text:p>
          </table:table-cell>
          <table:table-cell table:style-name="ce64" office:value-type="string" calcext:value-type="string">
            <text:p>Validar que cuando se cargue el archivo y todo este correcto se muestre mensaje de confirmación</text:p>
          </table:table-cell>
          <table:table-cell table:style-name="ce6" office:value-type="string" calcext:value-type="string">
            <text:p>ok</text:p>
          </table:table-cell>
          <table:table-cell table:style-name="ce16"/>
          <table:table-cell table:style-name="ce64" office:value-type="string" calcext:value-type="string">
            <text:p>Ya se hizo la prueba, pero el cargue de archivos solo es compatible con Chrome.</text:p>
          </table:table-cell>
          <table:table-cell table:style-name="ce4"/>
          <table:table-cell table:number-columns-repeated="21"/>
          <table:table-cell table:style-name="ce63" table:number-columns-repeated="16357"/>
        </table:table-row>
        <table:table-row table:style-name="ro7">
          <table:table-cell table:style-name="ce22" office:value-type="string" calcext:value-type="string">
            <text:p>CP03-10</text:p>
          </table:table-cell>
          <table:table-cell table:style-name="ce64" office:value-type="string" calcext:value-type="string">
            <text:p>Validar que cuando se seleccione un usuario y se de clic en la opción “Crear” se despliegue el formulario solicitando los datos del usuario a crear en el sistema</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3-11</text:p>
          </table:table-cell>
          <table:table-cell table:style-name="ce64" office:value-type="string" calcext:value-type="string">
            <text:p>Validar que en el formulario se muestre un campo de Tipo de usuario, el cual debe ser una lista desplegable con las opciones “Administrador de Gestión Documental”, “Administrador del sistema”, “Usuario Funcional”, “Usuario Jefe” y “Ventanilla de Radicación”</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3-12</text:p>
          </table:table-cell>
          <table:table-cell table:style-name="ce64" office:value-type="string" calcext:value-type="string">
            <text:p>Validar que en el formulario se muestre un campo de <text:s/>Perfil, el cuales debe ser una lista desplegable con las opciones por defecto “Administrador de Gestión Documental”, “Administrador del sistema”, “Usuario Funcional”, “Usuario Jefe” y “Ventanilla de Radicación”</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3-13</text:p>
          </table:table-cell>
          <table:table-cell table:style-name="ce64" office:value-type="string" calcext:value-type="string">
            <text:p>Validar que todos los campos que tienen * en el formulario sean obligatorios y no se puedan dejar vacios y el sistema mostrar los mensajes en color rojo a cada campo del formulari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3-14</text:p>
          </table:table-cell>
          <table:table-cell table:style-name="ce64" office:value-type="string" calcext:value-type="string">
            <text:p>Validar que cuando se ingrese la información de un usuario, si el <text:s/>“Correo Electrónico” o “Nombre de Usuario” ya existen, el sistema debara mostrar un mensaje “El usuario ya existe”</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3-15</text:p>
          </table:table-cell>
          <table:table-cell table:style-name="ce64" office:value-type="string" calcext:value-type="string">
            <text:p>Validar que cuando se seleccione un usuario y se de clic en la opción “Editar” se despliegue el formulario de registro de usuario ya con la información diligenciada, es decir debe mostrar la información del usuario que se habia seleccionad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3-16</text:p>
          </table:table-cell>
          <table:table-cell table:style-name="ce64" office:value-type="string" calcext:value-type="string">
            <text:p>Validar que cuando se modifique la información del usuario y se proceda a dar clic en el botón de guardar, el sistema muestre mensaje de confirmación indicando “Registro actualizado correctamente”</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3-17</text:p>
          </table:table-cell>
          <table:table-cell table:style-name="ce64" office:value-type="string" calcext:value-type="string">
            <text:p>Validar que cuando se seleccione un usuario y se de clic en la opción “Cambiar estado”, el sistema muestre un mensaje de confirmación indicando que se cambio el estado de forma correcta; este proceso debe poner inactivo el usuario en caso de estar activo, y en caso de estar inactivo debera activar el estado del usuari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3" office:value-type="string" calcext:value-type="string">
            <text:p>CP03-18</text:p>
          </table:table-cell>
          <table:table-cell table:style-name="ce64" office:value-type="string" calcext:value-type="string">
            <text:p>Validar que cuando se intente desactivar un usuario que tenga radicados asignados, el sistema no permita hacer el proceso, adicional de mostrar el mensaje “No se puede inactivar el usuario porque tiene radicados asignados”</text:p>
          </table:table-cell>
          <table:table-cell table:style-name="ce6" office:value-type="string" calcext:value-type="string">
            <text:p>ok</text:p>
          </table:table-cell>
          <table:table-cell table:style-name="ce16"/>
          <table:table-cell table:style-name="ce64" office:value-type="string" calcext:value-type="string">
            <text:p>Se cambia el mensaje a mostrar segun lo establecido en el modulo</text:p>
          </table:table-cell>
          <table:table-cell table:style-name="ce4"/>
          <table:table-cell table:number-columns-repeated="21"/>
          <table:table-cell table:style-name="ce63" table:number-columns-repeated="16357"/>
        </table:table-row>
        <table:table-row table:style-name="ro7">
          <table:table-cell table:style-name="ce23" office:value-type="string" calcext:value-type="string">
            <text:p>CP03-19</text:p>
          </table:table-cell>
          <table:table-cell table:style-name="ce64" office:value-type="string" calcext:value-type="string">
            <text:p>Validar que cuando se intente desactivar un usuario que esta configurado como encargado de las pqrs se muestre mensaje indicando “Si desea inactivar el usuario, debe cambiar el correo electrónico de administrador de PQRSD en la configuración general.” y no dejar que se inactive</text:p>
          </table:table-cell>
          <table:table-cell table:style-name="ce6" office:value-type="string" calcext:value-type="string">
            <text:p>ok</text:p>
          </table:table-cell>
          <table:table-cell table:style-name="ce16"/>
          <table:table-cell table:style-name="ce64" office:value-type="string" calcext:value-type="string">
            <text:p>Se cambia el mensaje a mostrar segun lo establecido en el modulo</text:p>
          </table:table-cell>
          <table:table-cell table:style-name="ce4"/>
          <table:table-cell table:number-columns-repeated="21"/>
          <table:table-cell table:style-name="ce63" table:number-columns-repeated="16357"/>
        </table:table-row>
        <table:table-row table:style-name="ro7">
          <table:table-cell table:style-name="ce22" office:value-type="string" calcext:value-type="string">
            <text:p>CP03-20</text:p>
          </table:table-cell>
          <table:table-cell table:style-name="ce64" office:value-type="string" calcext:value-type="string">
            <text:p>Validar que cuando se seleccione un usuario y se de clic en la opción “Ver” se despliegue el formulario mostrando toda la información del usuario y en el botón dinámico de color naranja en la parte inferior de la pantalla la opción de Edita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3-21</text:p>
          </table:table-cell>
          <table:table-cell table:style-name="ce64" office:value-type="string" calcext:value-type="string">
            <text:p>Validar que en el listado inicial que se muestra cuando se ingresa al módulo de Gestión de Usuarios – Administrar Usuario, se muestre un botón de “FILTROS” en la parte superior de la tabla</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3-22</text:p>
          </table:table-cell>
          <table:table-cell table:style-name="ce64" office:value-type="string" calcext:value-type="string">
            <text:p>Validar que cuando se de clic en el botón “Filtros” se despliegue una ventana nueva, mostrando los campos de “Documento”, “Nombres”, “Apellidos”, “Cargo”, “Tipo usuario”, “Rol”, “Correo”, “Dependencia”, “Autenticación por LDAP”, “Estado” y por rango de fechas</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3-23</text:p>
          </table:table-cell>
          <table:table-cell table:style-name="ce64"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6" office:value-type="string" calcext:value-type="string">
            <text:p>ok</text:p>
          </table:table-cell>
          <table:table-cell table:style-name="ce16"/>
          <table:table-cell table:style-name="ce64" office:value-type="string" calcext:value-type="string">
            <text:p>se asigna estado pendiente validar en el filtro de busqueda</text:p>
          </table:table-cell>
          <table:table-cell table:style-name="ce4"/>
          <table:table-cell table:number-columns-repeated="21"/>
          <table:table-cell table:style-name="ce63" table:number-columns-repeated="16357"/>
        </table:table-row>
        <table:table-row table:style-name="ro7">
          <table:table-cell table:style-name="ce22" office:value-type="string" calcext:value-type="string">
            <text:p>CP03-24</text:p>
          </table:table-cell>
          <table:table-cell table:style-name="ce64" office:value-type="string" calcext:value-type="string">
            <text:p>Validar que en el listado inicial que se muestra cuando se ingresa al módulo de Gestión de Usuarios – Administrar Usuario, se muestre en la parte inferior los botones de “CSV”, “EXCEL”, “PDF”, “IMPRIMIR”, y cuando se de clic en cualquiera de estas opciones se descargue el archivo correspondiente</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1">
          <table:table-cell table:style-name="ce49" office:value-type="string" calcext:value-type="string" table:number-columns-spanned="2" table:number-rows-spanned="1">
            <text:p>CP04 – Gestión de Usuarios – Administrar perfiles</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21"/>
          <table:table-cell table:style-name="ce63" table:number-columns-repeated="16357"/>
        </table:table-row>
        <table:table-row table:style-name="ro7">
          <table:table-cell table:style-name="ce22" office:value-type="string" calcext:value-type="string">
            <text:p>CP04-01</text:p>
          </table:table-cell>
          <table:table-cell table:style-name="ce8" office:value-type="string" calcext:value-type="string">
            <text:p>Validar que se muestre una tabla con el listado de todos los perfiles existentes en el sistema</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4-02</text:p>
          </table:table-cell>
          <table:table-cell table:style-name="ce8" office:value-type="string" calcext:value-type="string">
            <text:p>Validar que se muestre un botón de filtros en la parte superior, botón dinámico de color naranja en la pare inferior y botones para descargar la información</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4-03</text:p>
          </table:table-cell>
          <table:table-cell table:style-name="ce21" office:value-type="string" calcext:value-type="string">
            <text:p>Validar que cuando se seleccione un registro en el botón dinámico de color naranja, se muestren las opciones de “Editar”, “Ver”, “Cambiar Estado”, “Crear”, “Asignación Tipos de radicados” y “Asignación Tipos documentales”</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4-04</text:p>
          </table:table-cell>
          <table:table-cell table:style-name="ce64" office:value-type="string" calcext:value-type="string">
            <text:p>Validar que cuando se de clic en la opción “Agregar” se despliegue el formulario de registro de perfil, este formulario debe mostrar un campo de texto que se llame “Nombre del Perfil”, una lista desplegable que muestre los niveles de consulta y adicional debe mostrar por cada módulo los diferentes permisos que se pueden asignar al perfil</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4-05</text:p>
          </table:table-cell>
          <table:table-cell table:style-name="ce64" office:value-type="string" calcext:value-type="string">
            <text:p>Validar que cuando se haga clic en el botón de guradar se muestre un mensaje de confirmación indicando que se ingreso de forma correcta</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4-06</text:p>
          </table:table-cell>
          <table:table-cell table:style-name="ce64" office:value-type="string" calcext:value-type="string">
            <text:p>Validar que en el listado de nivel de búsqueda se muestren 3 opciones “Avanzado”, “Intermedio” y “Basic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4-07</text:p>
          </table:table-cell>
          <table:table-cell table:style-name="ce64" office:value-type="string" calcext:value-type="string">
            <text:p>Validar que cuando se de clic en el check que se encuentra al lado del nombre del modulo se seleccionen de forma automatica todas las opciones o que se pueda seleccionar solo una de las opciones disponibles</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4-08</text:p>
          </table:table-cell>
          <table:table-cell table:style-name="ce64" office:value-type="string" calcext:value-type="string">
            <text:p>Validar que cuando se seleccione un perfil y se de clic en la opción “Editar” se despliegue el formulario de registro del perfil ya con la información diligenciada, es decir debe mostrar la información del perfil que se habia seleccionado y chequeados los permisos que se habian asignad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4-09</text:p>
          </table:table-cell>
          <table:table-cell table:style-name="ce64" office:value-type="string" calcext:value-type="string">
            <text:p>Validar que cuando se haga clic en el botón de guardar se muestre un mensaje de confirmación indicando que se actualizo la información de forma correcta</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4-10</text:p>
          </table:table-cell>
          <table:table-cell table:style-name="ce64" office:value-type="string" calcext:value-type="string">
            <text:p>Validar que al dar clic en la opción “Cambiar estado” permita inactivar el perfil en caso de estar activo o de lo contrario activar en caso de encontrarse inactiv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4-11</text:p>
          </table:table-cell>
          <table:table-cell table:style-name="ce64" office:value-type="string" calcext:value-type="string">
            <text:p>Validar que al dar clic en la opción “Ver”, se muestre una ventana con el detalle del perfil que se esta consultando, adicional de ver los pernisos que se encuentren activos y asignados al perfil</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4-12</text:p>
          </table:table-cell>
          <table:table-cell table:style-name="ce64" office:value-type="string" calcext:value-type="string">
            <text:p>Validar que al dar clic en la opción “Asignación tipos de radicado” se muestre un formulario donde se muestre el listado de todos los tipos de radicado, al cual se le puede seleccionar todas las opciones o solo alguno en especific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4-13</text:p>
          </table:table-cell>
          <table:table-cell table:style-name="ce64" office:value-type="string" calcext:value-type="string">
            <text:p>Validar que en el listado de tipos de radicados se muestren por defecto “Salida”, “Entrada”, “Comunicaciones Internas” y “Pqrs”</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4-14</text:p>
          </table:table-cell>
          <table:table-cell table:style-name="ce64" office:value-type="string" calcext:value-type="string">
            <text:p>Validar que al tratar de guardar los permisos sin haber seleccionado ninguna opción, el sistema muestre un mensaje de error “El perfil debe tener al menos un acceso habilitad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4-15</text:p>
          </table:table-cell>
          <table:table-cell table:style-name="ce64" office:value-type="string" calcext:value-type="string">
            <text:p>Validar que cuando se guarde los permisos, el sistema muestre un mensaje de confirmación “Registro actualizado correctamente”</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4-16</text:p>
          </table:table-cell>
          <table:table-cell table:style-name="ce64" office:value-type="string" calcext:value-type="string">
            <text:p>Validar que cuando se de clic en el botón “FILTROS” se despliegue una ventana nueva donde se muestren los campos “Nombre del Perfil” y “Fecha de Creación, adicional de mostrar una lista desplegable indicando la cantidad de registros a mostra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4-17</text:p>
          </table:table-cell>
          <table:table-cell table:style-name="ce64"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4-18</text:p>
          </table:table-cell>
          <table:table-cell table:style-name="ce64" office:value-type="string" calcext:value-type="string">
            <text:p>Validar que al dar clic en la opción “Asignación tipos documentales” se muestre un formulario donde se muestre el listado de todos los tipos documentales al cual se le puede seleccionar todas las opciones o solo alguno en especific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4-19</text:p>
          </table:table-cell>
          <table:table-cell table:style-name="ce64" office:value-type="string" calcext:value-type="string">
            <text:p>Validar que en el listado de tipos documentales se muestren por defecto actas “anexos”, “comunicaciones oficiales”, “denuncia”, “felicitación”, “paz y salvo”, “petición de consulta”, “petición de documentos”, “petición de información”, “petición general”, “quejas”, “reclamos”, “referencia cruzada”, “sin tipo documental”, “solicitud de información pública” y “sugerencias” </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4-20</text:p>
          </table:table-cell>
          <table:table-cell table:style-name="ce64" office:value-type="string" calcext:value-type="string">
            <text:p>Validar que al tratar de guardar los permisos sin haber seleccionado ninguna opción, el sistema muestre un mensaje de error “El perfil debe tener al menos un acceso habilitad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4-21</text:p>
          </table:table-cell>
          <table:table-cell table:style-name="ce64" office:value-type="string" calcext:value-type="string">
            <text:p>Validar que cuando se guarde los permisos, el sistema muestre un mensaje de confirmación “Registro actualizado correctamente”</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4-22</text:p>
          </table:table-cell>
          <table:table-cell table:style-name="ce64" office:value-type="string" calcext:value-type="string">
            <text:p>Valida que se muestre en la parte inferior los botones de ”CSV”, “EXCEL”, “PDF” e “IMPRIMIR”, al dar clic en cualquiera de estas opciones se debe descargar el archivo correspondiente</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26">
          <table:table-cell table:style-name="ce66" office:value-type="string" calcext:value-type="string" table:number-columns-spanned="2" table:number-rows-spanned="1">
            <text:p>CP05 – Gestión de Usuarios – Administrar operaciones</text:p>
          </table:table-cell>
          <table:covered-table-cell table:style-name="ce64"/>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21"/>
          <table:table-cell table:style-name="ce63" table:number-columns-repeated="16357"/>
        </table:table-row>
        <table:table-row table:style-name="ro27">
          <table:table-cell table:style-name="ce60" office:value-type="string" calcext:value-type="string">
            <text:p>CP05-01</text:p>
          </table:table-cell>
          <table:table-cell table:style-name="ce8" office:value-type="string" calcext:value-type="string">
            <text:p>Validar que se muestre una tabla con el listado de todos las operaciones existentes en el sistema</text:p>
          </table:table-cell>
          <table:table-cell table:style-name="ce6" office:value-type="string" calcext:value-type="string">
            <text:p>ok</text:p>
          </table:table-cell>
          <table:table-cell table:style-name="ce95" table:number-columns-repeated="2"/>
          <table:table-cell table:style-name="ce4"/>
          <table:table-cell table:number-columns-repeated="21"/>
          <table:table-cell table:style-name="ce63" table:number-columns-repeated="16357"/>
        </table:table-row>
        <table:table-row table:style-name="ro27">
          <table:table-cell table:style-name="ce60" office:value-type="string" calcext:value-type="string">
            <text:p>CP05-02</text:p>
          </table:table-cell>
          <table:table-cell table:style-name="ce8" office:value-type="string" calcext:value-type="string">
            <text:p>Validar que se muestre un botón de filtros en la parte superior, botón dinámico de color naranja en la pare inferior y botones para descargar la información</text:p>
          </table:table-cell>
          <table:table-cell table:style-name="ce6" office:value-type="string" calcext:value-type="string">
            <text:p>ok</text:p>
          </table:table-cell>
          <table:table-cell table:style-name="ce95" table:number-columns-repeated="2"/>
          <table:table-cell table:style-name="ce4"/>
          <table:table-cell table:number-columns-repeated="21"/>
          <table:table-cell table:style-name="ce63" table:number-columns-repeated="16357"/>
        </table:table-row>
        <table:table-row table:style-name="ro27">
          <table:table-cell table:style-name="ce60" office:value-type="string" calcext:value-type="string">
            <text:p>CP05-03</text:p>
          </table:table-cell>
          <table:table-cell table:style-name="ce21" office:value-type="string" calcext:value-type="string">
            <text:p>Validar que cuando se seleccione un registro en el botón dinámico de color naranja, se muestren las opciones de “Agregar” y “Ver”</text:p>
          </table:table-cell>
          <table:table-cell table:style-name="ce6" office:value-type="string" calcext:value-type="string">
            <text:p>ok</text:p>
          </table:table-cell>
          <table:table-cell table:style-name="ce95" table:number-columns-repeated="2"/>
          <table:table-cell table:style-name="ce4"/>
          <table:table-cell table:number-columns-repeated="21"/>
          <table:table-cell table:style-name="ce63" table:number-columns-repeated="16357"/>
        </table:table-row>
        <table:table-row table:style-name="ro27">
          <table:table-cell table:style-name="ce60" office:value-type="string" calcext:value-type="string">
            <text:p>CP05-04</text:p>
          </table:table-cell>
          <table:table-cell table:style-name="ce64" office:value-type="string" calcext:value-type="string">
            <text:p>Validar que cuando se de clic en la opción “Agregar” se despliegue el formulario de registro de operación, este formulario debe mostrar unos campos de texto que se llame “Ruta”, “Nombre” y “Módulo” y una lista desplegable que muestre los módulos en el menú</text:p>
          </table:table-cell>
          <table:table-cell table:style-name="ce6" office:value-type="string" calcext:value-type="string">
            <text:p>ok</text:p>
          </table:table-cell>
          <table:table-cell table:style-name="ce95" table:number-columns-repeated="2"/>
          <table:table-cell table:style-name="ce4"/>
          <table:table-cell table:number-columns-repeated="21"/>
          <table:table-cell table:style-name="ce63" table:number-columns-repeated="16357"/>
        </table:table-row>
        <table:table-row table:style-name="ro27">
          <table:table-cell table:style-name="ce60" office:value-type="string" calcext:value-type="string">
            <text:p>CP05-05</text:p>
          </table:table-cell>
          <table:table-cell table:style-name="ce64" office:value-type="string" calcext:value-type="string">
            <text:p>Validar que cuando se haga clic en el botón de guardar sin haber seleccionado ningún campo se muestre un mensaje error indicando que se genero un error</text:p>
          </table:table-cell>
          <table:table-cell table:style-name="ce6" office:value-type="string" calcext:value-type="string">
            <text:p>ok</text:p>
          </table:table-cell>
          <table:table-cell table:style-name="ce95" table:number-columns-repeated="2"/>
          <table:table-cell table:style-name="ce4"/>
          <table:table-cell table:number-columns-repeated="21"/>
          <table:table-cell table:style-name="ce63" table:number-columns-repeated="16357"/>
        </table:table-row>
        <table:table-row table:style-name="ro27">
          <table:table-cell table:style-name="ce67" office:value-type="string" calcext:value-type="string">
            <text:p>CP05-06</text:p>
          </table:table-cell>
          <table:table-cell table:style-name="ce64" office:value-type="string" calcext:value-type="string">
            <text:p>Validar que cuando se haga clic en el botón de guardar se muestre un mensaje de confirmación indicando que se ingreso de forma correcta</text:p>
          </table:table-cell>
          <table:table-cell table:style-name="ce6" office:value-type="string" calcext:value-type="string">
            <text:p>ok</text:p>
          </table:table-cell>
          <table:table-cell table:style-name="ce95" table:number-columns-repeated="2"/>
          <table:table-cell table:style-name="ce4"/>
          <table:table-cell table:number-columns-repeated="21"/>
          <table:table-cell table:style-name="ce63" table:number-columns-repeated="16357"/>
        </table:table-row>
        <table:table-row table:style-name="ro27">
          <table:table-cell table:style-name="ce60" office:value-type="string" calcext:value-type="string">
            <text:p>CP05-07</text:p>
          </table:table-cell>
          <table:table-cell table:style-name="ce64" office:value-type="string" calcext:value-type="string">
            <text:p>Validar que cuando se seleccione una operación y se de clic en la opción “Editar” se despliegue el formulario de registro de la operación ya con la información diligenciada, es decir debe mostrar la información de la operación que se había seleccionado y chequeados los campos que se habían asignado</text:p>
          </table:table-cell>
          <table:table-cell table:style-name="ce6" office:value-type="string" calcext:value-type="string">
            <text:p>ok</text:p>
          </table:table-cell>
          <table:table-cell table:style-name="ce95" table:number-columns-repeated="2"/>
          <table:table-cell table:style-name="ce4"/>
          <table:table-cell table:number-columns-repeated="21"/>
          <table:table-cell table:style-name="ce63" table:number-columns-repeated="16357"/>
        </table:table-row>
        <table:table-row table:style-name="ro27">
          <table:table-cell table:style-name="ce60" office:value-type="string" calcext:value-type="string">
            <text:p>CP05-08</text:p>
          </table:table-cell>
          <table:table-cell table:style-name="ce64" office:value-type="string" calcext:value-type="string">
            <text:p>Validar que cuando se haga clic en el botón de guardar se muestre un mensaje de confirmación indicando que se actualizo la información de forma correcta</text:p>
          </table:table-cell>
          <table:table-cell table:style-name="ce6" office:value-type="string" calcext:value-type="string">
            <text:p>ok</text:p>
          </table:table-cell>
          <table:table-cell table:style-name="ce95" table:number-columns-repeated="2"/>
          <table:table-cell table:style-name="ce4"/>
          <table:table-cell table:number-columns-repeated="21"/>
          <table:table-cell table:style-name="ce63" table:number-columns-repeated="16357"/>
        </table:table-row>
        <table:table-row table:style-name="ro27">
          <table:table-cell table:style-name="ce60" office:value-type="string" calcext:value-type="string">
            <text:p>CP05-09</text:p>
          </table:table-cell>
          <table:table-cell table:style-name="ce64" office:value-type="string" calcext:value-type="string">
            <text:p>Validar que cuando se de clic en el botón “FILTROS” se despliegue una ventana nueva donde se muestren los campos “Nombre de operación” y “Módulo de operación” adicionalmente de mostrar una lista desplegable indicando la cantidad de registros a mostrar</text:p>
          </table:table-cell>
          <table:table-cell table:style-name="ce6" office:value-type="string" calcext:value-type="string">
            <text:p>ok</text:p>
          </table:table-cell>
          <table:table-cell table:style-name="ce95" table:number-columns-repeated="2"/>
          <table:table-cell table:style-name="ce4"/>
          <table:table-cell table:number-columns-repeated="21"/>
          <table:table-cell table:style-name="ce63" table:number-columns-repeated="16357"/>
        </table:table-row>
        <table:table-row table:style-name="ro27">
          <table:table-cell table:style-name="ce60" office:value-type="string" calcext:value-type="string">
            <text:p>CP05-10</text:p>
          </table:table-cell>
          <table:table-cell table:style-name="ce64"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6" office:value-type="string" calcext:value-type="string">
            <text:p>ok</text:p>
          </table:table-cell>
          <table:table-cell table:style-name="ce95" table:number-columns-repeated="2"/>
          <table:table-cell table:style-name="ce4"/>
          <table:table-cell table:number-columns-repeated="21"/>
          <table:table-cell table:style-name="ce63" table:number-columns-repeated="16357"/>
        </table:table-row>
        <table:table-row table:style-name="ro27">
          <table:table-cell table:style-name="ce60" office:value-type="string" calcext:value-type="string">
            <text:p>CP05-11</text:p>
          </table:table-cell>
          <table:table-cell table:style-name="ce64" office:value-type="string" calcext:value-type="string">
            <text:p>Valida que se muestre en la parte inferior los botones de ”CSV”, “EXCEL”, “PDF” e “IMPRIMIR”, al dar clic en cualquiera de estas opciones se debe descargar el archivo correspondiente</text:p>
          </table:table-cell>
          <table:table-cell table:style-name="ce6" office:value-type="string" calcext:value-type="string">
            <text:p>ok</text:p>
          </table:table-cell>
          <table:table-cell table:style-name="ce95" table:number-columns-repeated="2"/>
          <table:table-cell table:style-name="ce4"/>
          <table:table-cell table:number-columns-repeated="21"/>
          <table:table-cell table:style-name="ce63" table:number-columns-repeated="16357"/>
        </table:table-row>
        <table:table-row table:style-name="ro1">
          <table:table-cell table:style-name="ce49" office:value-type="string" calcext:value-type="string" table:number-columns-spanned="2" table:number-rows-spanned="1">
            <text:p>CP06 – Configuración - Configuración carga TRD</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21"/>
          <table:table-cell table:style-name="ce63" table:number-columns-repeated="16357"/>
        </table:table-row>
        <table:table-row table:style-name="ro7">
          <table:table-cell table:style-name="ce22" office:value-type="string" calcext:value-type="string">
            <text:p>CP06-01</text:p>
          </table:table-cell>
          <table:table-cell table:style-name="ce8" office:value-type="string" calcext:value-type="string">
            <text:p>Validar que se muestre una tabla donde se pueda observar la configuración del formato de TRD que se puede cargar en el sistema, se debe mostrar solo un registr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6-02</text:p>
          </table:table-cell>
          <table:table-cell table:style-name="ce64" office:value-type="string" calcext:value-type="string">
            <text:p>Valida que se muestre en la parte inferior los botones de ”CSV”, “EXCEL”, “PDF” e “IMPRIMIR”, al dar clic en cualquiera de estas opciones se debe descargar el archivo correspondiente</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6-03</text:p>
          </table:table-cell>
          <table:table-cell table:style-name="ce64" office:value-type="string" calcext:value-type="string">
            <text:p>Validar que cuando se seleccione la configuración activa y se de clic en la opción “Ver” lo cual debe mostrar una nueva ventana donde se muestre la configuración de TRD</text:p>
          </table:table-cell>
          <table:table-cell table:style-name="ce6" office:value-type="string" calcext:value-type="string">
            <text:p>ok</text:p>
          </table:table-cell>
          <table:table-cell table:style-name="ce16"/>
          <table:table-cell table:style-name="ce64" office:value-type="string" calcext:value-type="string">
            <text:p>se implementa una validacion en el front que generaba conflicto en la captura de los datos</text:p>
          </table:table-cell>
          <table:table-cell table:style-name="ce4"/>
          <table:table-cell table:number-columns-repeated="21"/>
          <table:table-cell table:style-name="ce63" table:number-columns-repeated="16357"/>
        </table:table-row>
        <table:table-row table:style-name="ro7">
          <table:table-cell table:style-name="ce22" office:value-type="string" calcext:value-type="string">
            <text:p>CP06-04</text:p>
          </table:table-cell>
          <table:table-cell table:style-name="ce64" office:value-type="string" calcext:value-type="string">
            <text:p>Validar que al dar clic en la opción “Crear” se muestre un formulario con los campos “Mascara”, campo donde se guarde la celda “Codigo de Dependencia”, celda “Nombre de la Dependencia”, celda de la “Unidad Administrativa”, si tiene o no “Regional”, adicional validar que se muestre una sección que se llame “Configuración inicial carga TRD”</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6-05</text:p>
          </table:table-cell>
          <table:table-cell table:style-name="ce64" office:value-type="string" calcext:value-type="string">
            <text:p>Validar que en la sección “Configuración inicial carga TRD” se muestre un campo para “inicio de los datos”, “Codigo de TRD o Dependencia”, “Nombre Serie, Subserie, Tipo documental”, “Años archivo gestion”, “Años archivo central”, “Disposición final (C.T)”, “Disposición final (E)”, “Disposición final”, “Disposición final (M) o (D)”, “Procedimiento subseries”, adicionalmente de tener un campo opcional de “Soporte”, “Configuración dias término” y “Tiene norma”</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6-06</text:p>
          </table:table-cell>
          <table:table-cell table:style-name="ce64" office:value-type="string" calcext:value-type="string">
            <text:p>Validar que cuando se active la opción de “Tiene soporte”, se habiliten nuevos campos de texto asociados al soporte y que los campos con * sean obligatorios, pero sino esta activo no se muestre ni se valide.</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6-07</text:p>
          </table:table-cell>
          <table:table-cell table:style-name="ce64" office:value-type="string" calcext:value-type="string">
            <text:p>Validar que cuando se active la opción de “Configuración dias término”, se habiliten nuevos campos de texto asociados a los dias de termino y que los campos con * sean obligatorios, pero sino esta activo no se muestre ni se valide.</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6-08</text:p>
          </table:table-cell>
          <table:table-cell table:style-name="ce64" office:value-type="string" calcext:value-type="string">
            <text:p>Validar que cuando se active la opción de “Tiene norma”, se habiliten nuevos campos de texto asociados a la norma y que los campos con * sean obligatorios, pero sino esta activo no se muestre ni se valide.</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6-09</text:p>
          </table:table-cell>
          <table:table-cell table:style-name="ce64" office:value-type="string" calcext:value-type="string">
            <text:p>Validar que cuando se active la opción de “Tiene regional”, se habiliten nuevos campos de texto asociados la regional y que los campos con * sean obligatorios, pero sino esta activo no se muestre ni se valide.</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6-10</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1">
          <table:table-cell table:style-name="ce49" office:value-type="string" calcext:value-type="string" table:number-columns-spanned="2" table:number-rows-spanned="1">
            <text:p>CP07 – Configuración - Proveedores de envío</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21"/>
          <table:table-cell table:style-name="ce63" table:number-columns-repeated="16357"/>
        </table:table-row>
        <table:table-row table:style-name="ro7">
          <table:table-cell table:style-name="ce22" office:value-type="string" calcext:value-type="string">
            <text:p>CP07-01</text:p>
          </table:table-cell>
          <table:table-cell table:style-name="ce64" office:value-type="string" calcext:value-type="string">
            <text:p>Validar que cuando se ingrese al modulo se muestre una tabla con el listado de todos los proveedores que se encuentran registrados en el sistema.</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7-02</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7-03</text:p>
          </table:table-cell>
          <table:table-cell table:style-name="ce21" office:value-type="string" calcext:value-type="string">
            <text:p>Validar que cuando se seleccione un registro de los proveedores registrados, se muestre en el botón dinámico de color naranja las opciones de “Editar”, “Ver”, “Cambiar Estado” y “Crea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28">
          <table:table-cell table:style-name="ce22" office:value-type="string" calcext:value-type="string">
            <text:p>CP07-04</text:p>
          </table:table-cell>
          <table:table-cell table:style-name="ce64" office:value-type="string" calcext:value-type="string">
            <text:p>Validar que cuando se de clic en la opción “Agregar” se despliegue el formulario de registro de proveedor, este formulario debe mostrar un campo de texto que se llame “Nombre Proveedor”, una lista desplegable que muestre los servicios que se pueden configurar y adicional un listado de “Regional”, donde se muestre todas las regionales existentes en el sistema</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7-05</text:p>
          </table:table-cell>
          <table:table-cell table:style-name="ce64" office:value-type="string" calcext:value-type="string">
            <text:p>Validar que cuando se haga clic en el botón de guardar se muestre un mensaje de confirmación indicando que se ingreso de forma correcta una vez se diligencien todos los campos</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7-06</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7-07</text:p>
          </table:table-cell>
          <table:table-cell table:style-name="ce64" office:value-type="string" calcext:value-type="string">
            <text:p>Validar que en el listado de “Servicios” se permita seleccionar mas de una opción</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7-08</text:p>
          </table:table-cell>
          <table:table-cell table:style-name="ce64" office:value-type="string" calcext:value-type="string">
            <text:p>Validar que cuando se seleccione un proveedor y se de clic en la opción “Editar” se despliegue el formulario de registro de proveedor ya con la información diligenciada, es decir debe mostrar la información del proveedor que se habia seleccionad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7-09</text:p>
          </table:table-cell>
          <table:table-cell table:style-name="ce64" office:value-type="string" calcext:value-type="string">
            <text:p>Validar que en el listado de “Servicios” se permita seleccionar mas de una opción</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7-10</text:p>
          </table:table-cell>
          <table:table-cell table:style-name="ce64" office:value-type="string" calcext:value-type="string">
            <text:p>Validar que cuando se haga clic en el botón de guradar se muestre un mensaje de confirmación indicando que se actualizo la información de forma correcta</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7-11</text:p>
          </table:table-cell>
          <table:table-cell table:style-name="ce64" office:value-type="string" calcext:value-type="string">
            <text:p>Validar que al dar clic en la opción “Cambiar estado” permita inactivar el perfil en caso de estar activo o de lo contrario activar en caso de encontrarse inactiv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7-12</text:p>
          </table:table-cell>
          <table:table-cell table:style-name="ce64" office:value-type="string" calcext:value-type="string">
            <text:p>Validar que al dar clic en la opción “Ver”, se muestre una ventana con el detalle del proveedor que se esta consultando, se debe mostrar el Nombre proveedor, Fecha creación, Servicio (este se debe mostrar por cada uno de los servicios que se haya asignado al proveedor) y Regional</text:p>
          </table:table-cell>
          <table:table-cell table:style-name="ce6" office:value-type="string" calcext:value-type="string">
            <text:p>ok</text:p>
          </table:table-cell>
          <table:table-cell table:style-name="ce16"/>
          <table:table-cell table:style-name="ce64" office:value-type="string" calcext:value-type="string">
            <text:p>se implementa una validacion en el front que generaba conflicto en la captura de los datos</text:p>
          </table:table-cell>
          <table:table-cell table:style-name="ce4"/>
          <table:table-cell table:number-columns-repeated="21"/>
          <table:table-cell table:style-name="ce63" table:number-columns-repeated="16357"/>
        </table:table-row>
        <table:table-row table:style-name="ro7">
          <table:table-cell table:style-name="ce22" office:value-type="string" calcext:value-type="string">
            <text:p>CP07-13</text:p>
          </table:table-cell>
          <table:table-cell table:style-name="ce64" office:value-type="string" calcext:value-type="string">
            <text:p>Validar que cuando se de clic en el botón “FILTROS” se despliegue una ventana nueva donde se muestren los campos “Empresa que hace el envio de correspondencia”, “Servicios”, “Regional”, “Estado” y rangos de fechas, adicional de mostrar una lista desplegable indicando la cantidad de registros a mostra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7-14</text:p>
          </table:table-cell>
          <table:table-cell table:style-name="ce64"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7-15</text:p>
          </table:table-cell>
          <table:table-cell table:style-name="ce64" office:value-type="string" calcext:value-type="string">
            <text:p>Validar que cuando se de clic en alguno de los botones de “CSV”, “EXCEL”, “PDF” y “IMPRIMIR” el sistema descargue o genere el correspondiente archiv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1">
          <table:table-cell table:style-name="ce49" office:value-type="string" calcext:value-type="string" table:number-columns-spanned="2" table:number-rows-spanned="1">
            <text:p>CP08 – Configuración - Tipos de radicado</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21"/>
          <table:table-cell table:style-name="ce63" table:number-columns-repeated="16357"/>
        </table:table-row>
        <table:table-row table:style-name="ro7">
          <table:table-cell table:style-name="ce22" office:value-type="string" calcext:value-type="string">
            <text:p>CP08-01</text:p>
          </table:table-cell>
          <table:table-cell table:style-name="ce64" office:value-type="string" calcext:value-type="string">
            <text:p>Validar que cuando se ingrese al modulo se muestre una tabla con el listado de todos los tipos de radicados que se encuentran registrados en el sistema y que se pueden tramitar</text:p>
          </table:table-cell>
          <table:table-cell table:style-name="ce6" office:value-type="string" calcext:value-type="string">
            <text:p>ok</text:p>
          </table:table-cell>
          <table:table-cell table:style-name="ce16"/>
          <table:table-cell table:style-name="ce64" office:value-type="string" calcext:value-type="string">
            <text:p>Se esta mostrando 3 veces la transacción de “Resoluciones” lo cual solo debe mostrarse una vez... se valida y solamente se muestra una vez</text:p>
          </table:table-cell>
          <table:table-cell table:style-name="ce4"/>
          <table:table-cell table:number-columns-repeated="21"/>
          <table:table-cell table:style-name="ce63" table:number-columns-repeated="16357"/>
        </table:table-row>
        <table:table-row table:style-name="ro7">
          <table:table-cell table:style-name="ce22" office:value-type="string" calcext:value-type="string">
            <text:p>CP08-02</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8-03</text:p>
          </table:table-cell>
          <table:table-cell table:style-name="ce64" office:value-type="string" calcext:value-type="string">
            <text:p>Validar que cuando se seleccione alguno de los tipos de radicados registrados, en el botón dinámico de color naranja en la parte inferior se muestren las opciones “Agregar”, “Editar”, “Ver”, “Cambiar estad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8-04</text:p>
          </table:table-cell>
          <table:table-cell table:style-name="ce64" office:value-type="string" calcext:value-type="string">
            <text:p>Validar que cuando se de clic en la opción “Agregar” se despliegue el formulario de registro de tipo de radicado, este formulario debe mostrar un campo de texto que se llame “Codigo tipo de radicado”, una campo que se llame “Nombre tipo de radicado”, unos campos opcionales que se llaman “Único radicado con múltiples remitentes” y “El radicado es definitivo” adicional de mostrar un listado de todas las transacciones que se pueden asigna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8-05</text:p>
          </table:table-cell>
          <table:table-cell table:style-name="ce64" office:value-type="string" calcext:value-type="string">
            <text:p>Validar que al seleccionar el check de “Transacciones asociadas al tipo de radicado” se marquen todas las opciones de transacciones disponibles o solo permitir seleccionar una opción</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8-06</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8-07</text:p>
          </table:table-cell>
          <table:table-cell table:style-name="ce64" office:value-type="string" calcext:value-type="string">
            <text:p>Validar que cuando se haga clic en el botón de guardar se muestre un mensaje de confirmación indicando que se ingreso de forma correcta una vez se diligencien todos los campos</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8-08</text:p>
          </table:table-cell>
          <table:table-cell table:style-name="ce64" office:value-type="string" calcext:value-type="string">
            <text:p>Validar que cuando se seleccione un tipo de radicado y se de clic en la opción “Editar” se despliegue el formulario de registro ya con la información diligenciada, es decir debe mostrar la información del tipo de radicado que se habia seleccionado y chequeadas las transacciones que se habian asignado</text:p>
          </table:table-cell>
          <table:table-cell table:style-name="ce6" office:value-type="string" calcext:value-type="string">
            <text:p>ok</text:p>
          </table:table-cell>
          <table:table-cell table:style-name="ce16"/>
          <table:table-cell table:style-name="ce64" office:value-type="string" calcext:value-type="string">
            <text:p>No se esta mostrando la opción relacionada al proceso de poder configurar un tipo de radicado como si se comportara como una entrada</text:p>
          </table:table-cell>
          <table:table-cell table:style-name="ce4"/>
          <table:table-cell table:number-columns-repeated="21"/>
          <table:table-cell table:style-name="ce63" table:number-columns-repeated="16357"/>
        </table:table-row>
        <table:table-row table:style-name="ro7">
          <table:table-cell table:style-name="ce22" office:value-type="string" calcext:value-type="string">
            <text:p>CP08-09</text:p>
          </table:table-cell>
          <table:table-cell table:style-name="ce64" office:value-type="string" calcext:value-type="string">
            <text:p>Validar que cuando se haga clic en el botón de guradar se muestre un mensaje de confirmación indicando que se actualizo la información de forma correcta</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8-10</text:p>
          </table:table-cell>
          <table:table-cell table:style-name="ce64" office:value-type="string" calcext:value-type="string">
            <text:p>Validar que al dar clic en la opción “Cambiar estado” permita inactivar el tipo de radicado en caso de estar activo o de lo contrario, activar en caso de encontrarse inactiv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8-11</text:p>
          </table:table-cell>
          <table:table-cell table:style-name="ce64" office:value-type="string" calcext:value-type="string">
            <text:p>Validar que al dar clic en la opción “Ver”, se muestre una ventana con el detalle del tipo de radicado que se esta consultando, adicional de ver las transacciones que se encuentran activos y asignados al tipo de radicado</text:p>
          </table:table-cell>
          <table:table-cell table:style-name="ce6" office:value-type="string" calcext:value-type="string">
            <text:p>ok</text:p>
          </table:table-cell>
          <table:table-cell table:style-name="ce16"/>
          <table:table-cell table:style-name="ce64" office:value-type="string" calcext:value-type="string">
            <text:p>se implementa una validacion en el front que generaba conflicto en la captura de los datos</text:p>
          </table:table-cell>
          <table:table-cell table:style-name="ce4"/>
          <table:table-cell table:number-columns-repeated="21"/>
          <table:table-cell table:style-name="ce63" table:number-columns-repeated="16357"/>
        </table:table-row>
        <table:table-row table:style-name="ro7">
          <table:table-cell table:style-name="ce22" office:value-type="string" calcext:value-type="string">
            <text:p>CP08-12</text:p>
          </table:table-cell>
          <table:table-cell table:style-name="ce64" office:value-type="string" calcext:value-type="string">
            <text:p>Validar que se despliegue el formulario de Modificar tipo de radicado, cuando se de clic en la opción de “Actualiza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8-13</text:p>
          </table:table-cell>
          <table:table-cell table:style-name="ce64" office:value-type="string" calcext:value-type="string">
            <text:p>Validar que cuando se de clic en el botón “FILTROS” se despliegue una ventana nueva donde se muestren los campos “Código que identifica el tipo de radicado”, “Nombre del tipo de radicado”, “Estado”, y rangos de fechas, adicional de mostrar una lista desplegable indicando la cantidad de registros a mostra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8-14</text:p>
          </table:table-cell>
          <table:table-cell table:style-name="ce64"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8-15</text:p>
          </table:table-cell>
          <table:table-cell table:style-name="ce81" office:value-type="string" calcext:value-type="string">
            <text:p>Validar que en el listado de tipos de radicados el sistema permita descargarlo en formato csv, excel, pdf y para imprimi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1">
          <table:table-cell table:style-name="ce49" office:value-type="string" calcext:value-type="string" table:number-columns-spanned="2" table:number-rows-spanned="1">
            <text:p>CP09 – Configuración - Grupo de usuarios</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21"/>
          <table:table-cell table:style-name="ce63" table:number-columns-repeated="16357"/>
        </table:table-row>
        <table:table-row table:style-name="ro7">
          <table:table-cell table:style-name="ce22" office:value-type="string" calcext:value-type="string">
            <text:p>CP09-01</text:p>
          </table:table-cell>
          <table:table-cell table:style-name="ce64" office:value-type="string" calcext:value-type="string">
            <text:p>Validar que cuando se ingrese al modulo se muestre una tabla con el listado de todos los grupos de usuario que se encuentran registrados en el sistema</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9-02</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9-03</text:p>
          </table:table-cell>
          <table:table-cell table:style-name="ce64" office:value-type="string" calcext:value-type="string">
            <text:p>Validar que cuando se seleccione alguno de los grupos de usuarios registrados, en el botón dinámico de color naranja en la parte inferior se muestren las opciones “Agregar”, “Editar”, “Ver”, “Cambiar estad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9-04</text:p>
          </table:table-cell>
          <table:table-cell table:style-name="ce64" office:value-type="string" calcext:value-type="string">
            <text:p>Validar que cuando se de clic en la opción “Agregar” se despliegue el formulario de registro de un nuevo grupo de usuarios, este formulario debe mostrar un campo de texto que se llame “Nombre grupo”, una campo que se pueda seleccionar una o varias dependencias y con base a esta selección mostrar los usuarios en el listado de usuarios</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9-05</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9-06</text:p>
          </table:table-cell>
          <table:table-cell table:style-name="ce64" office:value-type="string" calcext:value-type="string">
            <text:p>Validar que cuando se haga clic en el botón de guardar se muestre un mensaje de confirmación indicando que se ingreso de forma correcta una vez se diligencien todos los campos</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9-07</text:p>
          </table:table-cell>
          <table:table-cell table:style-name="ce64" office:value-type="string" calcext:value-type="string">
            <text:p>Validar que cuando se seleccione un tipo de radicado y se de clic en la opción “Editar” se despliegue el formulario de registro ya con la información diligenciada, es decir debe mostrar la información del grupo de usuarios</text:p>
          </table:table-cell>
          <table:table-cell table:style-name="ce6" office:value-type="string" calcext:value-type="string">
            <text:p>ok</text:p>
          </table:table-cell>
          <table:table-cell table:style-name="ce16" office:value-type="string" calcext:value-type="string">
            <text:p>corregido pero no se ha podido probar por error de orfeo</text:p>
          </table:table-cell>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9-08</text:p>
          </table:table-cell>
          <table:table-cell table:style-name="ce64" office:value-type="string" calcext:value-type="string">
            <text:p>Validar que cuando se haga clic en el botón de guradar se muestre un mensaje de confirmación indicando que se actualizo la información de forma correcta</text:p>
          </table:table-cell>
          <table:table-cell table:style-name="ce6" office:value-type="string" calcext:value-type="string">
            <text:p>ok</text:p>
          </table:table-cell>
          <table:table-cell table:style-name="ce83" office:value-type="string" calcext:value-type="string">
            <text:p>Id usuario debe ser un número entero.</text:p>
          </table:table-cell>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9-09</text:p>
          </table:table-cell>
          <table:table-cell table:style-name="ce64" office:value-type="string" calcext:value-type="string">
            <text:p>Validar que al dar clic en la opción “Cambiar estado” permita inactivar el tipo de radicado en caso de estar activo o de lo contrario, activar en caso de encontrarse inactivo</text:p>
          </table:table-cell>
          <table:table-cell table:style-name="ce6" office:value-type="string" calcext:value-type="string">
            <text:p>ok</text:p>
          </table:table-cell>
          <table:table-cell table:style-name="ce16" office:value-type="string" calcext:value-type="string">
            <text:p>corregido pero no se ha podido probar por error de orfeo</text:p>
          </table:table-cell>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9-10</text:p>
          </table:table-cell>
          <table:table-cell table:style-name="ce64" office:value-type="string" calcext:value-type="string">
            <text:p>Validar que al dar clic en la opción “Ver”, se muestre una ventana donde se liste el nombre del grupo y cada uno de los usuarios que pertenecen a dicho grupo, este listado debe permitir descargar los resultados</text:p>
          </table:table-cell>
          <table:table-cell table:style-name="ce6" office:value-type="string" calcext:value-type="string">
            <text:p>ok</text:p>
          </table:table-cell>
          <table:table-cell table:style-name="ce16" office:value-type="string" calcext:value-type="string">
            <text:p>corregido pero no se ha podido probar por error de orfeo</text:p>
          </table:table-cell>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9-11</text:p>
          </table:table-cell>
          <table:table-cell table:style-name="ce64" office:value-type="string" calcext:value-type="string">
            <text:p>Validar que se despliegue el formulario de Actualizar grupo de usuarios, cuando se de clic en la opción de “Actualizar”</text:p>
          </table:table-cell>
          <table:table-cell table:style-name="ce6" office:value-type="string" calcext:value-type="string">
            <text:p>ok</text:p>
          </table:table-cell>
          <table:table-cell table:style-name="ce16" office:value-type="string" calcext:value-type="string">
            <text:p>corregido pero no se ha podido probar por error de orfeo</text:p>
          </table:table-cell>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9-12</text:p>
          </table:table-cell>
          <table:table-cell table:style-name="ce64" office:value-type="string" calcext:value-type="string">
            <text:p>Validar que cuando se de clic en el botón “FILTROS” se despliegue una ventana nueva donde se muestren los campos “Nombre de Grupo de Usuarios”, “Estado”, “Estado” y rangos de fechas, adicional de mostrar una lista desplegable indicando la cantidad de registros a mostra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9-13</text:p>
          </table:table-cell>
          <table:table-cell table:style-name="ce64"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09-14</text:p>
          </table:table-cell>
          <table:table-cell table:style-name="ce64" office:value-type="string" calcext:value-type="string">
            <text:p>Validar que cuando se de clic en alguno de los botones de “CSV”, “EXCEL”, “PDF” y “IMPRIMIR” el sistema descargue o genere el correspondiente archiv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1">
          <table:table-cell table:style-name="ce49" office:value-type="string" calcext:value-type="string" table:number-columns-spanned="2" table:number-rows-spanned="1">
            <text:p>CP10 – Configuración - Horario laboral</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21"/>
          <table:table-cell table:style-name="ce63" table:number-columns-repeated="16357"/>
        </table:table-row>
        <table:table-row table:style-name="ro7">
          <table:table-cell table:style-name="ce22" office:value-type="string" calcext:value-type="string">
            <text:p>CP10-01</text:p>
          </table:table-cell>
          <table:table-cell table:style-name="ce64" office:value-type="string" calcext:value-type="string">
            <text:p>Validar que cuando se ingrese al modulo se muestre una tabla con el listado del horario laboral configurado en el sistema</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0-02</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0-03</text:p>
          </table:table-cell>
          <table:table-cell table:style-name="ce64" office:value-type="string" calcext:value-type="string">
            <text:p>Validar que cuando se seleccione alguno de estos registros, en el botón dinámico de color naranja en la parte inferior se muestren las opciones “Agregar”, “Editar”, “Ver”, “Cambiar estad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0-04</text:p>
          </table:table-cell>
          <table:table-cell table:style-name="ce64" office:value-type="string" calcext:value-type="string">
            <text:p>Validar que cuando se de clic en la opción “Agregar” se despliegue el formulario de registro de un nuevo horario laboral, este formulario debe mostrar un campo donde se pueda seleccionar el “día de inicio de la jornada laboral”, un campo donde se pueda seleccionar el “día final de la jornada laboral”, seleccionar la “hora de inicio” y la “hora final” y si esta “Activo o Inactiv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0-05</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0-06</text:p>
          </table:table-cell>
          <table:table-cell table:style-name="ce64" office:value-type="string" calcext:value-type="string">
            <text:p>Validar que cuando se haga clic en el botón de guardar se muestre un mensaje de confirmación indicando que se ingreso de forma correcta una vez se diligencien todos los campos</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0-07</text:p>
          </table:table-cell>
          <table:table-cell table:style-name="ce64" office:value-type="string" calcext:value-type="string">
            <text:p>Validar que cuando se seleccione uno de los registros y se de clic en la opción “Editar” se despliegue el formulario de registro ya con la información diligenciada, es decir debe mostrar la información del horario laboral estipulad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0-08</text:p>
          </table:table-cell>
          <table:table-cell table:style-name="ce64" office:value-type="string" calcext:value-type="string">
            <text:p>Validar que cuando se haga clic en el botón de guradar se muestre un mensaje de confirmación indicando que se actualizo la información de forma correcta</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0-09</text:p>
          </table:table-cell>
          <table:table-cell table:style-name="ce64" office:value-type="string" calcext:value-type="string">
            <text:p>Validar que al dar clic en la opción “Cambiar estado” permita inactivar el horario laboral en caso de estar activo o de lo contrario, activar en caso de encontrarse inactivo; validar que siempre se encuentre un registro activ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0-10</text:p>
          </table:table-cell>
          <table:table-cell table:style-name="ce64" office:value-type="string" calcext:value-type="string">
            <text:p>Validar que al dar clic en la opción “Ver”, se muestre una ventana donde se liste el “Día inicio”, “Día fin”, “Horario inicio”, “Horario finalización”, “Estado” y “Fecha de creación”</text:p>
          </table:table-cell>
          <table:table-cell table:style-name="ce6" office:value-type="string" calcext:value-type="string">
            <text:p>ok</text:p>
          </table:table-cell>
          <table:table-cell table:style-name="ce16"/>
          <table:table-cell table:style-name="ce64" office:value-type="string" calcext:value-type="string">
            <text:p>se implementa una validacion en el front que generaba conflicto en la captura de los datos</text:p>
          </table:table-cell>
          <table:table-cell table:style-name="ce4"/>
          <table:table-cell table:number-columns-repeated="21"/>
          <table:table-cell table:style-name="ce63" table:number-columns-repeated="16357"/>
        </table:table-row>
        <table:table-row table:style-name="ro7">
          <table:table-cell table:style-name="ce22" office:value-type="string" calcext:value-type="string">
            <text:p>CP10-11</text:p>
          </table:table-cell>
          <table:table-cell table:style-name="ce64" office:value-type="string" calcext:value-type="string">
            <text:p>Validar que se despliegue el formulario de Modificar horario laboral, cuando se de clic en la opción de “Actualiza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0-12</text:p>
          </table:table-cell>
          <table:table-cell table:style-name="ce64" office:value-type="string" calcext:value-type="string">
            <text:p>Validar que cuando se de clic en el botón “FILTROS” se despliegue una ventana nueva donde se muestren los campos “Día inicio”, “Día fin”, “Horario inicio”, “Horario finalización” y “Estado”, adicional de mostrar una lista desplegable indicando la cantidad de registros a mostra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0-13</text:p>
          </table:table-cell>
          <table:table-cell table:style-name="ce64"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68" office:value-type="string" calcext:value-type="string">
            <text:p>CP10-14</text:p>
          </table:table-cell>
          <table:table-cell table:style-name="ce64" office:value-type="string" calcext:value-type="string">
            <text:p>Validar que cuando se de clic en alguno de los botones de “CSV”, “EXCEL”, “PDF” y “IMPRIMIR” el sistema descargue o genere el correspondiente archiv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1">
          <table:table-cell table:style-name="ce49" office:value-type="string" calcext:value-type="string" table:number-columns-spanned="2" table:number-rows-spanned="1">
            <text:p>CP11 – Configuración - Días no laborados</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21"/>
          <table:table-cell table:style-name="ce63" table:number-columns-repeated="16357"/>
        </table:table-row>
        <table:table-row table:style-name="ro7">
          <table:table-cell table:style-name="ce22" office:value-type="string" calcext:value-type="string">
            <text:p>CP11-01</text:p>
          </table:table-cell>
          <table:table-cell table:style-name="ce64" office:value-type="string" calcext:value-type="string">
            <text:p>Validar que cuando se ingrese al modulo se muestre una tabla con el listado de todos los días no laborales en el sistema</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1-02</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1-03</text:p>
          </table:table-cell>
          <table:table-cell table:style-name="ce64" office:value-type="string" calcext:value-type="string">
            <text:p>Validar que cuando se seleccione alguno de estos registros, en el botón dinámico de color naranja en la parte inferior se muestren las opciones “Agregar” y “Cambiar estad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1-04</text:p>
          </table:table-cell>
          <table:table-cell table:style-name="ce64" office:value-type="string" calcext:value-type="string">
            <text:p>Validar que cuando se de clic en la opción “Agregar” se despliegue el formulario de registro de un nuevo donde se puede seleccionar mas de una “fecha”, esto se puede hacer al seleccionar una opción en el calendario que se despliega</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1-05</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1-06</text:p>
          </table:table-cell>
          <table:table-cell table:style-name="ce64" office:value-type="string" calcext:value-type="string">
            <text:p>Validar que cuando se haga clic en el botón de guardar se muestre un mensaje de confirmación indicando que se ingreso de forma correcta una vez se diligencien todos los campos</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1-07</text:p>
          </table:table-cell>
          <table:table-cell table:style-name="ce64" office:value-type="string" calcext:value-type="string">
            <text:p>Validar que al dar clic en la opción “Cambiar estado” permita inactivar el dia festivo en caso de estar activo o de lo contrario, activar en caso de encontrarse inactivo; validar que siempre se encuentre un registro activo</text:p>
          </table:table-cell>
          <table:table-cell table:style-name="ce6" office:value-type="string" calcext:value-type="string">
            <text:p>ok</text:p>
          </table:table-cell>
          <table:table-cell table:style-name="ce16"/>
          <table:table-cell table:style-name="ce64" office:value-type="string" calcext:value-type="string">
            <text:p>se modifica etiqueta del estado en el back</text:p>
          </table:table-cell>
          <table:table-cell table:style-name="ce4"/>
          <table:table-cell table:number-columns-repeated="21"/>
          <table:table-cell table:style-name="ce63" table:number-columns-repeated="16357"/>
        </table:table-row>
        <table:table-row table:style-name="ro7">
          <table:table-cell table:style-name="ce22" office:value-type="string" calcext:value-type="string">
            <text:p>CP11-08</text:p>
          </table:table-cell>
          <table:table-cell table:style-name="ce64" office:value-type="string" calcext:value-type="string">
            <text:p>Validar que cuando se de clic en el botón “FILTROS” se despliegue una ventana nueva donde se muestren los campos relacionados a la fecha que no es laboral y “Estado”, adicional de mostrar una lista desplegable indicando la cantidad de registros a mostra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1-09</text:p>
          </table:table-cell>
          <table:table-cell table:style-name="ce64"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68" office:value-type="string" calcext:value-type="string">
            <text:p>CP11-10</text:p>
          </table:table-cell>
          <table:table-cell table:style-name="ce64" office:value-type="string" calcext:value-type="string">
            <text:p>Validar que cuando se de clic en alguno de los botones de “CSV”, “EXCEL”, “PDF” y “IMPRIMIR” el sistema descargue o genere el correspondiente archiv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1">
          <table:table-cell table:style-name="ce49" office:value-type="string" calcext:value-type="string" table:number-columns-spanned="2" table:number-rows-spanned="1">
            <text:p>CP12 – Configuración - Gestión de plantillas</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21"/>
          <table:table-cell table:style-name="ce63" table:number-columns-repeated="16357"/>
        </table:table-row>
        <table:table-row table:style-name="ro7">
          <table:table-cell table:style-name="ce22" office:value-type="string" calcext:value-type="string">
            <text:p>CP12-01</text:p>
          </table:table-cell>
          <table:table-cell table:style-name="ce64" office:value-type="string" calcext:value-type="string">
            <text:p>Validar que cuando se ingrese al modulo se muestre una tabla con el listado de plantillas configuradas en el sistema</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2-02</text:p>
          </table:table-cell>
          <table:table-cell table:style-name="ce64" office:value-type="string" calcext:value-type="string">
            <text:p>Validar que cuando se ingrese al modulo se muestre en la parte inferior los botón “CSV”, “EXCEL”, “PDF” y “IMPRIMI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2-03</text:p>
          </table:table-cell>
          <table:table-cell table:style-name="ce64" office:value-type="string" calcext:value-type="string">
            <text:p>Validar que cuando se seleccione alguno de estos registros, en el botón dinámico de color naranja en la parte inferior se muestren las opciones “Agregar”, “Editar”, “Descargar plantillas”, “Cambiar estad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2-04</text:p>
          </table:table-cell>
          <table:table-cell table:style-name="ce64" office:value-type="string" calcext:value-type="string">
            <text:p>Validar que cuando se de clic en la opción “Agregar” se despliegue el formulario de registro de un nueva plantilla, este formulario debe mostrar un campo donde se pueda seleccionar el archivo .docx y un campo donde se pueda ingresar el “nombre de la plantilla”</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6" office:value-type="string" calcext:value-type="string">
            <text:p>CP12-05</text:p>
          </table:table-cell>
          <table:table-cell table:style-name="ce64" office:value-type="string" calcext:value-type="string">
            <text:p>Validar que cuando se seleccione la plantilla a cargar se habilite el botón de cargar</text:p>
          </table:table-cell>
          <table:table-cell table:style-name="ce6" office:value-type="string" calcext:value-type="string">
            <text:p>ok</text:p>
          </table:table-cell>
          <table:table-cell table:style-name="ce16" office:value-type="string" calcext:value-type="string">
            <text:p>no permite cargar documento externo</text:p>
          </table:table-cell>
          <table:table-cell table:style-name="ce64"/>
          <table:table-cell table:style-name="ce4"/>
          <table:table-cell table:number-columns-repeated="21"/>
          <table:table-cell table:style-name="ce63" table:number-columns-repeated="16357"/>
        </table:table-row>
        <table:table-row table:style-name="ro7">
          <table:table-cell table:style-name="ce26" office:value-type="string" calcext:value-type="string">
            <text:p>CP12-06</text:p>
          </table:table-cell>
          <table:table-cell table:style-name="ce64" office:value-type="string" calcext:value-type="string">
            <text:p>Validar que cuando se cargue la plantilla de forma correcta se muestre un mensaje de confirmación indicando que se ingreso de forma correcta una vez se diligencien todos los campos</text:p>
          </table:table-cell>
          <table:table-cell table:style-name="ce6" office:value-type="string" calcext:value-type="string">
            <text:p>ok</text:p>
          </table:table-cell>
          <table:table-cell table:style-name="ce16" office:value-type="string" calcext:value-type="string">
            <text:p>no permite cargar documento externo</text:p>
          </table:table-cell>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2-07</text:p>
          </table:table-cell>
          <table:table-cell table:style-name="ce64" office:value-type="string" calcext:value-type="string">
            <text:p>Validar que cuando se seleccione uno de los registros y se de clic en la opción “Editar” se despliegue el formulario de registro con el nombre de la plantilla que se selecciono, dejando habilitado el campo del archivo para reemplazar el documento que ya esta cargad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2-08</text:p>
          </table:table-cell>
          <table:table-cell table:style-name="ce64" office:value-type="string" calcext:value-type="string">
            <text:p>Validar que al dar clic en la opción “Cambiar estado” permita inactivar la plantilla en caso de estar activo o de lo contrario, activar en caso de encontrarse inactivo; validar que siempre se encuentre un registro activ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2-09</text:p>
          </table:table-cell>
          <table:table-cell table:style-name="ce64" office:value-type="string" calcext:value-type="string">
            <text:p>Validar que al dar clic en la opción “Descargar plantillas”, esto debe permitir descargar el documento para que luego se pueda utilizar para el proceso de correspondencia</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68" office:value-type="string" calcext:value-type="string">
            <text:p>CP12-10</text:p>
          </table:table-cell>
          <table:table-cell table:style-name="ce64" office:value-type="string" calcext:value-type="string">
            <text:p>Validar que cuando se de clic en alguno de los botones de “CSV”, “EXCEL”, “PDF” y “IMPRIMIR” el sistema descargue o genere el correspondiente archiv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1">
          <table:table-cell table:style-name="ce49" office:value-type="string" calcext:value-type="string" table:number-columns-spanned="2" table:number-rows-spanned="1">
            <text:p>CP13 – Configuración - Variables plantillas</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21"/>
          <table:table-cell table:style-name="ce63" table:number-columns-repeated="16357"/>
        </table:table-row>
        <table:table-row table:style-name="ro7">
          <table:table-cell table:style-name="ce22" office:value-type="string" calcext:value-type="string">
            <text:p>CP13-01</text:p>
          </table:table-cell>
          <table:table-cell table:style-name="ce64" office:value-type="string" calcext:value-type="string">
            <text:p>Validar que cuando se ingrese al modulo se muestre una tabla con el listado de plantillas configuradas en el sistema</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3-02</text:p>
          </table:table-cell>
          <table:table-cell table:style-name="ce64" office:value-type="string" calcext:value-type="string">
            <text:p>Validar que cuando se ingrese al modulo se muestre en la parte inferior los botón “CSV”, “EXCEL”, “PDF” y “IMPRIMI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3-03</text:p>
          </table:table-cell>
          <table:table-cell table:style-name="ce64" office:value-type="string" calcext:value-type="string">
            <text:p>Validar que cuando se seleccione alguno de estos registros, en el botón dinámico de color naranja en la parte inferior se muestren las opciones “Agregar”, “Editar” y “Cambiar estad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3-04</text:p>
          </table:table-cell>
          <table:table-cell table:style-name="ce64" office:value-type="string" calcext:value-type="string">
            <text:p>Validar que cuando se de clic en la opción “Agregar” se despliegue el formulario de registro donde se puede ingresar la “variable” a utilizar en el sistema y un campo para ingresar la “descripción de la variable” a utiliza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3-05</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3-06</text:p>
          </table:table-cell>
          <table:table-cell table:style-name="ce64" office:value-type="string" calcext:value-type="string">
            <text:p>Validar que cuando se haga clic en el botón de guardar se muestre un mensaje de confirmación indicando que se ingreso de forma correcta una vez se diligencien todos los campos</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3-07</text:p>
          </table:table-cell>
          <table:table-cell table:style-name="ce64" office:value-type="string" calcext:value-type="string">
            <text:p>Validar que cuando se seleccione uno de los registros y se de clic en la opción “Editar” se despliegue el formulario de registro ya con la información diligenciada, es decir debe mostrar el nombre de la variable y la descripción que se habia dad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3-08</text:p>
          </table:table-cell>
          <table:table-cell table:style-name="ce64" office:value-type="string" calcext:value-type="string">
            <text:p>Validar que cuando se haga clic en el botón de guardar se muestre un mensaje de confirmación indicando que se actualizo la información de forma correcta</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6" office:value-type="string" calcext:value-type="string">
            <text:p>CP13-09</text:p>
          </table:table-cell>
          <table:table-cell table:style-name="ce64" office:value-type="string" calcext:value-type="string">
            <text:p>Validar que al dar clic en la opción “Cambiar estado” permita inactivar la variable de correspondencia en caso de estar activo o de lo contrario, activar en caso de encontrarse inactivo; validar que siempre se encuentre un registro activo</text:p>
          </table:table-cell>
          <table:table-cell table:style-name="ce6" office:value-type="string" calcext:value-type="string">
            <text:p>ok</text:p>
          </table:table-cell>
          <table:table-cell table:style-name="ce16" office:value-type="string" calcext:value-type="string">
            <text:p>Sale error de conexión</text:p>
          </table:table-cell>
          <table:table-cell table:style-name="ce64" office:value-type="string" calcext:value-type="string">
            <text:p>hacia falta signar argumentos al helper logAdd por lo que generaba error de conexion</text:p>
          </table:table-cell>
          <table:table-cell table:style-name="ce4"/>
          <table:table-cell table:number-columns-repeated="21"/>
          <table:table-cell table:style-name="ce63" table:number-columns-repeated="16357"/>
        </table:table-row>
        <table:table-row table:style-name="ro7">
          <table:table-cell table:style-name="ce70" office:value-type="string" calcext:value-type="string">
            <text:p>CP13-10</text:p>
          </table:table-cell>
          <table:table-cell table:style-name="ce64" office:value-type="string" calcext:value-type="string">
            <text:p>Validar que cuando se de clic en alguno de los botones de “CSV”, “EXCEL”, “PDF” y “IMPRIMIR” el sistema descargue o genere el correspondiente archiv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1">
          <table:table-cell table:style-name="ce49" office:value-type="string" calcext:value-type="string" table:number-columns-spanned="2" table:number-rows-spanned="1">
            <text:p>CP14 – Configuración - Usuarios interoperabilidad</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21"/>
          <table:table-cell table:style-name="ce63" table:number-columns-repeated="16357"/>
        </table:table-row>
        <table:table-row table:style-name="ro7">
          <table:table-cell table:style-name="ce22" office:value-type="string" calcext:value-type="string">
            <text:p>CP14-01</text:p>
          </table:table-cell>
          <table:table-cell table:style-name="ce64" office:value-type="string" calcext:value-type="string">
            <text:p>Validar que cuando se ingrese al modulo se muestre una tabla con el listado de usuarios interoperabilidad que pueden utilizar los servicios web del sistema</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4-02</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4-03</text:p>
          </table:table-cell>
          <table:table-cell table:style-name="ce64" office:value-type="string" calcext:value-type="string">
            <text:p>Validar que cuando se seleccione alguno de estos registros, en el botón dinámico de color naranja en la parte inferior se muestren las opciones “Agregar”, “Editar”, “Ver”, “Cambiar estad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4-04</text:p>
          </table:table-cell>
          <table:table-cell table:style-name="ce64" office:value-type="string" calcext:value-type="string">
            <text:p>Validar que cuando se de clic en la opción “Agregar” se despliegue el formulario de registro de un nuevo usuario de interoperabilidad, este formulario debe mostrar un campo donde se pueda ingresar el “Nombre”, el “Correo electrónico”, “Documento o nit”, “Tipo de identificación” y un “Listado de dependencias” donde se puede seleccionar la “Dependencia” correspondiente</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4-05</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4-06</text:p>
          </table:table-cell>
          <table:table-cell table:style-name="ce64" office:value-type="string" calcext:value-type="string">
            <text:p>Validar que cuando se haga clic en el botón de guardar se muestre un mensaje de confirmación indicando que se ingreso de forma correcta una vez se diligencien todos los campos</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4-07</text:p>
          </table:table-cell>
          <table:table-cell table:style-name="ce64" office:value-type="string" calcext:value-type="string">
            <text:p>Validar que cuando se seleccione uno de los registros y se de clic en la opción “Editar” se despliegue el formulario con la información que ya se habia diligenciado y que se encuentra asociado al registro seleccionad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4-08</text:p>
          </table:table-cell>
          <table:table-cell table:style-name="ce64" office:value-type="string" calcext:value-type="string">
            <text:p>Validar que cuando se haga clic en el botón de guradar se muestre un mensaje de confirmación indicando que se actualizo la información de forma correcta</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4-09</text:p>
          </table:table-cell>
          <table:table-cell table:style-name="ce64" office:value-type="string" calcext:value-type="string">
            <text:p>Validar que al dar clic en la opción “Cambiar estado” permita inactivar el usuario de interoperabilidad en caso de estar activo o de lo contrario, activar en caso de encontrarse inactiv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4-10</text:p>
          </table:table-cell>
          <table:table-cell table:style-name="ce64" office:value-type="string" calcext:value-type="string">
            <text:p>Validar que al dar clic en la opción “Ver”, se muestre una ventana donde se vea el detalle de la información del usuario de interoperabilidad</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4-11</text:p>
          </table:table-cell>
          <table:table-cell table:style-name="ce64" office:value-type="string" calcext:value-type="string">
            <text:p>Validar que se despliegue el formulario de usuario interoperabilidad, cuando se de clic en la opción de “Actualiza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4-12</text:p>
          </table:table-cell>
          <table:table-cell table:style-name="ce64" office:value-type="string" calcext:value-type="string">
            <text:p>Validar que cuando se de clic en el botón “FILTROS” se despliegue una ventana nueva donde se muestren los campos “Nombre del Proveedor”, “Estado” y “Rangos de fechas”, adicional de mostrar una lista desplegable indicando la cantidad de registros a mostra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4-13</text:p>
          </table:table-cell>
          <table:table-cell table:style-name="ce64"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68" office:value-type="string" calcext:value-type="string">
            <text:p>CP14-14</text:p>
          </table:table-cell>
          <table:table-cell table:style-name="ce64" office:value-type="string" calcext:value-type="string">
            <text:p>Validar que cuando se de clic en alguno de los botones de “CSV”, “EXCEL”, “PDF” y “IMPRIMIR” el sistema descargue o genere el correspondiente archiv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1">
          <table:table-cell table:style-name="ce49" office:value-type="string" calcext:value-type="string" table:number-columns-spanned="2" table:number-rows-spanned="1">
            <text:p>CP15 – Configuración - Encuesta de satisfacción</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21"/>
          <table:table-cell table:style-name="ce63" table:number-columns-repeated="16357"/>
        </table:table-row>
        <table:table-row table:style-name="ro7">
          <table:table-cell table:style-name="ce22" office:value-type="string" calcext:value-type="string">
            <text:p>CP15-01</text:p>
          </table:table-cell>
          <table:table-cell table:style-name="ce64" office:value-type="string" calcext:value-type="string">
            <text:p>Validar que cuando se ingrese al modulo se muestre una tabla con el listado de encuestas de satisfacción las cuales estan configuradas en el sistema y la activa la que se envie al cliente</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5-02</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5-03</text:p>
          </table:table-cell>
          <table:table-cell table:style-name="ce64" office:value-type="string" calcext:value-type="string">
            <text:p>Validar que cuando se seleccione alguno de estos registros, en el botón dinámico de color naranja en la parte inferior se muestren las opciones “Agregar”, “Editar”, “Ver”, “Cambiar estad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5-04</text:p>
          </table:table-cell>
          <table:table-cell table:style-name="ce64" office:value-type="string" calcext:value-type="string">
            <text:p>Validar que cuando se de clic en la opción “Agregar” se despliegue el formulario de registro de una Nueva encuesta, este formulario debe mostrar un campo donde se pueda ingresar el “Nombre encuesta” y un botón de “AGREGA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5-05</text:p>
          </table:table-cell>
          <table:table-cell table:style-name="ce64" office:value-type="string" calcext:value-type="string">
            <text:p>Validar que al dar clic en el botón de “AGREGAR” se despliegue un campo de texto para ingresar la pregunta que se va a aplicar en la encuenta a envia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5-06</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5-07</text:p>
          </table:table-cell>
          <table:table-cell table:style-name="ce64" office:value-type="string" calcext:value-type="string">
            <text:p>Validar que cuando se haga clic en el botón de guardar se muestre un mensaje de confirmación indicando que se ingreso de forma correcta una vez se diligencien todos los campos</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5-08</text:p>
          </table:table-cell>
          <table:table-cell table:style-name="ce64" office:value-type="string" calcext:value-type="string">
            <text:p>Validar que cuando se seleccione uno de los registros y se de clic en la opción “Editar” se despliegue el formulario con la información que ya se habia diligenciado y que se encuentra asociado al registro seleccionad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29">
          <table:table-cell table:style-name="ce22" office:value-type="string" calcext:value-type="string">
            <text:p>CP15-09</text:p>
          </table:table-cell>
          <table:table-cell table:style-name="ce64" office:value-type="string" calcext:value-type="string">
            <text:p>Validar que cuando se haga clic en el botón de guradar se muestre un mensaje de confirmación indicando que se actualizo la información de forma correcta</text:p>
          </table:table-cell>
          <table:table-cell table:style-name="ce6" office:value-type="string" calcext:value-type="string">
            <text:p>ok</text:p>
          </table:table-cell>
          <table:table-cell table:style-name="ce16"/>
          <table:table-cell table:style-name="ce64" office:value-type="string" calcext:value-type="string">
            <text:p>Sale error de conexión cuando se modifica una pregunta para el caso de una pregunta que tiene varias opciones para chequear, y se elimina algun campo, y tambien cuando se agrega opción de selección multiple /var/www/html/ng_backend/api/modules/version1/controllers/configuracionApp/EncuestasController.php line 555 ……. Undefined array key 2 "NO GENERO NIINGUN ERROR"</text:p>
          </table:table-cell>
          <table:table-cell table:style-name="ce4"/>
          <table:table-cell table:number-columns-repeated="21"/>
          <table:table-cell table:style-name="ce63" table:number-columns-repeated="16357"/>
        </table:table-row>
        <table:table-row table:style-name="ro7">
          <table:table-cell table:style-name="ce22" office:value-type="string" calcext:value-type="string">
            <text:p>CP15-10</text:p>
          </table:table-cell>
          <table:table-cell table:style-name="ce64" office:value-type="string" calcext:value-type="string">
            <text:p>Validar que al dar clic en la opción “Cambiar estado” permita inactivar la encuesta de satisfacción en caso de estar activo o de lo contrario, activar en caso de encontrarse inactiv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5-11</text:p>
          </table:table-cell>
          <table:table-cell table:style-name="ce64" office:value-type="string" calcext:value-type="string">
            <text:p>Validar que al dar clic en la opción “Ver”, se muestre una ventana donde se vea el detalle de la información de la encuesta de satisfacción, donde se listan cada una de las preguntas que se configuraron a la encuesta</text:p>
          </table:table-cell>
          <table:table-cell table:style-name="ce6" office:value-type="string" calcext:value-type="string">
            <text:p>ok</text:p>
          </table:table-cell>
          <table:table-cell table:style-name="ce16"/>
          <table:table-cell table:style-name="ce64" office:value-type="string" calcext:value-type="string">
            <text:p>se implementa una validacion en el front que generaba conflicto en la captura de los datos</text:p>
          </table:table-cell>
          <table:table-cell table:style-name="ce4"/>
          <table:table-cell table:number-columns-repeated="21"/>
          <table:table-cell table:style-name="ce63" table:number-columns-repeated="16357"/>
        </table:table-row>
        <table:table-row table:style-name="ro7">
          <table:table-cell table:style-name="ce22" office:value-type="string" calcext:value-type="string">
            <text:p>CP15-12</text:p>
          </table:table-cell>
          <table:table-cell table:style-name="ce64" office:value-type="string" calcext:value-type="string">
            <text:p>Validar que se despliegue el formulario de Actualizar encuesta, cuando se de clic en la opción de “Actualiza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5-13</text:p>
          </table:table-cell>
          <table:table-cell table:style-name="ce64" office:value-type="string" calcext:value-type="string">
            <text:p>Validar que cuando se de clic en el botón “FILTROS” se despliegue una ventana nueva donde se muestren los campos “Nombre encuesta”, “Estado” y “Rangos de fechas”, adicional de mostrar una lista desplegable indicando la cantidad de registros a mostra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5-14</text:p>
          </table:table-cell>
          <table:table-cell table:style-name="ce64"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68" office:value-type="string" calcext:value-type="string">
            <text:p>CP15-15</text:p>
          </table:table-cell>
          <table:table-cell table:style-name="ce64" office:value-type="string" calcext:value-type="string">
            <text:p>Validar que cuando se de clic en alguno de los botones de “CSV”, “EXCEL”, “PDF” y “IMPRIMIR” el sistema descargue o genere el correspondiente archiv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1">
          <table:table-cell table:style-name="ce49" office:value-type="string" calcext:value-type="string" table:number-columns-spanned="2" table:number-rows-spanned="1">
            <text:p>CP16 – Configuración - Principal y regionales</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21"/>
          <table:table-cell table:style-name="ce63" table:number-columns-repeated="16357"/>
        </table:table-row>
        <table:table-row table:style-name="ro7">
          <table:table-cell table:style-name="ce22" office:value-type="string" calcext:value-type="string">
            <text:p>CP16-01</text:p>
          </table:table-cell>
          <table:table-cell table:style-name="ce64" office:value-type="string" calcext:value-type="string">
            <text:p>Validar que cuando se ingrese al modulo se muestre una tabla con lista principal y regionales las cuales estan configuradas en el sistema</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6-02</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6-03</text:p>
          </table:table-cell>
          <table:table-cell table:style-name="ce64" office:value-type="string" calcext:value-type="string">
            <text:p>Validar que cuando se seleccione alguno de estos registros, en el botón dinámico de color naranja en la parte inferior se muestren las opciones “Agregar”, “Editar”, “Ver”, “Cambiar estad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68" office:value-type="string" calcext:value-type="string">
            <text:p>CP016-04</text:p>
          </table:table-cell>
          <table:table-cell table:style-name="ce64" office:value-type="string" calcext:value-type="string">
            <text:p>Validar que cuando no se ha seleccionado ningun registro y se de clic en el botón naranja, se muestren las opciones “Agregar” y “Proceso Masiv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68" office:value-type="string" calcext:value-type="string">
            <text:p>CP016-05</text:p>
          </table:table-cell>
          <table:table-cell table:style-name="ce64" office:value-type="string" calcext:value-type="string">
            <text:p>Validar que al dar clic en la opción “proceso Masivo” se muestre campo para cargar archiv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68" office:value-type="string" calcext:value-type="string">
            <text:p>CP016-06</text:p>
          </table:table-cell>
          <table:table-cell table:style-name="ce64" office:value-type="string" calcext:value-type="string">
            <text:p>Validar que al dar clic en la opción “proceso Masivo” se muestre botón de Descargar Format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68" office:value-type="string" calcext:value-type="string">
            <text:p>CP016-07</text:p>
          </table:table-cell>
          <table:table-cell table:style-name="ce64" office:value-type="string" calcext:value-type="string">
            <text:p>Validar que cuando se descargue el formato de usuarios, este se descargue con las columnas "Nombre completo”, “Sigla” y “Municipio”</text:p>
          </table:table-cell>
          <table:table-cell table:style-name="ce6" office:value-type="string" calcext:value-type="string">
            <text:p>ok</text:p>
          </table:table-cell>
          <table:table-cell table:style-name="ce16"/>
          <table:table-cell table:style-name="ce64" office:value-type="string" calcext:value-type="string">
            <text:p>Si se descarga el formato de usurios, pero Selenium IDE no puede validar el contenido interno de un archivo Excel descargado.</text:p>
          </table:table-cell>
          <table:table-cell table:style-name="ce4"/>
          <table:table-cell table:number-columns-repeated="21"/>
          <table:table-cell table:style-name="ce63" table:number-columns-repeated="16357"/>
        </table:table-row>
        <table:table-row table:style-name="ro25">
          <table:table-cell table:style-name="ce68" office:value-type="string" calcext:value-type="string">
            <text:p>CP016-08</text:p>
          </table:table-cell>
          <table:table-cell table:style-name="ce64" office:value-type="string" calcext:value-type="string">
            <text:p>Validar que cuando se cargue el archivo, si hay alguna columna que es obligatoria y se encuentra vacia, se debe mostrar un mensaje de error que indique la fila y el campo donde se encuentra el error adicional de mostrar el nombre de la columna. Ej: “Fila 2 error en columna (Municipio), no puede ser vacía,Fila 2 error en columna (Municipio), no puede ser vacía,Fila 2 error en columna (Sigla), el valor ingresado: , no es válido”</text:p>
          </table:table-cell>
          <table:table-cell table:style-name="ce6" office:value-type="string" calcext:value-type="string">
            <text:p>ok</text:p>
          </table:table-cell>
          <table:table-cell table:style-name="ce16"/>
          <table:table-cell table:style-name="ce64" office:value-type="string" calcext:value-type="string">
            <text:p>Ya se hizo la prueba, pero el cargue de archivos solo es compatible con Chrome, pero si muestra el mensaje de error.</text:p>
          </table:table-cell>
          <table:table-cell table:style-name="ce4"/>
          <table:table-cell table:number-columns-repeated="21"/>
          <table:table-cell table:style-name="ce63" table:number-columns-repeated="16357"/>
        </table:table-row>
        <table:table-row table:style-name="ro7">
          <table:table-cell table:style-name="ce68" office:value-type="string" calcext:value-type="string">
            <text:p>CP016-09</text:p>
          </table:table-cell>
          <table:table-cell table:style-name="ce64" office:value-type="string" calcext:value-type="string">
            <text:p>Validar que cuando se cargue el archivo y todo este correcto se muestre mensaje de confirmación</text:p>
          </table:table-cell>
          <table:table-cell table:style-name="ce6" office:value-type="string" calcext:value-type="string">
            <text:p>ok</text:p>
          </table:table-cell>
          <table:table-cell table:style-name="ce16"/>
          <table:table-cell table:style-name="ce64" office:value-type="string" calcext:value-type="string">
            <text:p>Ya se hizo la prueba, pero el cargue de archivos solo es compatible con Chrome.</text:p>
          </table:table-cell>
          <table:table-cell table:style-name="ce4"/>
          <table:table-cell table:number-columns-repeated="21"/>
          <table:table-cell table:style-name="ce63" table:number-columns-repeated="16357"/>
        </table:table-row>
        <table:table-row table:style-name="ro7">
          <table:table-cell table:style-name="ce22" office:value-type="string" calcext:value-type="string">
            <text:p>CP16-04</text:p>
          </table:table-cell>
          <table:table-cell table:style-name="ce64" office:value-type="string" calcext:value-type="string">
            <text:p>Validar que cuando se de clic en la opción “Agregar” se despliegue el formulario de registro para agregar una nueva regional o seccional en el sistema, este formulario debe solicitar el “Nombre regional”, “Sigla regional”, “Pais”, “Departamento” y “Municipi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6-05</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6-06</text:p>
          </table:table-cell>
          <table:table-cell table:style-name="ce64" office:value-type="string" calcext:value-type="string">
            <text:p>Validar que cuando se haga clic en el botón de guardar se muestre un mensaje de confirmación indicando que se ingreso de forma correcta una vez se diligencien todos los campos</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6-07</text:p>
          </table:table-cell>
          <table:table-cell table:style-name="ce64" office:value-type="string" calcext:value-type="string">
            <text:p>Validar que cuando se seleccione uno de los registros y se de clic en la opción “Editar” se despliegue el formulario con la información que ya se habia diligenciado y que se encuentra asociado al registro seleccionado</text:p>
          </table:table-cell>
          <table:table-cell table:style-name="ce6" office:value-type="string" calcext:value-type="string">
            <text:p>ok</text:p>
          </table:table-cell>
          <table:table-cell table:style-name="ce16"/>
          <table:table-cell table:style-name="ce64"/>
          <table:table-cell table:style-name="ce4"/>
          <table:table-cell table:number-columns-repeated="21"/>
          <table:table-cell table:style-name="ce63" table:number-columns-repeated="16357"/>
        </table:table-row>
        <table:table-row table:style-name="ro7">
          <table:table-cell table:style-name="ce22" office:value-type="string" calcext:value-type="string">
            <text:p>CP16-08</text:p>
          </table:table-cell>
          <table:table-cell table:style-name="ce64" office:value-type="string" calcext:value-type="string">
            <text:p>Validar que cuando se haga clic en el botón de guradar se muestre un mensaje de confirmación indicando que se actualizo la información de forma correcta</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16-09</text:p>
          </table:table-cell>
          <table:table-cell table:style-name="ce64" office:value-type="string" calcext:value-type="string">
            <text:p>Validar que al dar clic en la opción “Cambiar estado” permita inactivar la regional en caso de estar activo o de lo contrario, activar en caso de encontrarse inactiv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16-10</text:p>
          </table:table-cell>
          <table:table-cell table:style-name="ce64" office:value-type="string" calcext:value-type="string">
            <text:p>Validar que al dar clic en la opción “Ver”, se muestre una ventana donde se vea el detalle de las regionales que estan configuradas en el sistema</text:p>
          </table:table-cell>
          <table:table-cell table:style-name="ce6" office:value-type="string" calcext:value-type="string">
            <text:p>ok</text:p>
          </table:table-cell>
          <table:table-cell table:style-name="ce16"/>
          <table:table-cell table:style-name="ce64" office:value-type="string" calcext:value-type="string">
            <text:p>se implementa una validacion en el front que generaba conflicto en la captura de los datos</text:p>
          </table:table-cell>
          <table:table-cell table:style-name="ce4"/>
          <table:table-cell table:number-columns-repeated="16378"/>
        </table:table-row>
        <table:table-row table:style-name="ro7">
          <table:table-cell table:style-name="ce22" office:value-type="string" calcext:value-type="string">
            <text:p>CP16-11</text:p>
          </table:table-cell>
          <table:table-cell table:style-name="ce64" office:value-type="string" calcext:value-type="string">
            <text:p>Validar que se despliegue el formulario de Actualizar regional, cuando se de clic en la opción de “Actualiza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16-12</text:p>
          </table:table-cell>
          <table:table-cell table:style-name="ce64" office:value-type="string" calcext:value-type="string">
            <text:p>Validar que cuando se de clic en el botón “FILTROS” se despliegue una ventana nueva donde se muestren los campos “Nombre de la regional”, “Pais”, “Departamento”, “Municipio”, “Estado” y “Rangos de fechas”, adicional de mostrar una lista desplegable indicando la cantidad de registros a mostrar</text:p>
          </table:table-cell>
          <table:table-cell table:style-name="ce6" office:value-type="string" calcext:value-type="string">
            <text:p>ok</text:p>
          </table:table-cell>
          <table:table-cell table:style-name="ce16"/>
          <table:table-cell table:style-name="ce27"/>
          <table:table-cell table:style-name="ce4"/>
          <table:table-cell table:number-columns-repeated="16378"/>
        </table:table-row>
        <table:table-row table:style-name="ro7">
          <table:table-cell table:style-name="ce22" office:value-type="string" calcext:value-type="string">
            <text:p>CP16-13</text:p>
          </table:table-cell>
          <table:table-cell table:style-name="ce64"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8" office:value-type="string" calcext:value-type="string">
            <text:p>CP16-14</text:p>
          </table:table-cell>
          <table:table-cell table:style-name="ce64" office:value-type="string" calcext:value-type="string">
            <text:p>Validar que cuando se de clic en alguno de los botones de “CSV”, “EXCEL”, “PDF” y “IMPRIMIR” el sistema descargue o genere el correspondiente archiv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17 – Configuración - Configuración del radicado</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17-01</text:p>
          </table:table-cell>
          <table:table-cell table:style-name="ce64" office:value-type="string" calcext:value-type="string">
            <text:p>Validar que cuando se ingrese a la opción de “Configuarción del Radicado”, se despliegue el formulario de configurar un radicado, esto despliega un campo de “Longitud de dependencia”, “Estructura del radicado” y “Longitud de consecutiv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17-02</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6" office:value-type="string" calcext:value-type="string">
            <text:p>CP17-03</text:p>
          </table:table-cell>
          <table:table-cell table:style-name="ce64" office:value-type="string" calcext:value-type="string">
            <text:p>Validar que cuando se haga clic en el botón de guardar se muestre un mensaje de confirmación indicando que se ingreso de forma correcta una vez se diligencien todos los campo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17-04</text:p>
          </table:table-cell>
          <table:table-cell table:style-name="ce64" office:value-type="string" calcext:value-type="string">
            <text:p>Validar que cuando se intente cambiar la información de esta configuración, si por lo menos hay 1 radicado creado, si es asi, debe mostrar mensaje “No se permite cambiar la estructura definida porque ya se han generado radicados en el sistema”</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18 – Configuración - Configuración general</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30">
          <table:table-cell table:style-name="ce22" office:value-type="string" calcext:value-type="string">
            <text:p>CP18-01</text:p>
          </table:table-cell>
          <table:table-cell table:style-name="ce64" office:value-type="string" calcext:value-type="string">
            <text:p>Validar que cuando se ingrese a la opción de “Configuración general”, se despliegue el formulario con 11 secciones asociada a la configuración incial del sistema, cada una de estas secciones se llaman “Configuración inicial”, “Configuración de contraseña”, “Configuración PQRSD”, “Configuración de prestaciones”, “Configuración servidores de correo electrónico”, “Configuracion servidor de autenticación LDAP”, “Configuración logo del cliente”, “Configuración del cliente”, “Configuración de almacenamiento”, “Configuración de MFA” y “Configuración Envío de Notificacione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18-02</text:p>
          </table:table-cell>
          <table:table-cell table:style-name="ce64" office:value-type="string" calcext:value-type="string">
            <text:p>Validar que en la sección “Configuración inicial” se muestren los campos de “Tamaño de archivo”, “Tiempo de inactividad de la sesión en minutos” y el “Correo administrador transferencias documentale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18-03</text:p>
          </table:table-cell>
          <table:table-cell table:style-name="ce64" office:value-type="string" calcext:value-type="string">
            <text:p>Validar que en la sección “Configuración de contraseña” se muestren los campos de “Vigencia de la contraseña”, “Número de intentos fallidos”, “Longitud minima”, “Longitud maxima”, adicional de mostrar las opciones para configurar la complejidad de la contraseña “Alfanumericos”, “Caracteres especiales” y “Caracteres en mayúscula”</text:p>
          </table:table-cell>
          <table:table-cell table:style-name="ce6" office:value-type="string" calcext:value-type="string">
            <text:p>ok</text:p>
          </table:table-cell>
          <table:table-cell table:style-name="ce16"/>
          <table:table-cell table:style-name="ce64" office:value-type="string" calcext:value-type="string">
            <text:p>no se muestra lo que ya existe en la base de datos asociada a la configuración de la contraseña de los usuario</text:p>
          </table:table-cell>
          <table:table-cell table:style-name="ce4"/>
          <table:table-cell table:number-columns-repeated="16378"/>
        </table:table-row>
        <table:table-row table:style-name="ro7">
          <table:table-cell table:style-name="ce22" office:value-type="string" calcext:value-type="string">
            <text:p>CP18-04</text:p>
          </table:table-cell>
          <table:table-cell table:style-name="ce64" office:value-type="string" calcext:value-type="string">
            <text:p>Validar que en la sección “Configuración PQRSD” se muestren los campos de “Correo electrónico administrador PQRSD”, “Días de notificación antes de vencimiento”, “Dependencia responsable”, “Días habiles para el ciudadano responder” y “Terminos y Condicione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18-05</text:p>
          </table:table-cell>
          <table:table-cell table:style-name="ce64" office:value-type="string" calcext:value-type="string">
            <text:p>Validar que en la sección “Configuración de prestaciones” se muestren los campos de “tipo radicado resoluciones”, “Nombre tipo radicado resoluciones”, “Codigo dependencia prestaciones economicas”, “Id tipo documental paz y salvo” y una opción de “Resolucione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18-06</text:p>
          </table:table-cell>
          <table:table-cell table:style-name="ce64" office:value-type="string" calcext:value-type="string">
            <text:p>Validar que en la sección “Configuración servidores de correo electrónico” se muestren las opciones de “Configuración SMTP”, donde se pueda ingresar la información “Dirección servidor”, “Usuario de notificaciones”, “Contraseña”, “Puerto”, “Seguridad de conexión” y “Tipo de autenticación”</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18-07</text:p>
          </table:table-cell>
          <table:table-cell table:style-name="ce64" office:value-type="string" calcext:value-type="string">
            <text:p>Validar que en la sección “Configuración servidores de correo electrónico” se muestren las opciones de “Configuración IMAP”, donde se pueda ingresar la información “Tipo de autenticación”, “activar”, “Dominio de conexión”, “Dirección Servidor”, “Puerto” y “Seguridad de conexión”</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18-08</text:p>
          </table:table-cell>
          <table:table-cell table:style-name="ce64" office:value-type="string" calcext:value-type="string">
            <text:p>Validar que en la sección “Configuracion servidor de autenticación LDAP” se muestren los campos de “Dirección dervidor #1”, “Dirección Servidor #2”, “Usuario de autenticación”, “Contraseña”, “Puerto”, “Seguridad de conexión”, “Campo de busqueda” y “Rama de autenticación”</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8" office:value-type="string" calcext:value-type="string">
            <text:p>CP18-09</text:p>
          </table:table-cell>
          <table:table-cell table:style-name="ce64" office:value-type="string" calcext:value-type="string">
            <text:p>Validar que en la sección “Configuración logo del cliente” se muestre un botón para subir un archiv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18-10</text:p>
          </table:table-cell>
          <table:table-cell table:style-name="ce64" office:value-type="string" calcext:value-type="string">
            <text:p>Validar que en la sección “Configuración del cliente” se muestren los campos de “Nombre del Cliente”, “Fondo del Cliente”, “Nit del Cliente”, “Etiqueta del cliente”, “Entidad del cliente”, “Región del cliente”, “Pais”, “Departamento” y “Municipi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8" office:value-type="string" calcext:value-type="string">
            <text:p>CP18-11</text:p>
          </table:table-cell>
          <table:table-cell table:style-name="ce64" office:value-type="string" calcext:value-type="string">
            <text:p>Validar que en la sección “Configuración de almacenamiento” se muestre los campos <text:s/>de “Proveedor de almacenamiento” y “Directorio base”</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8" office:value-type="string" calcext:value-type="string">
            <text:p>CP18-12</text:p>
          </table:table-cell>
          <table:table-cell table:style-name="ce64" office:value-type="string" calcext:value-type="string">
            <text:p>Validar que en la sección “Configuración de MFA” se muestre una opción para activar y desactiva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8" office:value-type="string" calcext:value-type="string">
            <text:p>CP18-13</text:p>
          </table:table-cell>
          <table:table-cell table:style-name="ce64"/>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18-14</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31">
          <table:table-cell table:style-name="ce22" office:value-type="string" calcext:value-type="string">
            <text:p>CP18-15</text:p>
          </table:table-cell>
          <table:table-cell table:style-name="ce64" office:value-type="string" calcext:value-type="string">
            <text:p>Validar que cuando se haga clic en el botón de guardar se muestre un mensaje de confirmación indicando que se ingreso de forma correcta una vez se diligencien todos los campos</text:p>
          </table:table-cell>
          <table:table-cell table:style-name="ce6" office:value-type="string" calcext:value-type="string">
            <text:p>ok</text:p>
          </table:table-cell>
          <table:table-cell table:style-name="ce16"/>
          <table:table-cell table:style-name="ce64" office:value-type="string" calcext:value-type="string">
            <text:p>Sale error de conexión cuando se intenta guardar la información modificada en el formulario ["23000", 1062, "Duplicate entry ' bodega' for key 'diskcgTipoAlmacenamiento_ibfk₁"] …… /var/www/html/ng_backend/api/modules/version1/controllers/configuracionApp/ConfiguracionGeneralController.php(317)</text:p>
          </table:table-cell>
          <table:table-cell table:style-name="ce4"/>
          <table:table-cell table:number-columns-repeated="16378"/>
        </table:table-row>
        <table:table-row table:style-name="ro1">
          <table:table-cell table:style-name="ce49" office:value-type="string" calcext:value-type="string" table:number-columns-spanned="2" table:number-rows-spanned="1">
            <text:p>CP19 – Configuración - Etiqueta radicación</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19-01</text:p>
          </table:table-cell>
          <table:table-cell table:style-name="ce64" office:value-type="string" calcext:value-type="string">
            <text:p>Validar que cuando se ingrese al modulo se muestre una tabla con el listado de todas las variables y datos a mostrar en la etiqueta de radicación</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19-02</text:p>
          </table:table-cell>
          <table:table-cell table:style-name="ce64" office:value-type="string" calcext:value-type="string">
            <text:p>Validar que cuando se ingrese al modulo se muestre en la parte inferior los botón “CSV”, “EXCEL”, “PDF” y “IMPRIMI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19-03</text:p>
          </table:table-cell>
          <table:table-cell table:style-name="ce64" office:value-type="string" calcext:value-type="string">
            <text:p>Validar que cuando se seleccione alguno de estos registros, en el botón dinámico de color naranja en la parte inferior se muestren las opciones <text:s/>“Cambiar est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8" office:value-type="string" calcext:value-type="string">
            <text:p>CP19-04</text:p>
          </table:table-cell>
          <table:table-cell table:style-name="ce64" office:value-type="string" calcext:value-type="string">
            <text:p>Validar que cuando se de clic en alguno de los botones de “CSV”, “EXCEL”, “PDF” y “IMPRIMIR” el sistema descargue o genere el correspondiente archiv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20 – Configuración - Gestión terceros</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20-01</text:p>
          </table:table-cell>
          <table:table-cell table:style-name="ce64" office:value-type="string" calcext:value-type="string">
            <text:p>Validar que cuando se ingrese al modulo se muestre una tabla con el listado de todos los terceros que se encuentran creados en el sistema</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0-02</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0-03</text:p>
          </table:table-cell>
          <table:table-cell table:style-name="ce64" office:value-type="string" calcext:value-type="string">
            <text:p>Validar que cuando se seleccione alguno de estos registros, en el botón dinámico de color naranja en la parte inferior se muestren las opciones “Agregar”, “Editar”, “Ver”, “Cambiar estado” y “Proceso Masiva”</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32">
          <table:table-cell table:style-name="ce22" office:value-type="string" calcext:value-type="string">
            <text:p>CP20-04</text:p>
          </table:table-cell>
          <table:table-cell table:style-name="ce64" office:value-type="string" calcext:value-type="string">
            <text:p>Validar que cuando se de clic en la opción “Agregar” se despliegue el formulario de registro para agregar un cliente en el sistema, de este formulario se ingresa información “Tipo de persona”, “Nombre o razón social”, “Primer apellido/representante legal”, “Documento o NIT”, “Dirección”, “Pais”, “Departamento”, “Municipio”, “Email” y “Telefono”, adicional una opción que se llama “Datos de caracterización”</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0-05</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0-06</text:p>
          </table:table-cell>
          <table:table-cell table:style-name="ce64" office:value-type="string" calcext:value-type="string">
            <text:p>Validar que cuando se haga clic en el botón de guardar se muestre un mensaje de confirmación indicando que se ingreso de forma correcta una vez se diligencien todos los campo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0-07</text:p>
          </table:table-cell>
          <table:table-cell table:style-name="ce64" office:value-type="string" calcext:value-type="string">
            <text:p>Validar que cuando se seleccione la opción “Datos de caracterización” se habilite los campos de “Genero”, “Rango de edad”, “Vulnerabilidad” y “Etnia”, al tener esta opción activa se deben validar los campos de lo contrario no se validan los campo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5" office:value-type="string" calcext:value-type="string">
            <text:p>CP20-08</text:p>
          </table:table-cell>
          <table:table-cell table:style-name="ce64" office:value-type="string" calcext:value-type="string">
            <text:p>Validar que en el campo de documento o Nit, en caso de ingresar “0000” se asigne un consecutivo de forma automatica para el remitente/destinatario que se esta creando</text:p>
          </table:table-cell>
          <table:table-cell table:style-name="ce6" office:value-type="string" calcext:value-type="string">
            <text:p>ok</text:p>
          </table:table-cell>
          <table:table-cell table:style-name="ce16" office:value-type="string" calcext:value-type="string">
            <text:p>sale error al poner 0000. dice que ya existe el doc</text:p>
          </table:table-cell>
          <table:table-cell table:style-name="ce64"/>
          <table:table-cell table:style-name="ce4"/>
          <table:table-cell table:number-columns-repeated="16378"/>
        </table:table-row>
        <table:table-row table:style-name="ro7">
          <table:table-cell table:style-name="ce65" office:value-type="string" calcext:value-type="string">
            <text:p>CP20-09</text:p>
          </table:table-cell>
          <table:table-cell table:style-name="ce64" office:value-type="string" calcext:value-type="string">
            <text:p>Validar que el campo correo electronico valide la estructura del correo electronico</text:p>
          </table:table-cell>
          <table:table-cell table:style-name="ce6" office:value-type="string" calcext:value-type="string">
            <text:p>ok</text:p>
          </table:table-cell>
          <table:table-cell table:style-name="ce16" office:value-type="string" calcext:value-type="string">
            <text:p>deja crear el tercero con correo errado</text:p>
          </table:table-cell>
          <table:table-cell table:style-name="ce64" office:value-type="string" calcext:value-type="string">
            <text:p>implementacion de validaciones sobre la estructura del email del cliente</text:p>
          </table:table-cell>
          <table:table-cell table:style-name="ce4"/>
          <table:table-cell table:number-columns-repeated="16378"/>
        </table:table-row>
        <table:table-row table:style-name="ro7">
          <table:table-cell table:style-name="ce65" office:value-type="string" calcext:value-type="string">
            <text:p>CP20-10</text:p>
          </table:table-cell>
          <table:table-cell table:style-name="ce64" office:value-type="string" calcext:value-type="string">
            <text:p>Validar que el campo correo electronico no acepte un correo que ya lo posee otro tercero</text:p>
          </table:table-cell>
          <table:table-cell table:style-name="ce6" office:value-type="string" calcext:value-type="string">
            <text:p>ok</text:p>
          </table:table-cell>
          <table:table-cell table:style-name="ce16" office:value-type="string" calcext:value-type="string">
            <text:p>deja pasar correo existente</text:p>
          </table:table-cell>
          <table:table-cell table:style-name="ce64" office:value-type="string" calcext:value-type="string">
            <text:p>se valida que cuando ya posee un correo registrado, vacie el campo de correo</text:p>
          </table:table-cell>
          <table:table-cell table:style-name="ce4"/>
          <table:table-cell table:number-columns-repeated="16378"/>
        </table:table-row>
        <table:table-row table:style-name="ro7">
          <table:table-cell table:style-name="ce22" office:value-type="string" calcext:value-type="string">
            <text:p>CP20-11</text:p>
          </table:table-cell>
          <table:table-cell table:style-name="ce64" office:value-type="string" calcext:value-type="string">
            <text:p>Validar que cuando se seleccione uno de los registros y se de clic en la opción “Editar” se despliegue el formulario con la información que ya se habia diligenciado y que se encuentra asociado al registro seleccion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0-12</text:p>
          </table:table-cell>
          <table:table-cell table:style-name="ce64" office:value-type="string" calcext:value-type="string">
            <text:p>Validar que cuando se haga clic en el botón de guradar se muestre un mensaje de confirmación indicando que se actualizo la información de forma correcta</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0-13</text:p>
          </table:table-cell>
          <table:table-cell table:style-name="ce64" office:value-type="string" calcext:value-type="string">
            <text:p>Validar que al dar clic en la opción “Cambiar estado” permita inactivar el tercero en caso de estar activo o de lo contrario, activar en caso de encontrarse inactiv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25">
          <table:table-cell table:style-name="ce22" office:value-type="string" calcext:value-type="string">
            <text:p>CP20-14</text:p>
          </table:table-cell>
          <table:table-cell table:style-name="ce64" office:value-type="string" calcext:value-type="string">
            <text:p>Validar que al dar clic en la opción “Ver”, se muestre una ventana donde se vea el detalle del tercero que se encuentra creado en el sistemas, los campos a mostrar “Nombre o razón social”, “Tipo de identificación”, “Documento identificación”, “Tipo de persona”, “Dirección”, “Correo electrónico”, “Teléfono”, “País”, “Departamento”, “Municipio”, “Género”, “Rango de edad”, “Vulnerabilidad”, “Etnia” y el “Estado”</text:p>
          </table:table-cell>
          <table:table-cell table:style-name="ce6" office:value-type="string" calcext:value-type="string">
            <text:p>ok</text:p>
          </table:table-cell>
          <table:table-cell table:style-name="ce16"/>
          <table:table-cell table:style-name="ce64" office:value-type="string" calcext:value-type="string">
            <text:p>se implementa una validacion en el front que generaba conflicto en la captura de los datos</text:p>
          </table:table-cell>
          <table:table-cell table:style-name="ce4"/>
          <table:table-cell table:number-columns-repeated="16378"/>
        </table:table-row>
        <table:table-row table:style-name="ro7">
          <table:table-cell table:style-name="ce22" office:value-type="string" calcext:value-type="string">
            <text:p>CP20-15</text:p>
          </table:table-cell>
          <table:table-cell table:style-name="ce64" office:value-type="string" calcext:value-type="string">
            <text:p>Validar que se despliegue el formulario de Datos básicos Tercero, cuando se de clic en la opción de “Actualiza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0-16</text:p>
          </table:table-cell>
          <table:table-cell table:style-name="ce64" office:value-type="string" calcext:value-type="string">
            <text:p>Validar que cuando se de clic en el botón “FILTROS” se despliegue una ventana nueva donde se muestren los campos “Nombre”, “Tipo de Persona”, “Número de identidad”, “Correo Electrónico”, “Dirección”, “Telefono”, “Pais”, “Departamento”, “Municipio/ciudad”, “Estado” y rangos de fechas, adicional de mostrar una lista desplegable indicando la cantidad de registros a mostra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5" office:value-type="string" calcext:value-type="string">
            <text:p>CP20-17</text:p>
          </table:table-cell>
          <table:table-cell table:style-name="ce64"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0-18</text:p>
          </table:table-cell>
          <table:table-cell table:style-name="ce64" office:value-type="string" calcext:value-type="string">
            <text:p>Validar que al dar clic en la opción “proceso Masivo” se muestre campo para cargar archiv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0-19</text:p>
          </table:table-cell>
          <table:table-cell table:style-name="ce64" office:value-type="string" calcext:value-type="string">
            <text:p>Validar que al dar clic en la opción “proceso Masivo” se muestre botón de Descargar Format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5" office:value-type="string" calcext:value-type="string">
            <text:p>CP20-20</text:p>
          </table:table-cell>
          <table:table-cell table:style-name="ce12" office:value-type="string" calcext:value-type="string">
            <text:p>Validar que cuando se descargue el formato de usuarios, este se descargue con las columnas “Nombre completo”,</text:p>
            <text:p>“Tipo de persona”, “Documento de identidad”, “Correo electrónico”, “Municipio”, “Dirección” y “Telefono”</text:p>
          </table:table-cell>
          <table:table-cell table:style-name="ce11" office:value-type="string" calcext:value-type="string">
            <text:p>ok</text:p>
          </table:table-cell>
          <table:table-cell table:style-name="ce28" office:value-type="string" calcext:value-type="string">
            <text:p>selenium no permite cargar archivo</text:p>
          </table:table-cell>
          <table:table-cell table:style-name="ce12"/>
          <table:table-cell table:style-name="ce29"/>
          <table:table-cell table:style-name="ce30" table:number-columns-repeated="21"/>
          <table:table-cell table:number-columns-repeated="16357"/>
        </table:table-row>
        <table:table-row table:style-name="ro33">
          <table:table-cell table:style-name="ce65" office:value-type="string" calcext:value-type="string">
            <text:p>CP20-21</text:p>
          </table:table-cell>
          <table:table-cell table:style-name="ce64" office:value-type="string" calcext:value-type="string">
            <text:p>Validar que cuando se cargue el archivo, si hay alguna columna que es obligatoria y se encuentra vacia, se muestre un mensaje de error que indique la fila y el campo donde se encuentra el error adicional de mostrar el nombre de la columna. Ej: “Fila 2 error en la columna (Documento de identidad), no puede ser vacía, Fila 2 error en la columna (Tipo de persona), no puede ser vacía, Fila 2 error en la columna (Dirección), no puede ser vacía”</text:p>
          </table:table-cell>
          <table:table-cell table:style-name="ce6" office:value-type="string" calcext:value-type="string">
            <text:p>ok</text:p>
          </table:table-cell>
          <table:table-cell table:style-name="ce28" office:value-type="string" calcext:value-type="string">
            <text:p>selenium no permite cargar archivo</text:p>
          </table:table-cell>
          <table:table-cell table:style-name="ce64"/>
          <table:table-cell table:style-name="ce4"/>
          <table:table-cell table:number-columns-repeated="16378"/>
        </table:table-row>
        <table:table-row table:style-name="ro7">
          <table:table-cell table:style-name="ce65" office:value-type="string" calcext:value-type="string">
            <text:p>CP20-22</text:p>
          </table:table-cell>
          <table:table-cell table:style-name="ce64" office:value-type="string" calcext:value-type="string">
            <text:p>Validar que cuando se cargue el archivo y todo este correcto se muestre mensaje de confirmación</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70" office:value-type="string" calcext:value-type="string">
            <text:p>CP20-23</text:p>
          </table:table-cell>
          <table:table-cell table:style-name="ce64" office:value-type="string" calcext:value-type="string">
            <text:p>Validar que cuando se de clic en alguno de los botones de “CSV”, “EXCEL”, “PDF” y “IMPRIMIR” el sistema descargue o genere el correspondiente archiv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21 – Gestión documental - Dependencias</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21-01</text:p>
          </table:table-cell>
          <table:table-cell table:style-name="ce64" office:value-type="string" calcext:value-type="string">
            <text:p>Validar que cuando se ingrese al modulo se muestre una tabla con el listado de todas las dependencias que se encuentran configuradas en el sistema con su correspondiente TRD</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1-02</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1-03</text:p>
          </table:table-cell>
          <table:table-cell table:style-name="ce64" office:value-type="string" calcext:value-type="string">
            <text:p>Validar que cuando se seleccione alguno de estos registros, en el botón dinámico de color naranja en la parte inferior se muestren las opciones “Agregar”, “Editar”, “Ver”, “Cambiar estado”, “Descargar TRD”, “Descargar clasificación documental”, “Versionamiento TRD” y “Ver TRD activa”</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1-04</text:p>
          </table:table-cell>
          <table:table-cell table:style-name="ce64" office:value-type="string" calcext:value-type="string">
            <text:p>Validar que cuando se de clic en la opción “Agregar” se despliegue el formulario de registro de una Nueva dependencia, este formulario debe mostrar un campo donde se pueda ingresar el “Código dependencia”, “Nombre dependencia”, “Unidad Administrativa” y “Regional”</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1-05</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1-06</text:p>
          </table:table-cell>
          <table:table-cell table:style-name="ce64" office:value-type="string" calcext:value-type="string">
            <text:p>Validar que cuando se haga clic en el botón de guardar se muestre un mensaje de confirmación indicando que se ingreso de forma correcta una vez se diligencien todos los campo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1-07</text:p>
          </table:table-cell>
          <table:table-cell table:style-name="ce64" office:value-type="string" calcext:value-type="string">
            <text:p>Validar que cuando se seleccione uno de los registros y se de clic en la opción “Editar” se despliegue el formulario con la información que ya se habia diligenciado y que se encuentra asociado al registro seleccion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1-08</text:p>
          </table:table-cell>
          <table:table-cell table:style-name="ce64" office:value-type="string" calcext:value-type="string">
            <text:p>Validar que cuando se haga clic en el botón de guradar se muestre un mensaje de confirmación indicando que se actualizo la información de forma correcta</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1-09</text:p>
          </table:table-cell>
          <table:table-cell table:style-name="ce64" office:value-type="string" calcext:value-type="string">
            <text:p>Validar que al dar clic en la opción “Cambiar estado” permita inactivar la dependencia en caso de estar activo o de lo contrario, activar en caso de encontrarse inactiv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visibility="collapse">
          <table:table-cell table:style-name="ce6"/>
          <table:table-cell table:style-name="ce64" office:value-type="string" calcext:value-type="string">
            <text:p>Validar que al dar clic en la opción “Cambiar estado” no permita inactivar la dependencia <text:s/>por que tiene usuarios activo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1-10</text:p>
          </table:table-cell>
          <table:table-cell table:style-name="ce64" office:value-type="string" calcext:value-type="string">
            <text:p>Validar que al dar clic en la opción “Ver”, se muestre una ventana donde se vea el detalle de la información de la dependencia, mostrando la siguiente información “Código dependencia”, “Nombre”, “Unidad administrativa”, “Regional”, “Observación” y “Consecutivo del expediente”</text:p>
          </table:table-cell>
          <table:table-cell table:style-name="ce6" office:value-type="string" calcext:value-type="string">
            <text:p>ok</text:p>
          </table:table-cell>
          <table:table-cell table:style-name="ce16"/>
          <table:table-cell table:style-name="ce64" office:value-type="string" calcext:value-type="string">
            <text:p>se implementa una validacion en el front que generaba conflicto en la captura de los datos</text:p>
          </table:table-cell>
          <table:table-cell table:style-name="ce4"/>
          <table:table-cell table:number-columns-repeated="16378"/>
        </table:table-row>
        <table:table-row table:style-name="ro7">
          <table:table-cell table:style-name="ce22" office:value-type="string" calcext:value-type="string">
            <text:p>CP21-11</text:p>
          </table:table-cell>
          <table:table-cell table:style-name="ce64" office:value-type="string" calcext:value-type="string">
            <text:p>Validar que cuando se de clic en el botón “FILTROS” se despliegue una ventana nueva donde se muestren los campos “Codigo dependencia”, “Nombre dependencia”, “Unidad administrativa”, “Estado” y “Rangos de fechas”, adicional de mostrar una lista desplegable indicando la cantidad de registros a mostra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54" office:value-type="string" calcext:value-type="string">
            <text:p>CP21-12</text:p>
          </table:table-cell>
          <table:table-cell table:style-name="ce64"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6" office:value-type="string" calcext:value-type="string">
            <text:p>ok</text:p>
          </table:table-cell>
          <table:table-cell table:style-name="ce16" office:value-type="string" calcext:value-type="string">
            <text:p>al corre el test no muestra resultados pero si se hace manual si</text:p>
          </table:table-cell>
          <table:table-cell table:style-name="ce64"/>
          <table:table-cell table:style-name="ce4"/>
          <table:table-cell table:number-columns-repeated="16378"/>
        </table:table-row>
        <table:table-row table:style-name="ro24">
          <table:table-cell table:style-name="ce54" office:value-type="string" calcext:value-type="string">
            <text:p>CP21-13</text:p>
          </table:table-cell>
          <table:table-cell table:style-name="ce64" office:value-type="string" calcext:value-type="string">
            <text:p>Validar que cuando se seleccione una dependencia y se de clic en la opción de “Descargar TRD” se descargue un archivo .xlsx con la estructura de la TRD y con la correspondiente información de la dependencia seleccionada; el archivo descargado debe mostrar las columnas “Codigo dependencia, serie y subserie”, “Nombre serie, subserie y tipo documental”, “Años retención”, “Disposición” y “Procedimiento”</text:p>
          </table:table-cell>
          <table:table-cell table:style-name="ce6" office:value-type="string" calcext:value-type="string">
            <text:p>ok</text:p>
          </table:table-cell>
          <table:table-cell table:style-name="ce16" office:value-type="string" calcext:value-type="string">
            <text:p>en demo no tiene TRD configurada</text:p>
          </table:table-cell>
          <table:table-cell table:style-name="ce64"/>
          <table:table-cell table:style-name="ce4"/>
          <table:table-cell table:number-columns-repeated="16378"/>
        </table:table-row>
        <table:table-row table:style-name="ro24">
          <table:table-cell table:style-name="ce54" office:value-type="string" calcext:value-type="string">
            <text:p>CP21-14</text:p>
          </table:table-cell>
          <table:table-cell table:style-name="ce64" office:value-type="string" calcext:value-type="string">
            <text:p>Validar que cuando se seleccione una dependencia y se de clic en la opción de “Descargar clasificación documental” se descargue un archivo .xlsx con la estructura del CCD con la información correspondiente a la dependencia seleccionada; el archivo descargado debe mostrar las columnas “Código Unidad Administrativa”, “Unidad Administrativa”, “Código Oficina Productora”, “Oficina Productora”, “Código Serie”, ”Serie”, ”Código Subserie”, “Subserie”.</text:p>
          </table:table-cell>
          <table:table-cell table:style-name="ce6" office:value-type="string" calcext:value-type="string">
            <text:p>ok</text:p>
          </table:table-cell>
          <table:table-cell table:style-name="ce16" office:value-type="string" calcext:value-type="string">
            <text:p>en demo no tiene TRD configurada</text:p>
          </table:table-cell>
          <table:table-cell table:style-name="ce64"/>
          <table:table-cell table:style-name="ce4"/>
          <table:table-cell table:number-columns-repeated="16378"/>
        </table:table-row>
        <table:table-row table:style-name="ro7">
          <table:table-cell table:style-name="ce54" office:value-type="string" calcext:value-type="string">
            <text:p>CP21-15</text:p>
          </table:table-cell>
          <table:table-cell table:style-name="ce64" office:value-type="string" calcext:value-type="string">
            <text:p>Validar que cuando se seleccione una dependencia y se de clic en la opción de “Versionamiento TRD”, se despliegue un formulario donde se muestre una sección por cada versión de TRD de la dependencia seleccionada, cada sección debe mostrar los datos de la “Unidad Administrativa”, “Oficina Productora”, “Regional”, “Fecha de actualización”, “Versión”, “UUID” y el detalle de la TRD</text:p>
          </table:table-cell>
          <table:table-cell table:style-name="ce6" office:value-type="string" calcext:value-type="string">
            <text:p>ok</text:p>
          </table:table-cell>
          <table:table-cell table:style-name="ce16" office:value-type="string" calcext:value-type="string">
            <text:p>en demo no tiene TRD configurada</text:p>
          </table:table-cell>
          <table:table-cell table:style-name="ce64"/>
          <table:table-cell table:style-name="ce4"/>
          <table:table-cell table:number-columns-repeated="16378"/>
        </table:table-row>
        <table:table-row table:style-name="ro7">
          <table:table-cell table:style-name="ce54" office:value-type="string" calcext:value-type="string">
            <text:p>CP21-16</text:p>
          </table:table-cell>
          <table:table-cell table:style-name="ce64" office:value-type="string" calcext:value-type="string">
            <text:p>Validar que cuando se seleccione una dependencia y se de clic en la opción de “Ver TRD activa”, se despliegue un formulario donde se muestre una sección por cada versión de TRD de la dependencia seleccionada, cada sección debe mostrar los datos de la “Unidad Administrativa”, “Oficina Productora”, “Regional” y el detalle de la TRD</text:p>
          </table:table-cell>
          <table:table-cell table:style-name="ce6" office:value-type="string" calcext:value-type="string">
            <text:p>ok</text:p>
          </table:table-cell>
          <table:table-cell table:style-name="ce16" office:value-type="string" calcext:value-type="string">
            <text:p>en demo no tiene TRD configurada</text:p>
          </table:table-cell>
          <table:table-cell table:style-name="ce64"/>
          <table:table-cell table:style-name="ce4"/>
          <table:table-cell table:number-columns-repeated="16378"/>
        </table:table-row>
        <table:table-row table:style-name="ro7">
          <table:table-cell table:style-name="ce54" office:value-type="string" calcext:value-type="string">
            <text:p>CP21-17</text:p>
          </table:table-cell>
          <table:table-cell table:style-name="ce64" office:value-type="string" calcext:value-type="string">
            <text:p>Validar en el proceso anterior que el nombre de la serie, subserie y tipos documentales se puedan modificar segun sea el caso, al cambiar la información se debe guardar de forma automatica</text:p>
          </table:table-cell>
          <table:table-cell table:style-name="ce6" office:value-type="string" calcext:value-type="string">
            <text:p>ok</text:p>
          </table:table-cell>
          <table:table-cell table:style-name="ce16" office:value-type="string" calcext:value-type="string">
            <text:p>en demo no tiene TRD configurada</text:p>
          </table:table-cell>
          <table:table-cell table:style-name="ce64"/>
          <table:table-cell table:style-name="ce4"/>
          <table:table-cell table:number-columns-repeated="16378"/>
        </table:table-row>
        <table:table-row table:style-name="ro7">
          <table:table-cell table:style-name="ce74" office:value-type="string" calcext:value-type="string">
            <text:p>CP21-18</text:p>
          </table:table-cell>
          <table:table-cell table:style-name="ce64" office:value-type="string" calcext:value-type="string">
            <text:p>Validar que cuando se de clic en alguno de los botones de “CSV”, “EXCEL”, “PDF” y “IMPRIMIR” el sistema descargue o genere el correspondiente archiv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22 – Gestión documental - Carga TRD</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22-01</text:p>
          </table:table-cell>
          <table:table-cell table:style-name="ce64" office:value-type="string" calcext:value-type="string">
            <text:p>Validar que cuando se ingrese a la opción de “Carga TRD”, se despliegue el formulario con un campo donde se podra seleccionar un archivo y luego validar que se habilite el botón de carga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34">
          <table:table-cell table:style-name="ce65" office:value-type="string" calcext:value-type="string">
            <text:p>CP22-02</text:p>
          </table:table-cell>
          <table:table-cell table:style-name="ce64" office:value-type="string" calcext:value-type="string">
            <text:p>Validar que cuando se cargue el archivo y este archivo tiene la estructura configurada en el sistema, se debe mostrar un mensaje de error indicando mensaje ej: “Hoja 1: (Terceros) No se encontró el nombre de la dependencia en la columna configurada. # Hoja 1: (Terceros) No se encontró el nombre de la unidad administrativa en la columna configurada. # Hoja 1: (Terceros) La dependencia no posee la longitud configurada (3), por favor verifique. # Hoja 2: (listTerceros) La dependencia no posee la longitud configurada (3), por favor verifique.”</text:p>
          </table:table-cell>
          <table:table-cell table:style-name="ce6" office:value-type="string" calcext:value-type="string">
            <text:p>ok</text:p>
          </table:table-cell>
          <table:table-cell table:style-name="ce16" office:value-type="string" calcext:value-type="string">
            <text:p>selenium no permite cargar archivo</text:p>
          </table:table-cell>
          <table:table-cell table:style-name="ce64"/>
          <table:table-cell table:style-name="ce4"/>
          <table:table-cell table:number-columns-repeated="16378"/>
        </table:table-row>
        <table:table-row table:style-name="ro7">
          <table:table-cell table:style-name="ce65" office:value-type="string" calcext:value-type="string">
            <text:p>CP22-03</text:p>
          </table:table-cell>
          <table:table-cell table:style-name="ce64" office:value-type="string" calcext:value-type="string">
            <text:p>Validar que cuando se cargue el archivo y alguno de los datos obligatorios es vació se muestre un mensaje de error indicando “algo esta mal” y muestre la fila y la columna que esta presentando la falla; mensaje de Ej:</text:p>
          </table:table-cell>
          <table:table-cell table:style-name="ce6" office:value-type="string" calcext:value-type="string">
            <text:p>ok</text:p>
          </table:table-cell>
          <table:table-cell table:style-name="ce16" office:value-type="string" calcext:value-type="string">
            <text:p>selenium no permite cargar archivo</text:p>
          </table:table-cell>
          <table:table-cell table:style-name="ce64"/>
          <table:table-cell table:style-name="ce4"/>
          <table:table-cell table:number-columns-repeated="16378"/>
        </table:table-row>
        <table:table-row table:style-name="ro34">
          <table:table-cell table:style-name="ce65" office:value-type="string" calcext:value-type="string">
            <text:p>CP22-04</text:p>
          </table:table-cell>
          <table:table-cell table:style-name="ce64" office:value-type="string" calcext:value-type="string">
            <text:p>Validar que cuando se cargue el archivo y este no presenta ningun error y la dependencia ya cuenta con una TRD cargada, debe procesar el archivo correctamente y muestre un mensaje de confirmación “Archivo cargado de forma correcta, se procesaron 1 de 1 hojas.# La dependencia cargada ya tiene una TRD configurada y activa del día January 11, 2024, 12:03 pm. Se procederá a crear una nueva versión de la dependencia, la cuál debe ser aprobada por el responsable de gestión documental. Por favor, diríjase al módulo Versionamiento TRD, para gestionar la nueva versión de la TRD cargada.”</text:p>
          </table:table-cell>
          <table:table-cell table:style-name="ce6" office:value-type="string" calcext:value-type="string">
            <text:p>ok</text:p>
          </table:table-cell>
          <table:table-cell table:style-name="ce16" office:value-type="string" calcext:value-type="string">
            <text:p>selenium no permite cargar archivo</text:p>
          </table:table-cell>
          <table:table-cell table:style-name="ce64"/>
          <table:table-cell table:style-name="ce4"/>
          <table:table-cell table:number-columns-repeated="16378"/>
        </table:table-row>
        <table:table-row table:style-name="ro7">
          <table:table-cell table:style-name="ce65" office:value-type="string" calcext:value-type="string">
            <text:p>CP22-05</text:p>
          </table:table-cell>
          <table:table-cell table:style-name="ce64" office:value-type="string" calcext:value-type="string">
            <text:p>Validar que cuando se cargue el archivo y todo se encuentra de forma correcta, se debe mostrar mensaje de confirmación indicando que se proceso el archivo de forma correcta</text:p>
          </table:table-cell>
          <table:table-cell table:style-name="ce6" office:value-type="string" calcext:value-type="string">
            <text:p>ok</text:p>
          </table:table-cell>
          <table:table-cell table:style-name="ce16" office:value-type="string" calcext:value-type="string">
            <text:p>selenium no permite cargar archivo</text:p>
          </table:table-cell>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23 – Gestión documental - Versionamiento TRD TMP</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23-01</text:p>
          </table:table-cell>
          <table:table-cell table:style-name="ce64" office:value-type="string" calcext:value-type="string">
            <text:p>Validar que cuando se ingrese al modulo se muestre una tabla con el listado de todas las dependencias que se encuentran configuradas en el sistema a las que se les haya cargado una nueva versión de TRD</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3-02</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5" office:value-type="string" calcext:value-type="string">
            <text:p>CP23-03</text:p>
          </table:table-cell>
          <table:table-cell table:style-name="ce64" office:value-type="string" calcext:value-type="string">
            <text:p>Validar que cuando se seleccione alguno de estos registros, en el botón dinámico de color naranja en la parte inferior se muestren las opciones “Aceptar Versionamiento”, “Ver Versionamiento” y “Eliminar Versionamiento”</text:p>
          </table:table-cell>
          <table:table-cell table:style-name="ce6" office:value-type="string" calcext:value-type="string">
            <text:p>ok</text:p>
          </table:table-cell>
          <table:table-cell table:style-name="ce16" office:value-type="string" calcext:value-type="string">
            <text:p>no tiene TRD Temporal</text:p>
          </table:table-cell>
          <table:table-cell table:style-name="ce64"/>
          <table:table-cell table:style-name="ce4"/>
          <table:table-cell table:number-columns-repeated="16378"/>
        </table:table-row>
        <table:table-row table:style-name="ro7">
          <table:table-cell table:style-name="ce65" office:value-type="string" calcext:value-type="string">
            <text:p>CP23-04</text:p>
          </table:table-cell>
          <table:table-cell table:style-name="ce64" office:value-type="string" calcext:value-type="string">
            <text:p>Validar que cuando se seleccione una dependencia y se de clic en la opción de “Aceptar Versionamiento”, el sistema despliegue una ventana donde se pueda ingresar una observación del porque se esta actualizando la versión de la TRD, este campo debe ser obligatorio para diligenciar.</text:p>
          </table:table-cell>
          <table:table-cell table:style-name="ce6" office:value-type="string" calcext:value-type="string">
            <text:p>ok</text:p>
          </table:table-cell>
          <table:table-cell table:style-name="ce16" office:value-type="string" calcext:value-type="string">
            <text:p>no tiene TRD Temporal</text:p>
          </table:table-cell>
          <table:table-cell table:style-name="ce64"/>
          <table:table-cell table:style-name="ce4"/>
          <table:table-cell table:number-columns-repeated="16378"/>
        </table:table-row>
        <table:table-row table:style-name="ro7">
          <table:table-cell table:style-name="ce65" office:value-type="string" calcext:value-type="string">
            <text:p>CP23-05</text:p>
          </table:table-cell>
          <table:table-cell table:style-name="ce64" office:value-type="string" calcext:value-type="string">
            <text:p>Validar que cuando se seleccione una dependencia y se de clic en la opción de “Eliminar Versionamiento”, el sistema despliegue un mensaje en el que pida confirmar la eliminación de una versión de TRD que no aplica, se debe validar que se muestre el mensaje “ Se eliminarán todos los versionamientos de las dependencias seleccionadas”</text:p>
          </table:table-cell>
          <table:table-cell table:style-name="ce6" office:value-type="string" calcext:value-type="string">
            <text:p>ok</text:p>
          </table:table-cell>
          <table:table-cell table:style-name="ce16" office:value-type="string" calcext:value-type="string">
            <text:p>no tiene TRD Temporal</text:p>
          </table:table-cell>
          <table:table-cell table:style-name="ce64"/>
          <table:table-cell table:style-name="ce4"/>
          <table:table-cell table:number-columns-repeated="16378"/>
        </table:table-row>
        <table:table-row table:style-name="ro7">
          <table:table-cell table:style-name="ce65" office:value-type="string" calcext:value-type="string">
            <text:p>CP23-06</text:p>
          </table:table-cell>
          <table:table-cell table:style-name="ce64" office:value-type="string" calcext:value-type="string">
            <text:p>Validar que cuando se seleccione una dependencia y se de clic en la opción de “Ver Versionamiento” el sistema despliegue una vista previa de la TRD cargada, con la estructura definida</text:p>
          </table:table-cell>
          <table:table-cell table:style-name="ce6" office:value-type="string" calcext:value-type="string">
            <text:p>ok</text:p>
          </table:table-cell>
          <table:table-cell table:style-name="ce16" office:value-type="string" calcext:value-type="string">
            <text:p>no tiene TRD Temporal</text:p>
          </table:table-cell>
          <table:table-cell table:style-name="ce64"/>
          <table:table-cell table:style-name="ce4"/>
          <table:table-cell table:number-columns-repeated="16378"/>
        </table:table-row>
        <table:table-row table:style-name="ro7">
          <table:table-cell table:style-name="ce70" office:value-type="string" calcext:value-type="string">
            <text:p>CP23-07</text:p>
          </table:table-cell>
          <table:table-cell table:style-name="ce64" office:value-type="string" calcext:value-type="string">
            <text:p>Validar que cuando se de clic en el botón “FILTROS” se despliegue una ventana nueva donde se muestren los campos “Codigo dependencia”, “Nombre dependencia”, “Nombre serie”, “Nombre subserie”, “Nombre tipo documental” y “Rangos de fechas”, adicional de mostrar una lista desplegable indicando la cantidad de registros a mostra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70" office:value-type="string" calcext:value-type="string">
            <text:p>CP23-08</text:p>
          </table:table-cell>
          <table:table-cell table:style-name="ce64"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70" office:value-type="string" calcext:value-type="string">
            <text:p>CP23-09</text:p>
          </table:table-cell>
          <table:table-cell table:style-name="ce64" office:value-type="string" calcext:value-type="string">
            <text:p>Validar que cuando se de clic en alguno de los botones de “CSV”, “EXCEL”, “PDF” y “IMPRIMIR” el sistema descargue o genere el correspondiente archiv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24 – Gestión documental – Expedientes</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24-01</text:p>
          </table:table-cell>
          <table:table-cell table:style-name="ce64" office:value-type="string" calcext:value-type="string">
            <text:p>Validar que cuando se ingrese al modulo se muestre una tabla con el listado de expedientes creados en el sistema</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4-02</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4-03</text:p>
          </table:table-cell>
          <table:table-cell table:style-name="ce64" office:value-type="string" calcext:value-type="string">
            <text:p>Validar que cuando se seleccione alguno de estos registros, en el botón dinámico de color naranja en la parte inferior se muestren las opciones “Agregar”, “Editar”, “Ver”, “Cerrar Expediente”, “Abrir Expediente”, “Referencia Cruzada”, “Carga de documentos”, “Agregar subexpediente”, “Exportar histórico”, “Hoja de Control” y “Descargar paquete de documento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4-04</text:p>
          </table:table-cell>
          <table:table-cell table:style-name="ce64" office:value-type="string" calcext:value-type="string">
            <text:p>Validar que cuando se de clic en la opción “Agregar” se despliegue el formulario de registro para crear un expediente, esto debe desplegar un formulario donde contenga los siguientes apartados “Nuevo expediente”, “Responsable”, “Dependencias que hacen parte de la gestión del expediente“ y “Nuevo Subexpediente” con sus respectivos campos para diligencia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4-05</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4-06</text:p>
          </table:table-cell>
          <table:table-cell table:style-name="ce64" office:value-type="string" calcext:value-type="string">
            <text:p>Validar que cuando se haga clic en el botón de guardar se muestre un mensaje de confirmación indicando que se ingreso de forma correcta una vez se diligencien todos los campo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4-07</text:p>
          </table:table-cell>
          <table:table-cell table:style-name="ce64" office:value-type="string" calcext:value-type="string">
            <text:p>Validar que en la lista desplegable de serie perteneciente a la dependencia del usuario que inicio sesión, al seleccionar una serie, llenar el listado de subseries, adicional validar que se listen todas las dependencias y con base a esta selección, mostrar los usuarios perteneciente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4-08</text:p>
          </table:table-cell>
          <table:table-cell table:style-name="ce64" office:value-type="string" calcext:value-type="string">
            <text:p>Validar que en el formulario se muestre una opción de “Agregar Subexpediente” al activar esta opción se debe desplegar un nuevo formulario donde se solicite el “Nombre del subexpediente”, “Fecha inicio del expediente” y “Descripción del Subexpediente”, al diligenciar toda la información y dar clic en el botón de “Agregar” se muestre en la tabla superio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4-09</text:p>
          </table:table-cell>
          <table:table-cell table:style-name="ce64" office:value-type="string" calcext:value-type="string">
            <text:p>Validar que cuando se seleccione uno de los registros y se de clic en la opción “Editar” se despliegue el formulario con la información que ya se habia diligenciado y que se encuentra asociado al registro seleccion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4-10</text:p>
          </table:table-cell>
          <table:table-cell table:style-name="ce64" office:value-type="string" calcext:value-type="string">
            <text:p>Validar que cuando se haga clic en el botón de guradar se muestre un mensaje de confirmación indicando que se actualizo la información de forma correcta</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4-11</text:p>
          </table:table-cell>
          <table:table-cell table:style-name="ce64" office:value-type="string" calcext:value-type="string">
            <text:p>Validar que al seleccionar un expediente y este se encuentre en estado “Abierto”, se habilile una opción que se llama “Cerrar <text:s/>Expediente”, validar que al dar clic en dicha opción se muestre una alerta que pida confirmar el proceso, este mensaje debe decir “Recuerde que el tiempo de retención empieza a correr cuando se cierra el expediente ¿está seguro que desea cerrarl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4-12</text:p>
          </table:table-cell>
          <table:table-cell table:style-name="ce64" office:value-type="string" calcext:value-type="string">
            <text:p>Validar que cuando se de clic a la opción de confirmar se habilite una nueva ventana en la que se solicite una “Observación” y un campo donde se ingrese la “contraseña” del usuario; esto tambien debe cerrar el indice electrónico de forma automatica</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2">
          <table:table-cell table:style-name="ce65" office:value-type="string" calcext:value-type="string">
            <text:p>CP24-13</text:p>
          </table:table-cell>
          <table:table-cell table:style-name="ce64" office:value-type="string" calcext:value-type="string">
            <text:p>Validar que al seleccionar un expediente y este se encuentre en estado “Cerrado”, se habilile una opción que se llama “Reabrir Expediente”, <text:s/>y al dar clic en esta opción se muestre un mensaje de “Recuerde que ya se estan corriendo los tiempos de retención establecidos, si re-abre el expediente estos tiempos se detendran hasta que se vuelva a cerrar el expediente, ¿esta seguro que desea re-abrirlo?.” al dar clic en “Confirmar” se debe habilitar un campo para ingresar la contraseña</text:p>
          </table:table-cell>
          <table:table-cell table:style-name="ce6" office:value-type="string" calcext:value-type="string">
            <text:p>ok</text:p>
          </table:table-cell>
          <table:table-cell table:style-name="ce16"/>
          <table:table-cell table:style-name="ce64" office:value-type="string" calcext:value-type="string">
            <text:p>se cambia la solicitud de la query para expedientes con estados activos y cerrados</text:p>
          </table:table-cell>
          <table:table-cell table:style-name="ce4"/>
          <table:table-cell table:number-columns-repeated="16378"/>
        </table:table-row>
        <table:table-row table:style-name="ro7">
          <table:table-cell table:style-name="ce22" office:value-type="string" calcext:value-type="string">
            <text:p>CP24-14</text:p>
          </table:table-cell>
          <table:table-cell table:style-name="ce64" office:value-type="string" calcext:value-type="string">
            <text:p>Validar que al seleccionar un expediente y se de clic en la opción de “Referencia cruzada”, despliegue un formulario donde se solicite el “Nombre”, “Cantidad”, “Tipo del anexo” y la “Ubicación”, en este formulario se debe validar que los campos marcados * sean obligatorios y en caso de ser vacios los campos se deben pintar de color roj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5" office:value-type="string" calcext:value-type="string">
            <text:p>CP24-15</text:p>
          </table:table-cell>
          <table:table-cell table:style-name="ce64" office:value-type="string" calcext:value-type="string">
            <text:p>Validar que al realizar el proceso anterior en el detalle del expediente se ve reflejado un documento que se llama “Referencia Cruzada” y al seleccionarlo se muestre un documento con la estructura correspondiente, adicional se debe mostrar un mensaje de confirmación “Se registró correctamente la referencia cruzada al expediente: XXXXXXXXX”</text:p>
          </table:table-cell>
          <table:table-cell table:style-name="ce6" office:value-type="string" calcext:value-type="string">
            <text:p>ok</text:p>
          </table:table-cell>
          <table:table-cell table:style-name="ce16" office:value-type="string" calcext:value-type="string">
            <text:p>no me toma la cantidad en el id 1</text:p>
          </table:table-cell>
          <table:table-cell table:style-name="ce64"/>
          <table:table-cell table:style-name="ce4"/>
          <table:table-cell table:number-columns-repeated="16378"/>
        </table:table-row>
        <table:table-row table:style-name="ro7">
          <table:table-cell table:style-name="ce22" office:value-type="string" calcext:value-type="string">
            <text:p>CP24-16</text:p>
          </table:table-cell>
          <table:table-cell table:style-name="ce64" office:value-type="string" calcext:value-type="string">
            <text:p>Validar que al seleccionar un expediente y se de clic en la opción de “Carga de documentos”, despliegue un formulario donde se solicite el “Tipo documental”, “Fecha documento”, “Descripción” y un campo para “Cargar el archivo”, en este formulario se debe validar que los campos marcados * sean obligatorios y en caso de ser vacios los campos se deben pintar de color roj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5" office:value-type="string" calcext:value-type="string">
            <text:p>CP24-17</text:p>
          </table:table-cell>
          <table:table-cell table:style-name="ce64" office:value-type="string" calcext:value-type="string">
            <text:p>Validar que cuando el proceso anterior se haga de forma correcta y el formulario muestre que el documento se cargo al 100%, se muestra un mensaje de confirmación indicando que se cargo correctamente</text:p>
          </table:table-cell>
          <table:table-cell table:style-name="ce6" office:value-type="string" calcext:value-type="string">
            <text:p>ok</text:p>
          </table:table-cell>
          <table:table-cell table:style-name="ce16" office:value-type="string" calcext:value-type="string">
            <text:p>selenium no permite cargar archivo</text:p>
          </table:table-cell>
          <table:table-cell table:style-name="ce64"/>
          <table:table-cell table:style-name="ce4"/>
          <table:table-cell table:number-columns-repeated="16378"/>
        </table:table-row>
        <table:table-row table:style-name="ro7">
          <table:table-cell table:style-name="ce22" office:value-type="string" calcext:value-type="string">
            <text:p>CP24-18</text:p>
          </table:table-cell>
          <table:table-cell table:style-name="ce64" office:value-type="string" calcext:value-type="string">
            <text:p>Validar que al seleccionar un expediente y se de clic en la opción de “Exportar histórico”, se debe mostrar un mensaje de confirmación que diga “El proceso de descarga es pesado y puede ser un poco lenta la respuesta del servidor”, al aceptar se debe descargar un archivo .xlsx con el histórico del expediente</text:p>
          </table:table-cell>
          <table:table-cell table:style-name="ce6" office:value-type="string" calcext:value-type="string">
            <text:p>ok</text:p>
          </table:table-cell>
          <table:table-cell table:style-name="ce16" office:value-type="string" calcext:value-type="string">
            <text:p>no se puede confirmar la descarga. Toca ver manual que se encuentre en descargas</text:p>
          </table:table-cell>
          <table:table-cell table:style-name="ce64"/>
          <table:table-cell table:style-name="ce4"/>
          <table:table-cell table:number-columns-repeated="16378"/>
        </table:table-row>
        <table:table-row table:style-name="ro7">
          <table:table-cell table:style-name="ce22" office:value-type="string" calcext:value-type="string">
            <text:p>CP24-19</text:p>
          </table:table-cell>
          <table:table-cell table:style-name="ce64" office:value-type="string" calcext:value-type="string">
            <text:p>Validar que al seleccionar un expediente y se de clic en la opción de “Hoja de Control”, se debe descargar un archivo .pdf con el listado de todos los documentos incluidos en el expediente, con su correspondiente fecha de cargue y origen</text:p>
          </table:table-cell>
          <table:table-cell table:style-name="ce6" office:value-type="string" calcext:value-type="string">
            <text:p>ok</text:p>
          </table:table-cell>
          <table:table-cell table:style-name="ce16" office:value-type="string" calcext:value-type="string">
            <text:p>no se puede confirmar la descarga. Toca ver manual que se encuentre en descargas</text:p>
          </table:table-cell>
          <table:table-cell table:style-name="ce64"/>
          <table:table-cell table:style-name="ce4"/>
          <table:table-cell table:number-columns-repeated="16378"/>
        </table:table-row>
        <table:table-row table:style-name="ro7">
          <table:table-cell table:style-name="ce22" office:value-type="string" calcext:value-type="string">
            <text:p>CP24-20</text:p>
          </table:table-cell>
          <table:table-cell table:style-name="ce64" office:value-type="string" calcext:value-type="string">
            <text:p>Validar que al seleccionar un expediente y se de clic en la opción de “Descargar paquete de documentos”, se debe mostrar un mensaje de confirmación que diga “El proceso de descarga es pesado y puede ser un poco lenta la respuesta del servidor”, al aceptar se debe descargar un archivo comprimido .zip con todo el contenido de documentos incluidos en el expediente</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4-21</text:p>
          </table:table-cell>
          <table:table-cell table:style-name="ce64" office:value-type="string" calcext:value-type="string">
            <text:p>Validar que al seleccionar un expediente y se de clic en la opción de “Ver”, se debe desplegar una nueva ventana donde se muestre el “Detalle de expediente”, “Documentos de expediente” y una sección por cada subexpediente incluidos en el expediente</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4-22</text:p>
          </table:table-cell>
          <table:table-cell table:style-name="ce64" office:value-type="string" calcext:value-type="string">
            <text:p>Validar que cuando se de clic en el botón “FILTROS” se despliegue una ventana nueva donde se muestren los campos “No Expediente”, “Nombre Expediente”, “Usuario creador”, “Dependencia creadora”, “Serie”, “Subserie”, “Estado” y “Rangos de fechas”, adicional de mostrar una lista desplegable indicando la cantidad de registros a mostrar</text:p>
          </table:table-cell>
          <table:table-cell table:style-name="ce6" office:value-type="string" calcext:value-type="string">
            <text:p>ok</text:p>
          </table:table-cell>
          <table:table-cell table:style-name="ce16"/>
          <table:table-cell table:style-name="ce64" office:value-type="string" calcext:value-type="string">
            <text:p>Se actualiza la query para que extraiga todos los expedientes creados</text:p>
          </table:table-cell>
          <table:table-cell table:style-name="ce4"/>
          <table:table-cell table:number-columns-repeated="16378"/>
        </table:table-row>
        <table:table-row table:style-name="ro7">
          <table:table-cell table:style-name="ce54" office:value-type="string" calcext:value-type="string">
            <text:p>CP24-23</text:p>
          </table:table-cell>
          <table:table-cell table:style-name="ce64"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75" office:value-type="string" calcext:value-type="string">
            <text:p>CP24-24</text:p>
          </table:table-cell>
          <table:table-cell table:style-name="ce64" office:value-type="string" calcext:value-type="string">
            <text:p>Validar que cuando se de clic en alguno de los botones de “CSV”, “EXCEL”, “PDF” y “IMPRIMIR” el sistema descargue o genere el correspondiente archiv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25 – Gestión documental – Tabla control de acceso</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25-01</text:p>
          </table:table-cell>
          <table:table-cell table:style-name="ce64" office:value-type="string" calcext:value-type="string">
            <text:p>Validar que en el menú de modulo Gestión Documental se muestre la opción “Tablas control de acces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5-02</text:p>
          </table:table-cell>
          <table:table-cell table:style-name="ce64" office:value-type="string" calcext:value-type="string">
            <text:p>Validar que cuando se ingrese al modulo se muestre una tabla con el listado de todos las series y subseries con base a la dependencia, se debe mostrar las columnas “Codigo oficina productora”, “Oficina Productora”, “Codigo Serie”, “Serie”, “Codigo subserie”, “Subserie”, “Accesos”, “Rol” y “Est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5-03</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16"/>
          <table:table-cell table:style-name="ce64" office:value-type="string" calcext:value-type="string">
            <text:p>Se finaliza la configuracion de los filtros para su funcionalidad y validacion del resultado</text:p>
          </table:table-cell>
          <table:table-cell table:style-name="ce4"/>
          <table:table-cell table:number-columns-repeated="16378"/>
        </table:table-row>
        <table:table-row table:style-name="ro7">
          <table:table-cell table:style-name="ce22" office:value-type="string" calcext:value-type="string">
            <text:p>CP25-04</text:p>
          </table:table-cell>
          <table:table-cell table:style-name="ce64" office:value-type="string" calcext:value-type="string">
            <text:p>Validar que cuando se seleccione alguno de estos registros, en el botón dinámico de color naranja en la parte inferior se muestren las opciones “Cambiar est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32">
          <table:table-cell table:style-name="ce22" office:value-type="string" calcext:value-type="string">
            <text:p>CP25-05</text:p>
          </table:table-cell>
          <table:table-cell table:style-name="ce64" office:value-type="string" calcext:value-type="string">
            <text:p>Validar que al seleccionar una opción y se de clic en el botón dinámico de color naranja en la parte inferior, se muestre la opción de “Cambiar estado” y al dar clic en dicha opción, se debe desplegar un formulario donde se solicite “el estado”, “tipo de control”, y el “rol”, cada una de estas opciones son listas desplegable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32">
          <table:table-cell table:style-name="ce22" office:value-type="string" calcext:value-type="string">
            <text:p>CP25-06</text:p>
          </table:table-cell>
          <table:table-cell table:style-name="ce64" office:value-type="string" calcext:value-type="string">
            <text:p>Validar que en el listado de “”Seleccione el estado” se muestren las opciones de “Publico”, “Clasificada”, “Reservada”; en el listado de “Seleccione los tipos de control” se muestren las opciones “Consultar”, “Copiar”,”Divulgar”; en el listado de “Seleecionar el rol” se muestren las opciones de todos los roles existente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8" office:value-type="string" calcext:value-type="string">
            <text:p>CP25-08</text:p>
          </table:table-cell>
          <table:table-cell table:style-name="ce64" office:value-type="string" calcext:value-type="string">
            <text:p>Validar que en el modulo de expedientes cuando se vaya a crear un expediente o se vaya a actualizar se muestre una opción para indicar si el expedientes va a ser “Clasificada”, “Publico” o “Reservada”, pero que adicional se muestre por defecto la asignada a la serie y subserie</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8" office:value-type="string" calcext:value-type="string">
            <text:p>CP25-09</text:p>
          </table:table-cell>
          <table:table-cell table:style-name="ce64" office:value-type="string" calcext:value-type="string">
            <text:p>Validar que cuando se ingrese con un usuario que no es dueño del expediente y tampoco haga parte del proceso del expediente y tampoco pertenezca a la dependencia del expediente y la clasificación de este expediente sea “Reservado” no me debe dar ingresar y me debe mandar un mensaje <text:s/>“intenta ingresar a un documento que esta clasificado como reserv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8" office:value-type="string" calcext:value-type="string">
            <text:p>CP25-10</text:p>
          </table:table-cell>
          <table:table-cell table:style-name="ce64" office:value-type="string" calcext:value-type="string">
            <text:p>Validar que cuando se ingrese con un usuario que no es dueño del expediente <text:s/>y la clasificación de este expediente sea “Clasificada” no me debe dejar ingresar y me debe mandar un mensaje <text:s/>“intenta ingresar a un documento que esta clasificado como confidencial”</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8" office:value-type="string" calcext:value-type="string">
            <text:p>CP25-11</text:p>
          </table:table-cell>
          <table:table-cell table:style-name="ce64" office:value-type="string" calcext:value-type="string">
            <text:p>Validar que cuando el expediente esta clasificado como “Publico” cualquier persona pueda entrar al expediente y consultar la información</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8" office:value-type="string" calcext:value-type="string">
            <text:p>CP25-12</text:p>
          </table:table-cell>
          <table:table-cell table:style-name="ce64" office:value-type="string" calcext:value-type="string">
            <text:p>Validar que cuando se de clic en el botón “FILTROS” se despliegue una ventana nueva donde se muestren los campos “Codigo dependencia”, “Nombre dependencia”, “Nombre serie”, “Nombre subserie” y “Rangos de fechas”, adicional de mostrar una lista desplegable indicando la cantidad de registros a mostra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8" office:value-type="string" calcext:value-type="string">
            <text:p>CP25-13</text:p>
          </table:table-cell>
          <table:table-cell table:style-name="ce64"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8" office:value-type="string" calcext:value-type="string">
            <text:p>CP25-14</text:p>
          </table:table-cell>
          <table:table-cell table:style-name="ce64" office:value-type="string" calcext:value-type="string">
            <text:p>Validar que cuando se de clic en alguno de los botones de “CSV”, “EXCEL”, “PDF” y “IMPRIMIR” el sistema descargue o genere el correspondiente archiv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26 – Radicación – Radicación estándar</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26-01</text:p>
          </table:table-cell>
          <table:table-cell table:style-name="ce64" office:value-type="string" calcext:value-type="string">
            <text:p>Validar que en el menú de modulos se muestre la opción “Radicación Estandar”</text:p>
          </table:table-cell>
          <table:table-cell table:style-name="ce6" office:value-type="string" calcext:value-type="string">
            <text:p>ok</text:p>
          </table:table-cell>
          <table:table-cell table:style-name="ce8" office:value-type="string" calcext:value-type="string">
            <text:p>1. Se ingresa al sistema con el usuario admin, y se valida que se tiene el permiso para radicación estándar</text:p>
            <text:p>2. Se ingresar al modulo radicación – radicación estándar</text:p>
          </table:table-cell>
          <table:table-cell table:style-name="ce64"/>
          <table:table-cell table:style-name="ce4"/>
          <table:table-cell table:number-columns-repeated="16378"/>
        </table:table-row>
        <table:table-row table:style-name="ro35">
          <table:table-cell table:style-name="ce22" office:value-type="string" calcext:value-type="string">
            <text:p>CP26-02</text:p>
          </table:table-cell>
          <table:table-cell table:style-name="ce64" office:value-type="string" calcext:value-type="string">
            <text:p>Validar que cuando se ingrese al modulo se muestre una tabla con el listado de todos los radicados que se han asignado al usuario o creados por el usuario, este listado muestra diferentes columnas asociadas al radicado</text:p>
          </table:table-cell>
          <table:table-cell table:style-name="ce6" office:value-type="string" calcext:value-type="string">
            <text:p>ok</text:p>
          </table:table-cell>
          <table:table-cell table:style-name="ce8" office:value-type="string" calcext:value-type="string">
            <text:p>1. Se ingresa al sistema con el usuario admin, y se valida que se tiene el permiso para radicación estándar</text:p>
            <text:p>2. Se ingresar al modulo radicación – radicación estándar</text:p>
            <text:p>3. El sistema muestra una tabla con todos los radicados que ha creado el usuario admin o los radicados que le asignaron al usuario para gestionar</text:p>
          </table:table-cell>
          <table:table-cell table:style-name="ce64"/>
          <table:table-cell table:style-name="ce4"/>
          <table:table-cell table:number-columns-repeated="16378"/>
        </table:table-row>
        <table:table-row table:style-name="ro36">
          <table:table-cell table:style-name="ce22" office:value-type="string" calcext:value-type="string">
            <text:p>CP26-03</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8" office:value-type="string" calcext:value-type="string">
            <text:p>1. Se ingresa al sistema con el usuario admin, y se valida que se tiene el permiso para radicación estándar</text:p>
            <text:p>2. Se ingresar al modulo radicación – radicación estándar</text:p>
            <text:p>3. Se valida que se estan mostrando los diferentes botones que se mencionan en el item</text:p>
            <text:p>4. se da clic en el botón de filtros y se realiza una búsqueda de todos los radicados que tiene el usuario en su bandeja por un rango de fechas desde el mes de julio a la fecha actual</text:p>
            <text:p>5. Se muestran un total de 46 registros</text:p>
            <text:p>6. Se realiza búsqueda por nombre del cliente “skina” y rango de fechas desde el mes de julio al mes de agosto</text:p>
            <text:p>7. se muestran un total de 37 registros</text:p>
          </table:table-cell>
          <table:table-cell table:style-name="ce64"/>
          <table:table-cell table:style-name="ce4"/>
          <table:table-cell table:number-columns-repeated="16378"/>
        </table:table-row>
        <table:table-row table:style-name="ro37">
          <table:table-cell table:style-name="ce22" office:value-type="string" calcext:value-type="string">
            <text:p>CP26-04</text:p>
          </table:table-cell>
          <table:table-cell table:style-name="ce64" office:value-type="string" calcext:value-type="string">
            <text:p>Validar que cuando se seleccione alguno de estos registros, en el botón dinámico de color naranja en la parte inferior se muestren las diferentes transacciones que se pueden realizar a un radicado, dependiendo del estado en el que se encuentre el radicado, las opciones a mostrar por defecto son “Crear Radicado”, “Actualizar Radicado”, “Visualizar Radicado”, “Imprimir Stiker”, “Reasignar”, “Cargar imagen principal”, “Copiar a informado”, “Asociar plantilla”, “No requiere respuesta” y “Incluir en Expediente”</text:p>
          </table:table-cell>
          <table:table-cell table:style-name="ce6" office:value-type="string" calcext:value-type="string">
            <text:p>ok</text:p>
          </table:table-cell>
          <table:table-cell table:style-name="ce8" office:value-type="string" calcext:value-type="string">
            <text:p>1. Se ingresa al sistema con el usuario admin, y se valida que se tiene el permiso para radicación estándar</text:p>
            <text:p>2. Se ingresar al modulo radicación – radicación estándar</text:p>
            <text:p>3. Se selecciona el radicado 2024-00998-000034-2 y se da clic en el botón dinámico</text:p>
            <text:p>4. Se muestran las transacciones que indican en el item</text:p>
          </table:table-cell>
          <table:table-cell table:style-name="ce64"/>
          <table:table-cell table:style-name="ce4"/>
          <table:table-cell table:number-columns-repeated="16378"/>
        </table:table-row>
        <table:table-row table:style-name="ro38">
          <table:table-cell table:style-name="ce22" office:value-type="string" calcext:value-type="string">
            <text:p>CP26-05</text:p>
          </table:table-cell>
          <table:table-cell table:style-name="ce64" office:value-type="string" calcext:value-type="string">
            <text:p>Validar que cuando se de clic a la opción “Agregar” se despliegue el formulario de radicación donde se solicita información relacionado al documento que se esta radicado, datos asociados como el cliente, detalle del radicado, tipo de radicado y la asignación de TRD perteneciente al documento</text:p>
          </table:table-cell>
          <table:table-cell table:style-name="ce6" office:value-type="string" calcext:value-type="string">
            <text:p>ok</text:p>
          </table:table-cell>
          <table:table-cell table:style-name="ce90" office:value-type="string" calcext:value-type="string" table:number-columns-spanned="1" table:number-rows-spanned="2">
            <text:p>1. Se ingresa al sistema con el usuario admin, y se valida que se tiene el permiso para radicación estándar</text:p>
            <text:p>2. Se ingresar al modulo radicación – radicación estándar</text:p>
            <text:p>3. Se da clic en el botón dinámico en la opción de agregar</text:p>
            <text:p>4. Se diligencia todo el formulario, acorde a los datos que se solicitan, lo primero que se ingresa es el tipo de radicado ENTRADA</text:p>
            <text:p>5. Se selecciona el delito no aplica y automaticamente en tipo de carga no aplica</text:p>
            <text:p>6. Se ingresa en el nombre del cliente el criterio de Skina y se selecciona el registro encontrado</text:p>
          </table:table-cell>
          <table:table-cell table:style-name="ce64" office:value-type="string" calcext:value-type="string">
            <text:p>Se implementa una validacion para que el delito y el tipo no sea obligatoria, si el tipo de radicado es diferente a “Entrada”</text:p>
          </table:table-cell>
          <table:table-cell table:style-name="ce4"/>
          <table:table-cell table:number-columns-repeated="16378"/>
        </table:table-row>
        <table:table-row table:style-name="ro7">
          <table:table-cell table:style-name="ce22" office:value-type="string" calcext:value-type="string">
            <text:p>CP26-06</text:p>
          </table:table-cell>
          <table:table-cell table:style-name="ce64" office:value-type="string" calcext:value-type="string">
            <text:p>Validar que en el formulario se muestre los campos “Radicado Origen”, “Fecha documento” y “Asociación de Radicados” los cuales no deben ser obligatorios ser diligenciados</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7">
          <table:table-cell table:style-name="ce22" office:value-type="string" calcext:value-type="string">
            <text:p>CP26-07</text:p>
          </table:table-cell>
          <table:table-cell table:style-name="ce64" office:value-type="string" calcext:value-type="string">
            <text:p>Validar que en el listado de Tipo de Persona cuando se seleccione la opción de “Persona Natural” se muestren los campos de “Nombre o Razón Social”, Segundo Nombre, “Primer Apellido/Representante legal”, “Segundo Apellido”, “Docuento o NIT” y adicional la “dirección”, “pais”, “departamento”, “municipio”, “email” y “telefono”</text:p>
          </table:table-cell>
          <table:table-cell table:style-name="ce6" office:value-type="string" calcext:value-type="string">
            <text:p>ok</text:p>
          </table:table-cell>
          <table:table-cell table:style-name="ce90" office:value-type="string" calcext:value-type="string" table:number-columns-spanned="1" table:number-rows-spanned="3">
            <text:p>1. Se ingresa al sistema con el usuario admin, y se valida que se tiene el permiso para radicación estándar</text:p>
            <text:p>2. Se ingresar al modulo radicación – radicación estándar</text:p>
            <text:p>3. Se da clic en el botón dinámico en la opción de agregar diligenciar toda la información que se despliega</text:p>
            <text:p>4. En la sección donde se ingresa el cliente, se chequea la opción de “Nuevo Remitente”</text:p>
            <text:p>5. Se valida que el formulario y los campos se comportan como se indica en el item evaluado.</text:p>
          </table:table-cell>
          <table:table-cell/>
          <table:table-cell table:style-name="ce4"/>
          <table:table-cell table:number-columns-repeated="16378"/>
        </table:table-row>
        <table:table-row table:style-name="ro7">
          <table:table-cell table:style-name="ce22" office:value-type="string" calcext:value-type="string">
            <text:p>CP26-08</text:p>
          </table:table-cell>
          <table:table-cell table:style-name="ce64" office:value-type="string" calcext:value-type="string">
            <text:p>Validar que en el listado de Tipo de Persona cuando se seleccione la opción de “Persona Juridica” solamente se muestren el campo de “Nombre o Razón Social”, “Primer Apellido/Representante legal”, “Documento o NIT” y adicional la “dirección”, “pais”, “departamento”, “municipio”, “email” y “telefono”</text:p>
          </table:table-cell>
          <table:table-cell table:style-name="ce6" office:value-type="string" calcext:value-type="string">
            <text:p>ok</text:p>
          </table:table-cell>
          <table:covered-table-cell/>
          <table:table-cell table:style-name="ce64" office:value-type="string" calcext:value-type="string">
            <text:p>Se corrige la visualizacion de los campos en el formulario, corrigiendo el api del destinatario ya que lo estaba realizando de forma erronea</text:p>
          </table:table-cell>
          <table:table-cell table:style-name="ce4"/>
          <table:table-cell table:number-columns-repeated="16378"/>
        </table:table-row>
        <table:table-row table:style-name="ro39">
          <table:table-cell table:style-name="ce22" office:value-type="string" calcext:value-type="string">
            <text:p>CP26-09</text:p>
          </table:table-cell>
          <table:table-cell table:style-name="ce64" office:value-type="string" calcext:value-type="string">
            <text:p>Validar que al seleccionar el “Pais”, el listado de “Departamentos” se muestre y que al seleccionar un “Departamento” se muestre listado de municipios</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40">
          <table:table-cell table:style-name="ce6" office:value-type="string" calcext:value-type="string">
            <text:p>CP26-10</text:p>
          </table:table-cell>
          <table:table-cell table:style-name="ce12" office:value-type="string" calcext:value-type="string">
            <text:p>Validar que en el campo de documento o Nit, en caso de ingresar “0000” se asigne un consecutivo de forma automatica para el remitente/destinatario que se esta creando</text:p>
          </table:table-cell>
          <table:table-cell table:style-name="ce11" office:value-type="string" calcext:value-type="string">
            <text:p>ok</text:p>
          </table:table-cell>
          <table:table-cell table:style-name="ce28"/>
          <table:table-cell table:style-name="ce12"/>
          <table:table-cell table:style-name="ce29"/>
          <table:table-cell table:style-name="ce30" table:number-columns-repeated="21"/>
          <table:table-cell table:number-columns-repeated="16357"/>
        </table:table-row>
        <table:table-row table:style-name="ro41">
          <table:table-cell table:style-name="ce22" office:value-type="string" calcext:value-type="string">
            <text:p>CP26-11</text:p>
          </table:table-cell>
          <table:table-cell table:style-name="ce64" office:value-type="string" calcext:value-type="string">
            <text:p>Validar que si el Tipo de Radicado es <text:span text:style-name="T1">“Entrada” </text:span>o <text:span text:style-name="T1">“PQRS”</text:span> se muestre el listado de todas las dependencias para que se pueda seleccionar una o varias dependencias que sera o seran responsibles del tramite del radicado</text:p>
          </table:table-cell>
          <table:table-cell table:style-name="ce6" office:value-type="string" calcext:value-type="string">
            <text:p>ok</text:p>
          </table:table-cell>
          <table:table-cell table:style-name="ce90" office:value-type="string" calcext:value-type="string" table:number-columns-spanned="1" table:number-rows-spanned="4">
            <text:p>1. Se ingresa al sistema con el usuario admin, y se valida que se tiene el permiso para radicación estándar</text:p>
            <text:p>2. Se ingresar al modulo radicación – radicación estándar</text:p>
            <text:p>3. Se da clic en el botón dinámico en la opción de agregar diligenciar toda la información que se despliega</text:p>
            <text:p>4. En la sección de Responsable se muestran todas las dependencias acorde a como se indica que se deben mostrar</text:p>
            <text:p>5. Se selecciona la dependencia DEPENDENCIA PRUEBAS SKINATECH – 00998 esto precarga los usuarios</text:p>
            <text:p>6. Se selecciona al usuario Soporte Skinatech - Soporte Skintech</text:p>
            <text:p>7. Se valida que con base a la dependencia selecciona se carga la TRD de la dependencia</text:p>
            <text:p>8. Se selecciona la serie ACTOS ADMINISTRATIVOS y con esta se precarga el listado de subseries</text:p>
            <text:p>9. Se selecciona la subserie Resoluciones y con esta selección se precargan los tipos documentales</text:p>
            <text:p>10. Se selecciona un tipo documental y con este los días de termino</text:p>
          </table:table-cell>
          <table:table-cell table:style-name="ce64"/>
          <table:table-cell table:number-columns-repeated="16379"/>
        </table:table-row>
        <table:table-row table:style-name="ro41">
          <table:table-cell table:style-name="ce22" office:value-type="string" calcext:value-type="string">
            <text:p>CP26-12</text:p>
          </table:table-cell>
          <table:table-cell table:style-name="ce64" office:value-type="string" calcext:value-type="string">
            <text:p>Validar que con base a la dependencia o dependencias seleccionas se muestren los usuarios correspondientes a cada una de estas dependencias, permitiendo seleccionar uno o mas usuarios responsables del tramite del radicado.</text:p>
          </table:table-cell>
          <table:table-cell table:style-name="ce6" office:value-type="string" calcext:value-type="string">
            <text:p>ok</text:p>
          </table:table-cell>
          <table:covered-table-cell/>
          <table:table-cell table:style-name="ce64" office:value-type="string" calcext:value-type="string">
            <text:p>Se realizan validaciones para que funcione correctamente la extraccion de los datos y la implementacion en el formulario</text:p>
          </table:table-cell>
          <table:table-cell table:style-name="ce4"/>
          <table:table-cell table:number-columns-repeated="16378"/>
        </table:table-row>
        <table:table-row table:style-name="ro7">
          <table:table-cell table:style-name="ce22" office:value-type="string" calcext:value-type="string">
            <text:p>CP26-13</text:p>
          </table:table-cell>
          <table:table-cell table:style-name="ce64" office:value-type="string" calcext:value-type="string">
            <text:p>Validar que en el listado de “Serie”, se muestre las series documentales de las dependencias seleccionas y que al seleccionar una serie, se cargue el listado de “Subseries” y que al seleccionar una “Subserie” se muestren los “tipos documentales” correspondientes</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7">
          <table:table-cell table:style-name="ce22" office:value-type="string" calcext:value-type="string">
            <text:p>CP26-14</text:p>
          </table:table-cell>
          <table:table-cell table:style-name="ce64" office:value-type="string" calcext:value-type="string">
            <text:p>Validar que al seleccionar un “Tipo Documental” se muestren por defecto los dias restantes y con base a estos dias, mostrar la fecha de vencimiento del radicad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42">
          <table:table-cell table:style-name="ce22" office:value-type="string" calcext:value-type="string">
            <text:p>CP26-15</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8" office:value-type="string" calcext:value-type="string">
            <text:p>1. Se ingresa al sistema con el usuario admin, y se valida que se tiene el permiso para radicación estándar</text:p>
            <text:p>2. Se ingresar al modulo radicación – radicación estándar</text:p>
            <text:p>3. Se da clic en el botón dinámico en la opción de agregar</text:p>
            <text:p>4. Se despliega el formulario de radicación, se da clic al botón de guardar sin llenar ningún campo</text:p>
          </table:table-cell>
          <table:table-cell table:style-name="ce64"/>
          <table:table-cell table:style-name="ce4"/>
          <table:table-cell table:number-columns-repeated="16378"/>
        </table:table-row>
        <table:table-row table:style-name="ro43">
          <table:table-cell table:style-name="ce22" office:value-type="string" calcext:value-type="string">
            <text:p>CP26-16</text:p>
          </table:table-cell>
          <table:table-cell table:style-name="ce64" office:value-type="string" calcext:value-type="string">
            <text:p>Validar que cuando se diligencie todo el formulario y se de clic en la opción “Guardar” se muestre una alerta en la parte superior de confirmación indicando el radicado que se asigno “Registro almacenado correctamente Número de radicado: xxxxxxx,”</text:p>
          </table:table-cell>
          <table:table-cell table:style-name="ce6" office:value-type="string" calcext:value-type="string">
            <text:p>ok</text:p>
          </table:table-cell>
          <table:table-cell table:style-name="ce8" office:value-type="string" calcext:value-type="string">
            <text:p>1. Se ingresa al sistema con el usuario admin, y se valida que se tiene el permiso para radicación estándar</text:p>
            <text:p>2. Se ingresar al modulo radicación – radicación estándar</text:p>
            <text:p>3. Se da clic en el botón dinámico en la opción de agregar</text:p>
            <text:p>4. una vez se diligencia todo el formulario y se da clic en guardar el sistema muestra el número de radicado asociado.</text:p>
            <text:p>5. Muestra un mensaje de confirmación Registro almacenado correctamente Número de radicado: 2024-00998-000036-2</text:p>
          </table:table-cell>
          <table:table-cell table:style-name="ce64"/>
          <table:table-cell table:style-name="ce4"/>
          <table:table-cell table:number-columns-repeated="16378"/>
        </table:table-row>
        <table:table-row table:style-name="ro7">
          <table:table-cell table:style-name="ce22" office:value-type="string" calcext:value-type="string">
            <text:p>CP26-17</text:p>
          </table:table-cell>
          <table:table-cell table:style-name="ce64" office:value-type="string" calcext:value-type="string">
            <text:p>Validar que cuando se seleccione uno de los registros y se de clic en la opción “Editar” se despliegue el formulario con la información que ya se habia diligenciado y que se encuentra asociado al registro seleccionado</text:p>
          </table:table-cell>
          <table:table-cell table:style-name="ce6" office:value-type="string" calcext:value-type="string">
            <text:p>ok</text:p>
          </table:table-cell>
          <table:table-cell table:style-name="ce90" office:value-type="string" calcext:value-type="string" table:number-columns-spanned="1" table:number-rows-spanned="2">
            <text:p>1. Se ingresa al sistema con el usuario admin, y se valida que se tiene el permiso para radicación estándar</text:p>
            <text:p>2. Se ingresar al modulo radicación – radicación estándar</text:p>
            <text:p>3. Se selecciona el radicado que se debe modificar el número 2024-00998-000036-2</text:p>
            <text:p>4. Se cambia los dias de termino y se da clic en guardar</text:p>
            <text:p>5. Se muestra un mensaje de confirmación</text:p>
          </table:table-cell>
          <table:table-cell table:style-name="ce64" office:value-type="string" calcext:value-type="string">
            <text:p>Se realiza un validacion para que no genere error en la variable tipoPermisoRadiRadicado en caso tal de no ser solicitada</text:p>
          </table:table-cell>
          <table:table-cell table:style-name="ce4"/>
          <table:table-cell table:number-columns-repeated="16378"/>
        </table:table-row>
        <table:table-row table:style-name="ro32">
          <table:table-cell table:style-name="ce22" office:value-type="string" calcext:value-type="string">
            <text:p>CP26-18</text:p>
          </table:table-cell>
          <table:table-cell table:style-name="ce64" office:value-type="string" calcext:value-type="string">
            <text:p>Validar que cuando se haga clic en el botón de guradar se muestre un mensaje de confirmación indicando que se actualizo la información de forma correcta</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7">
          <table:table-cell table:style-name="ce22" office:value-type="string" calcext:value-type="string">
            <text:p>CP26-19</text:p>
          </table:table-cell>
          <table:table-cell table:style-name="ce64" office:value-type="string" calcext:value-type="string">
            <text:p>Validar que en la sección “Trazabilidad del radicado” se muestre un registro asociado a cada una de las transacciones realizadas al radicado, se debe mostrar la transacción “Actualizar Radicado”, la fecha y hora en la que se realizo la transacción, usuario y dependencia que hizo el proceso y <text:s/>una observación</text:p>
          </table:table-cell>
          <table:table-cell table:style-name="ce6" office:value-type="string" calcext:value-type="string">
            <text:p>ok</text:p>
          </table:table-cell>
          <table:table-cell table:style-name="ce90" office:value-type="string" calcext:value-type="string" table:number-columns-spanned="1" table:number-rows-spanned="3">
            <text:p>1. Se ingresa al sistema con el usuario admin, y se valida que se tiene el permiso para radicación estándar</text:p>
            <text:p>2. Se ingresar al modulo radicación – radicación estándar</text:p>
            <text:p>3. Se da clic en el botón dinamico y se da clic en la opción visualizar radicado</text:p>
            <text:p>4. Se muestra el detalle del radicado 2024-00998-000036-2, tanto en la trazabilidad del radicado como en la información del radicado</text:p>
          </table:table-cell>
          <table:table-cell table:style-name="ce64"/>
          <table:table-cell table:style-name="ce4"/>
          <table:table-cell table:number-columns-repeated="16378"/>
        </table:table-row>
        <table:table-row table:style-name="ro44">
          <table:table-cell table:style-name="ce22" office:value-type="string" calcext:value-type="string">
            <text:p>CP26-20</text:p>
          </table:table-cell>
          <table:table-cell table:style-name="ce64" office:value-type="string" calcext:value-type="string">
            <text:p>Validar que cuando se ingrese a editar el radicado y se cambien los días de termino asociado al radicado, el sistema muestre un mensaje de confirmación indicando “Se modificó la fecha de vencimiento: XX XX de XXXX del XXXX”</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45">
          <table:table-cell table:style-name="ce22" office:value-type="string" calcext:value-type="string">
            <text:p>CP26-21</text:p>
          </table:table-cell>
          <table:table-cell table:style-name="ce64" office:value-type="string" calcext:value-type="string">
            <text:p>Validar que cuando se este creando el radicado en el formulario de radicación en la opción que se muestra "Tipo de permiso", <text:s/>si este es chequeado el radicado va a quedar como confidencial es decir solo el dueño del radicado o el usuario que tiene el permiso puede acceder al radicado, de lo contrario no deberia dejar ingresar al radicado y deber mostrar mensaje indicando que el radicado esta confidencial</text:p>
          </table:table-cell>
          <table:table-cell table:style-name="ce6" office:value-type="string" calcext:value-type="string">
            <text:p>ok</text:p>
          </table:table-cell>
          <table:covered-table-cell/>
          <table:table-cell table:style-name="ce64" office:value-type="string" calcext:value-type="string">
            <text:p>realice la validacion como usuario tramitados y me visualiza el radicado, con otro usuario que no es dueño del radicado me dice que no tiene permisos y no deja visualizar el radicado</text:p>
          </table:table-cell>
          <table:table-cell table:style-name="ce4"/>
          <table:table-cell table:number-columns-repeated="16378"/>
        </table:table-row>
        <table:table-row table:style-name="ro46">
          <table:table-cell table:style-name="ce22" office:value-type="string" calcext:value-type="string">
            <text:p>CP26-22</text:p>
          </table:table-cell>
          <table:table-cell table:style-name="ce64" office:value-type="string" calcext:value-type="string">
            <text:p>Validar que cuando se de clic en el botón “FILTROS” se despliegue una ventana nueva donde se muestren los campos “Numero radicado”, “Asunto”, “Tipo de radicado”, “Remitente/Destinatario”, “Documento identidad”, “Tipo documental”, “Tipo recepción”, “Rango de fechas”, “Usuario tramitador”, “Dependencia”, “Estado”, “Radicado origen”, “Filtro por nivel de busqueda”, “Filtro por forme de creacion”, “Esta adicado” y “Descripcion del anexo”, adicional de mostrar una lista desplegable indicando la cantidad de registros a mostra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6-23</text:p>
          </table:table-cell>
          <table:table-cell table:style-name="ce64"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26-24</text:p>
          </table:table-cell>
          <table:table-cell table:style-name="ce64" office:value-type="string" calcext:value-type="string">
            <text:p>Validar que cuando se de clic en alguno de los botones de “CSV”, “EXCEL”, “PDF” y “IMPRIMIR” el sistema descargue o genere el correspondiente archiv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27 – Radicación – Radicación email (cuentas Microsoft)</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47">
          <table:table-cell table:style-name="ce6" office:value-type="string" calcext:value-type="string">
            <text:p>CP27-01</text:p>
          </table:table-cell>
          <table:table-cell table:style-name="ce64" office:value-type="string" calcext:value-type="string">
            <text:p>Validar que en el menú de modulos se muestre la opción “Radicación Correo E”</text:p>
          </table:table-cell>
          <table:table-cell table:style-name="ce6" office:value-type="string" calcext:value-type="string">
            <text:p>ok</text:p>
          </table:table-cell>
          <table:table-cell table:style-name="ce90" office:value-type="string" calcext:value-type="string" table:number-columns-spanned="1" table:number-rows-spanned="3">
            <text:p><text:a xlink:href="mailto:ventanilla.unica@medicinalegal.gov.co" xlink:type="simple">1. Se ingresa al sistema con el usuario admin, y se valida que se tiene el permiso para radicación estándar 2. Se ingresar al modulo radicación – radicación Correo E 3. Se da clic en el botón de LOGIN OAUTH MICROSOFT 4. Se valida que el sistema despliega la bandeja de correos que han llegado a la cuenta de correo 5. Se hizo este proceso con el correo de ventanilla.unica@medicinalegal.gov.co</text:a></text:p>
          </table:table-cell>
          <table:table-cell table:style-name="ce64"/>
          <table:table-cell table:style-name="ce4"/>
          <table:table-cell table:number-columns-repeated="16378"/>
        </table:table-row>
        <table:table-row table:style-name="ro48">
          <table:table-cell table:style-name="ce6" office:value-type="string" calcext:value-type="string">
            <text:p>CP27-02</text:p>
          </table:table-cell>
          <table:table-cell table:style-name="ce64" office:value-type="string" calcext:value-type="string">
            <text:p>Validar que cuando se de clic a la opción “Radicación Correo E” se despliegue un formulario donde se muestre un botón de “LOGIN OAUTH MICROSOFT” lo cual se debe mostrar solamente cuando el cliente vaya a utilizar cuentas de microsoft</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7">
          <table:table-cell table:style-name="ce6" office:value-type="string" calcext:value-type="string">
            <text:p>CP27-03</text:p>
          </table:table-cell>
          <table:table-cell table:style-name="ce64" office:value-type="string" calcext:value-type="string">
            <text:p>Validar que cuando se de clic en la opción del proceso anterior, se debe mostrar una ventana emergente donde se ingrese el correo electrónico de la entidad y la correspondiente contraseña en caso de que nunca hayan iniciado sesión en dicha cuenta, una vez se ingresan los datos microsoft pide una autorización adicional, la cual se debe aceptar</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45">
          <table:table-cell table:style-name="ce6" office:value-type="string" calcext:value-type="string">
            <text:p>CP27-04</text:p>
          </table:table-cell>
          <table:table-cell table:style-name="ce64" office:value-type="string" calcext:value-type="string">
            <text:p>Una vez se ingrese al correo se debe validar que se muestre el listado de correos que tiene dicha cuenta de correo, mostrando las columnas “Bandeja”, “De”, “Asunto”, “Fecha Envio”, “Adjuntos”, “Correo Radicado”</text:p>
          </table:table-cell>
          <table:table-cell table:style-name="ce6" office:value-type="string" calcext:value-type="string">
            <text:p>ok</text:p>
          </table:table-cell>
          <table:table-cell table:style-name="ce90" office:value-type="string" calcext:value-type="string" table:number-columns-spanned="1" table:number-rows-spanned="3">
            <text:p>1. Se ingresa al sistema con el usuario admin, y se valida que se tiene el permiso para radicación estándar</text:p>
            <text:p>2. Se ingresar al modulo radicación – radicación Correo E</text:p>
            <text:p>3. Se da clic en el botón de LOGIN OAUTH MICROSOFT</text:p>
            <text:p>4. Se ingresa la cuenta de correo ventanilla.unica@medicinalegal.gov.co y su correspondiente contraseña</text:p>
            <text:p>5. Se valida que el sistema despliega la bandeja de correos que han llegado a la cuenta de correo</text:p>
            <text:p>6. Se muestran las columnas que se indican en el item</text:p>
            <text:p>7. Se valida tambien que en el botón dinámico se muestran las diferentes acciones que se pueden realizar con un correo</text:p>
          </table:table-cell>
          <table:table-cell table:style-name="ce64"/>
          <table:table-cell table:style-name="ce4"/>
          <table:table-cell table:number-columns-repeated="16378"/>
        </table:table-row>
        <table:table-row table:style-name="ro45">
          <table:table-cell table:style-name="ce6" office:value-type="string" calcext:value-type="string">
            <text:p>CP27-05</text:p>
          </table:table-cell>
          <table:table-cell table:style-name="ce64" office:value-type="string" calcext:value-type="string">
            <text:p>Validar que cuando se seleccione alguno de los registros mostrados y se de clic en el botón dinámico de color naranja en la parte inferior, se muestre las opciones “Ver”, “Radicar Correos Seleccionados”, “Consultar últimos dos días”, “Cerrar Sesión”</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45">
          <table:table-cell table:style-name="ce6" office:value-type="string" calcext:value-type="string">
            <text:p>CP27-06</text:p>
          </table:table-cell>
          <table:table-cell table:style-name="ce64" office:value-type="string" calcext:value-type="string">
            <text:p>Validar que al dar clic en la opción “Ver”, se muestre una ventana con el detalle del contenido del correo, donde se muestre “De”, “Fecha envio”, “Tipo de vista disponible”, “Archivos adjuntos”, ademas del cuerpo del corre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7">
          <table:table-cell table:style-name="ce6" office:value-type="string" calcext:value-type="string">
            <text:p>CP27-07</text:p>
          </table:table-cell>
          <table:table-cell table:style-name="ce64" office:value-type="string" calcext:value-type="string">
            <text:p>Validar que al dar clic en la opción “Radicar Correos Seleccionados”, se despliegue el formulario de radicación para ser diligenciado, donde se debe mostrar por defecto el asunto del correo, el email de quien llego el correo, el medio de recepción debe ser “Correos Electrónicos”.</text:p>
          </table:table-cell>
          <table:table-cell table:style-name="ce6" office:value-type="string" calcext:value-type="string">
            <text:p>ok</text:p>
          </table:table-cell>
          <table:table-cell table:style-name="ce16"/>
          <table:table-cell/>
          <table:table-cell table:style-name="ce4"/>
          <table:table-cell table:number-columns-repeated="16378"/>
        </table:table-row>
        <table:table-row table:style-name="ro7">
          <table:table-cell table:style-name="ce6" office:value-type="string" calcext:value-type="string">
            <text:p>CP27-08</text:p>
          </table:table-cell>
          <table:table-cell table:style-name="ce64" office:value-type="string" calcext:value-type="string">
            <text:p>Validar que si el email de quien llego el correo existe previamente en el sistema, muestre la información asociada de lo contrario debe mostrar por defecto selecciona la opción de “Nuevo”; para que se diligencie la información.</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49">
          <table:table-cell table:style-name="ce6" office:value-type="string" calcext:value-type="string">
            <text:p>CP27-09</text:p>
          </table:table-cell>
          <table:table-cell table:style-name="ce64" office:value-type="string" calcext:value-type="string">
            <text:p>Validar que en el listado de tipo de radicado se muestre por defecto las opciones de “Entrada”, “PQRS, “Salida” y que se pueda seleccionar cualquiera de las opciones</text:p>
          </table:table-cell>
          <table:table-cell table:style-name="ce6" office:value-type="string" calcext:value-type="string">
            <text:p>ok</text:p>
          </table:table-cell>
          <table:table-cell table:style-name="ce90" office:value-type="string" calcext:value-type="string" table:number-columns-spanned="1" table:number-rows-spanned="2">
            <text:p>1. Se ingresa al sistema con el usuario admin, y se valida que se tiene el permiso para radicación estándar</text:p>
            <text:p>2. Se ingresar al modulo radicación – radicación Correo E</text:p>
            <text:p>3. Se da clic en el botón dinámico en la opción de agregar</text:p>
            <text:p>4. Se diligencia todo el formulario, acorde a los datos que se solicitan, lo primero que se ingresa es el tipo de radicado ENTRADA</text:p>
            <text:p>5. Se selecciona el delito no aplica y automaticamente en tipo de carga no aplica</text:p>
            <text:p>6. Se ingresa en el nombre del cliente el criterio de Skina y se selecciona el registro encontrado</text:p>
          </table:table-cell>
          <table:table-cell table:style-name="ce64"/>
          <table:table-cell table:style-name="ce4"/>
          <table:table-cell table:number-columns-repeated="16378"/>
        </table:table-row>
        <table:table-row table:style-name="ro49">
          <table:table-cell table:style-name="ce6" office:value-type="string" calcext:value-type="string">
            <text:p>CP27-10</text:p>
          </table:table-cell>
          <table:table-cell table:style-name="ce64" office:value-type="string" calcext:value-type="string">
            <text:p>Validar que en el formulario se muestre los campos “Radicado Origen”, “Fecha documento” y “Asociación de Radicados” los cuales no deben ser obligatorios ser diligenciados</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7">
          <table:table-cell table:style-name="ce6" office:value-type="string" calcext:value-type="string">
            <text:p>CP27-11</text:p>
          </table:table-cell>
          <table:table-cell table:style-name="ce64" office:value-type="string" calcext:value-type="string">
            <text:p>Validar que en el listado de Tipo de Persona cuando se seleccione la opción de “Persona Natural” se muestren los campos de “Nombre o Razón Social”, Segundo Nombre, “Primer Apellido/Representante legal”, “Segundo Apellido”</text:p>
          </table:table-cell>
          <table:table-cell table:style-name="ce6" office:value-type="string" calcext:value-type="string">
            <text:p>ok</text:p>
          </table:table-cell>
          <table:table-cell table:style-name="ce90" office:value-type="string" calcext:value-type="string" table:number-columns-spanned="1" table:number-rows-spanned="5">
            <text:p>1. Se ingresa al sistema con el usuario admin, y se valida que se tiene el permiso para radicación estándar</text:p>
            <text:p>2. Se ingresar al modulo radicación – radicación Correo E</text:p>
            <text:p>3. Se da clic en el botón dinámico en la opción de agregar diligenciar toda la información que se despliega</text:p>
            <text:p>4. En la sección de Responsable se muestran todas las dependencias acorde a como se indica que se deben mostrar</text:p>
            <text:p>5. Se selecciona la dependencia DEPENDENCIA PRUEBAS SKINATECH – 00998 esto precarga los usuarios</text:p>
            <text:p>6. Se selecciona al usuario Soporte Skinatech - Soporte Skintech</text:p>
            <text:p>7. Se valida que con base a la dependencia selecciona se carga la TRD de la dependencia</text:p>
            <text:p>8. Se selecciona la serie ACTOS ADMINISTRATIVOS y con esta se precarga el listado de subseries</text:p>
            <text:p>9. Se selecciona la subserie Resoluciones y con esta selección se precargan los tipos documentales</text:p>
            <text:p>10. Se selecciona un tipo documental y con este los días de termino</text:p>
          </table:table-cell>
          <table:table-cell table:style-name="ce64"/>
          <table:table-cell table:style-name="ce4"/>
          <table:table-cell table:number-columns-repeated="16378"/>
        </table:table-row>
        <table:table-row table:style-name="ro7">
          <table:table-cell table:style-name="ce6" office:value-type="string" calcext:value-type="string">
            <text:p>CP27-12</text:p>
          </table:table-cell>
          <table:table-cell table:style-name="ce64" office:value-type="string" calcext:value-type="string">
            <text:p>Validar que en el listado de Tipo de Persona cuando se seleccione la opción de “Persona Juridica” solamente se muestren el campo de “Nombre o Razón Social” y “Primer Apellido/Representante legal”</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7">
          <table:table-cell table:style-name="ce6" office:value-type="string" calcext:value-type="string">
            <text:p>CP27-13</text:p>
          </table:table-cell>
          <table:table-cell table:style-name="ce64" office:value-type="string" calcext:value-type="string">
            <text:p>Validar que en el campo de documento o Nit, en caso de ingresar “0000” se asigne un consecutivo de forma automatica para el remitente/destinatario que se esta creand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7">
          <table:table-cell table:style-name="ce6" office:value-type="string" calcext:value-type="string">
            <text:p>CP27-14</text:p>
          </table:table-cell>
          <table:table-cell table:style-name="ce64" office:value-type="string" calcext:value-type="string">
            <text:p>Validar que se pueda ingresar la “dirección”, “pais”, “departamento”, “municipio”, “email” y “telefon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7">
          <table:table-cell table:style-name="ce6" office:value-type="string" calcext:value-type="string">
            <text:p>CP27-15</text:p>
          </table:table-cell>
          <table:table-cell table:style-name="ce64" office:value-type="string" calcext:value-type="string">
            <text:p>Validar que al seleccionar el “Pais”, el listado de “Departamentos” se muestre y que al seleccionar un “Departamento” se muestre listado de municipios</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27">
          <table:table-cell table:style-name="ce6" office:value-type="string" calcext:value-type="string">
            <text:p>CP27-16</text:p>
          </table:table-cell>
          <table:table-cell table:style-name="ce64" office:value-type="string" calcext:value-type="string">
            <text:p>Validar que si el Tipo de Radicado es “Entrada” o “PQRS” se muestre el listado de todas las dependencias para que se pueda seleccionar una o varias dependencias que sera o seran responsibles del tramite del radicado</text:p>
          </table:table-cell>
          <table:table-cell table:style-name="ce6" office:value-type="string" calcext:value-type="string">
            <text:p>ok</text:p>
          </table:table-cell>
          <table:table-cell table:style-name="ce90" office:value-type="string" calcext:value-type="string" table:number-columns-spanned="1" table:number-rows-spanned="4">
            <text:p>1. Se ingresa al sistema con el usuario admin, y se valida que se tiene el permiso para radicación estándar</text:p>
            <text:p>2. Se ingresar al modulo radicación – radicación Correo E</text:p>
            <text:p>3. Se da clic en el botón dinámico en la opción de agregar diligenciar toda la información que se despliega</text:p>
            <text:p>4. En la sección de Responsable se muestran todas las dependencias acorde a como se indica que se deben mostrar</text:p>
            <text:p>5. Se selecciona la dependencia DEPENDENCIA PRUEBAS SKINATECH – 00998 esto precarga los usuarios</text:p>
            <text:p>6. Se selecciona al usuario Soporte Skinatech - Soporte Skintech</text:p>
            <text:p>7. Se valida que con base a la dependencia selecciona se carga la TRD de la dependencia</text:p>
            <text:p>8. Se selecciona la serie ACTOS ADMINISTRATIVOS y con esta se precarga el listado de subseries</text:p>
            <text:p>9. Se selecciona la subserie Resoluciones y con esta selección se precargan los tipos documentales</text:p>
            <text:p>10. Se selecciona un tipo documental y con este los días de termino</text:p>
          </table:table-cell>
          <table:table-cell table:style-name="ce64"/>
          <table:table-cell table:style-name="ce4"/>
          <table:table-cell table:number-columns-repeated="16378"/>
        </table:table-row>
        <table:table-row table:style-name="ro50">
          <table:table-cell table:style-name="ce6" office:value-type="string" calcext:value-type="string">
            <text:p>CP27-17</text:p>
          </table:table-cell>
          <table:table-cell table:style-name="ce64" office:value-type="string" calcext:value-type="string">
            <text:p>Validar que con base a la dependencia o dependencias seleccionas se muestren los usuarios correspondientes a cada una de estas dependencias, permitiendo seleccionar uno o mas usuarios responsables del tramite del radicad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51">
          <table:table-cell table:style-name="ce6" office:value-type="string" calcext:value-type="string">
            <text:p>CP27-18</text:p>
          </table:table-cell>
          <table:table-cell table:style-name="ce64" office:value-type="string" calcext:value-type="string">
            <text:p>Validar que en el listado de “Serie”, se muestre las series documentales de las dependencias seleccionas y que al seleccionar una serie, se cargue el listado de “Subseries” y que al seleccionar una “Subserie” se muestren los “tipos documentales” correspondientes</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52">
          <table:table-cell table:style-name="ce6" office:value-type="string" calcext:value-type="string">
            <text:p>CP27-19</text:p>
          </table:table-cell>
          <table:table-cell table:style-name="ce64" office:value-type="string" calcext:value-type="string">
            <text:p>Validar que al seleccionar un “Tipo Documental” se muestren por defecto los dias restantes y con base a estos dias, mostrar la fecha de vencimiento del radicad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31">
          <table:table-cell table:style-name="ce6" office:value-type="string" calcext:value-type="string">
            <text:p>CP27-20</text:p>
          </table:table-cell>
          <table:table-cell table:style-name="ce64" office:value-type="string" calcext:value-type="string">
            <text:p>Validar que todos los campos que tienen * no se permitan pasar en blanco y si es asi, mostrar mensaje indicando que no pueden ser vacios y que adicional los pinte de rojo</text:p>
          </table:table-cell>
          <table:table-cell table:style-name="ce6" office:value-type="string" calcext:value-type="string">
            <text:p>ok</text:p>
          </table:table-cell>
          <table:table-cell table:style-name="ce8" office:value-type="string" calcext:value-type="string">
            <text:p>1. Se ingresa al sistema con el usuario admin, y se valida que se tiene el permiso para radicación estándar</text:p>
            <text:p>2. Se ingresar al modulo radicación – radicación estándar</text:p>
            <text:p>3. Se da clic en el botón dinámico en la opción de agregar</text:p>
            <text:p>4. Se despliega el formulario de radicación, se da clic al botón de guardar sin llenar ningún campo</text:p>
          </table:table-cell>
          <table:table-cell table:style-name="ce64"/>
          <table:table-cell table:style-name="ce4"/>
          <table:table-cell table:number-columns-repeated="16378"/>
        </table:table-row>
        <table:table-row table:style-name="ro53">
          <table:table-cell table:style-name="ce6" office:value-type="string" calcext:value-type="string">
            <text:p>CP27-21</text:p>
          </table:table-cell>
          <table:table-cell table:style-name="ce64" office:value-type="string" calcext:value-type="string">
            <text:p>Validar que cuando se diligencie todo el formulario y se de clic en la opción “Guardar” se muestre una alerta en la parte superior de confirmación indicando el radicado que se asigno “Registro almacenado correctamente Número de radicado: xxxxxxx,”</text:p>
          </table:table-cell>
          <table:table-cell table:style-name="ce6" office:value-type="string" calcext:value-type="string">
            <text:p>ok</text:p>
          </table:table-cell>
          <table:table-cell table:style-name="ce8" office:value-type="string" calcext:value-type="string">
            <text:p>1. Se ingresa al sistema con el usuario admin, y se valida que se tiene el permiso para radicación estándar</text:p>
            <text:p>2. Se ingresar al modulo radicación – radicación Correo E</text:p>
            <text:p>3. Se da clic en el botón dinámico en la opción de agregar</text:p>
            <text:p>4. una vez se diligencia todo el formulario y se da clic en guardar el sistema muestra el número de radicado asociado.</text:p>
            <text:p>5. Muestra un mensaje de confirmación Registro almacenado correctamente Número de radicado: 2024-00998-000033-2</text:p>
          </table:table-cell>
          <table:table-cell table:style-name="ce64"/>
          <table:table-cell table:style-name="ce4"/>
          <table:table-cell table:number-columns-repeated="16378"/>
        </table:table-row>
        <table:table-row table:style-name="ro7">
          <table:table-cell table:style-name="ce6" office:value-type="string" calcext:value-type="string">
            <text:p>CP27-22</text:p>
          </table:table-cell>
          <table:table-cell table:style-name="ce64" office:value-type="string" calcext:value-type="string">
            <text:p>Validar que en el botón dinámico de color naranja en la parte inferior y se muestre las diferentes transacciones que se pueden realizar con el radicado, una de estas deber una opción que se llama “Visualizar Radicado”</text:p>
          </table:table-cell>
          <table:table-cell table:style-name="ce6" office:value-type="string" calcext:value-type="string">
            <text:p>ok</text:p>
          </table:table-cell>
          <table:table-cell table:style-name="ce90" office:value-type="string" calcext:value-type="string" table:number-columns-spanned="1" table:number-rows-spanned="2">
            <text:p>1. Se ingresa al sistema con el usuario admin, y se valida que se tiene el permiso para radicación estándar</text:p>
            <text:p>2. Se ingresar al modulo radicación – radicación estándar</text:p>
            <text:p>3. Se selecciona el radicado que se debe modificar el número 2024-00998-000033-2</text:p>
            <text:p>4. Se cambia los días de termino y se da clic en guardar</text:p>
            <text:p>5. Se muestra un mensaje de confirmación</text:p>
          </table:table-cell>
          <table:table-cell table:style-name="ce64"/>
          <table:table-cell table:style-name="ce4"/>
          <table:table-cell table:number-columns-repeated="16378"/>
        </table:table-row>
        <table:table-row table:style-name="ro54">
          <table:table-cell table:style-name="ce6" office:value-type="string" calcext:value-type="string">
            <text:p>CP27-23</text:p>
          </table:table-cell>
          <table:table-cell table:style-name="ce64" office:value-type="string" calcext:value-type="string">
            <text:p>Validar que al dar clic en la opción “Visualizar Radicado” se muestre una nueva pantalla donde se muestre una sección que se llama “Detalle del radicado”, “Documentos del radicado” donde se debe mostrar por defecto 3 archivos relacionados al correo, los cuales son de extención .xml con el cuerpo del correo, .pdf con el cuerpo del correo reflejando el número de radicado que se asigno y un .html el cual debe mostrar el correo en original</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7">
          <table:table-cell table:style-name="ce6" office:value-type="string" calcext:value-type="string">
            <text:p>CP27-24</text:p>
          </table:table-cell>
          <table:table-cell table:style-name="ce64" office:value-type="string" calcext:value-type="string">
            <text:p>Validar que el archivo .pdf que se genera de forma automatica muestre el logo del cliente al que se realiza la implementación</text:p>
          </table:table-cell>
          <table:table-cell table:style-name="ce6" office:value-type="string" calcext:value-type="string">
            <text:p>ok</text:p>
          </table:table-cell>
          <table:table-cell table:style-name="ce90" office:value-type="string" calcext:value-type="string" table:number-columns-spanned="1" table:number-rows-spanned="3">
            <text:p>1. Se ingresa al sistema con el usuario admin, y se valida que se tiene el permiso para radicación estándar</text:p>
            <text:p>2. Se ingresar al modulo radicación – radicación Correo E</text:p>
            <text:p>3. Se da clic en el botón dinámico y se da clic en la opción visualizar radicado</text:p>
            <text:p>4. Se muestra el detalle del radicado 2024-00998-000033-2, tanto en la trazabilidad del radicado como en la información del radicado</text:p>
          </table:table-cell>
          <table:table-cell table:style-name="ce64"/>
          <table:table-cell table:style-name="ce4"/>
          <table:table-cell table:number-columns-repeated="16378"/>
        </table:table-row>
        <table:table-row table:style-name="ro7">
          <table:table-cell table:style-name="ce6" office:value-type="string" calcext:value-type="string">
            <text:p>CP27-25</text:p>
          </table:table-cell>
          <table:table-cell table:style-name="ce64" office:value-type="string" calcext:value-type="string">
            <text:p>Validar que adicional a los 3 archivos que por defecto se crean cuando se radica un correo, se muestren tambien los adjuntos que llegaron con el correo si es el cas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7">
          <table:table-cell table:style-name="ce6" office:value-type="string" calcext:value-type="string">
            <text:p>CP27-26</text:p>
          </table:table-cell>
          <table:table-cell table:style-name="ce64" office:value-type="string" calcext:value-type="string">
            <text:p>Validar que tambien se muestre una sección que se llama “Trazabilidad del radicado” y se muestre un registro asociado a “Crear Radicado” mostrando fecha y hora en la que se realizo, usuario y dependencia que hizo el proceso, <text:s/>una observación</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28 – Radicación – Radicación Masiva</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51" table:number-columns-spanned="2" table:number-rows-spanned="1"/>
          <table:covered-table-cell/>
          <table:table-cell table:style-name="ce31" table:number-columns-repeated="2"/>
          <table:table-cell table:style-name="ce51" table:number-columns-spanned="2" table:number-rows-spanned="1"/>
          <table:covered-table-cell/>
          <table:table-cell table:style-name="ce31" table:number-columns-repeated="2"/>
          <table:table-cell table:style-name="ce51" table:number-columns-spanned="2" table:number-rows-spanned="1"/>
          <table:covered-table-cell/>
          <table:table-cell table:style-name="ce31" table:number-columns-repeated="2"/>
          <table:table-cell table:style-name="ce51" table:number-columns-spanned="2" table:number-rows-spanned="1"/>
          <table:covered-table-cell/>
          <table:table-cell table:style-name="ce31" table:number-columns-repeated="2"/>
          <table:table-cell table:style-name="ce51" table:number-columns-spanned="2" table:number-rows-spanned="1"/>
          <table:covered-table-cell/>
          <table:table-cell table:style-name="ce31" table:number-columns-repeated="2"/>
          <table:table-cell table:style-name="ce32" table:number-columns-repeated="2"/>
          <table:table-cell table:number-columns-repeated="16357"/>
        </table:table-row>
        <table:table-row table:style-name="ro7">
          <table:table-cell table:style-name="ce6" office:value-type="string" calcext:value-type="string">
            <text:p>CP28-01</text:p>
          </table:table-cell>
          <table:table-cell table:style-name="ce64" office:value-type="string" calcext:value-type="string">
            <text:p>Validar que en el menú de modulo Radicación se muestre la opción “Radicación masiva”</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28-02</text:p>
          </table:table-cell>
          <table:table-cell table:style-name="ce64" office:value-type="string" calcext:value-type="string">
            <text:p>Validar que cuando se de clic a la opción “Radicación masiva”, se despliegue el formulario de radicación donde se solicite el tipo de radicado, la información de la “dependencia responsible” y al seleccionar una opción mostrar el formulario de “funcionarios”, estos listados se deben poder seleccionar de forma multiple</text:p>
          </table:table-cell>
          <table:table-cell table:style-name="ce6" office:value-type="string" calcext:value-type="string">
            <text:p>ok</text:p>
          </table:table-cell>
          <table:table-cell table:style-name="ce16"/>
          <table:table-cell table:style-name="ce64" office:value-type="string" calcext:value-type="string">
            <text:p>Se implementa un condicional para estos campos “Numero caso”, “Delito” y “tipo” “agregar personas”</text:p>
          </table:table-cell>
          <table:table-cell table:style-name="ce4"/>
          <table:table-cell table:number-columns-repeated="16378"/>
        </table:table-row>
        <table:table-row table:style-name="ro7">
          <table:table-cell table:style-name="ce6" office:value-type="string" calcext:value-type="string">
            <text:p>CP28-03</text:p>
          </table:table-cell>
          <table:table-cell table:style-name="ce64" office:value-type="string" calcext:value-type="string">
            <text:p>Validar que en el mismo formulario se solicite información relacionada al radicado, “Serie”, “Subserie”, “Tipo documental”, “Asunto”, “Días tramite” y “folios” relacionado al raicado que se esta generando, adicional de solicitar “ingresar archivo” de remitentes/destinatarios y “archivo para la plantilla” de correspondencia</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28-04</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28-05</text:p>
          </table:table-cell>
          <table:table-cell table:style-name="ce64" office:value-type="string" calcext:value-type="string">
            <text:p>Validar que cuando se de clic a la opción “DESCARGAR FORMATO” se descargue el archivo plano, donde se diligencie la información de los remitentes/destinatarios a los que se les va radica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28-06</text:p>
          </table:table-cell>
          <table:table-cell table:style-name="ce64" office:value-type="string" calcext:value-type="string">
            <text:p>Validar que cuando se procese la información el sistema genere radicado por cada remitente/destinatario que se creo, adicional de marcar el estado del radicado en combinación de correspondencia, esto aplicada para cada uno de los radicados que se generen de esta forma</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28-07</text:p>
          </table:table-cell>
          <table:table-cell table:style-name="ce12" office:value-type="string" calcext:value-type="string">
            <text:p>Validar que al dar clic en el botón dinámico de color naranja en la parte inferior, se muestre la opción de “Firmar documento” al dar clic en dicha opción se despliegue una ventana donde se muestren las diferentes opciones de firmas, y un campo para solicitar la contraseña del usuario</text:p>
          </table:table-cell>
          <table:table-cell table:style-name="ce11" office:value-type="string" calcext:value-type="string">
            <text:p>ok</text:p>
          </table:table-cell>
          <table:table-cell table:style-name="ce28"/>
          <table:table-cell table:style-name="ce12" office:value-type="string" calcext:value-type="string">
            <text:p>Se modifica el codigo para que tome la trazabilidad de todos los documentos que hallan sido firmados</text:p>
          </table:table-cell>
          <table:table-cell table:style-name="ce29"/>
          <table:table-cell table:style-name="ce30" table:number-columns-repeated="21"/>
          <table:table-cell table:number-columns-repeated="16357"/>
        </table:table-row>
        <table:table-row table:style-name="ro7">
          <table:table-cell table:style-name="ce6" office:value-type="string" calcext:value-type="string">
            <text:p>CP28-08</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28-09</text:p>
          </table:table-cell>
          <table:table-cell table:style-name="ce64" office:value-type="string" calcext:value-type="string">
            <text:p>Validar que cuando se haga el proceso anterior se procese la información y que los documentos se conviertan en pdf y se muestren ya con la firma puesta en el document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55">
          <table:table-cell table:style-name="ce6" office:value-type="string" calcext:value-type="string">
            <text:p>CP28-10</text:p>
          </table:table-cell>
          <table:table-cell table:style-name="ce64" office:value-type="string" calcext:value-type="string">
            <text:p>Validar que cuando se cargue el archivo de los remitentes/destinatarios con alguna de las columnas vacias el sistema muestre un mensaje de error indicado que alguno de los registros esta incompleto y que se debe procesar. Ej: “Fila 4 error en columna (Tipo de persona), no puede ser vacía,Fila 4 error en columna (Correo Electrónico), no puede ser vacía,Fila 4 error en columna (Direccion), no puede ser vacía”</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28-11</text:p>
          </table:table-cell>
          <table:table-cell table:style-name="ce64" office:value-type="string" calcext:value-type="string">
            <text:p>Validar que el nombre del remitente/destinatario se guarde de forma correcta, es decir que el nombre y el apellido deben quedar guardado por separado y no solamente en un camp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28-12</text:p>
          </table:table-cell>
          <table:table-cell table:style-name="ce64" office:value-type="string" calcext:value-type="string">
            <text:p>Validar que cuando se seleccione un radicado del listado de radicados, el sistema no mestre el mensaje indicando que “No se encontro una siguiente transacción” ya que esto solo deberia aparecer si el radicado se indico que iba a tener flujo documental</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29 – Transacción – Viasualizar Radicado</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29-01</text:p>
          </table:table-cell>
          <table:table-cell table:style-name="ce64" office:value-type="string" calcext:value-type="string">
            <text:p>Validar que cuando se ingrese al modulo se muestre una tabla con el listado de todos los radicados que se han asignado al usuario o creados por el usuario, este listado muestra diferentes columnas asociadas al radicado</text:p>
          </table:table-cell>
          <table:table-cell table:style-name="ce6" office:value-type="string" calcext:value-type="string">
            <text:p>ok</text:p>
          </table:table-cell>
          <table:table-cell table:style-name="ce90" office:value-type="string" calcext:value-type="string" table:number-columns-spanned="1" table:number-rows-spanned="3">
            <text:p>1. Se ingresa al sistema con el usuario admin, y se valida que se tiene el permiso para radicación estándar</text:p>
            <text:p>2. Se ingresar al modulo radicación – radicación estándar</text:p>
            <text:p>3. Se selecciona el radicado 2024-00998-000033-2</text:p>
            <text:p>4. Se da clic en el botón dinámico y se da clic en la opción Visualizar radicado</text:p>
            <text:p>5. Se observan las secciones que se indican se evidencia el detalle del radicado, trazabilidad del radicado, anexos del radicado y respuesta al radicado</text:p>
          </table:table-cell>
          <table:table-cell table:style-name="ce64"/>
          <table:table-cell table:style-name="ce4"/>
          <table:table-cell table:number-columns-repeated="16378"/>
        </table:table-row>
        <table:table-row table:style-name="ro7">
          <table:table-cell table:style-name="ce22" office:value-type="string" calcext:value-type="string">
            <text:p>CP29-02</text:p>
          </table:table-cell>
          <table:table-cell table:style-name="ce64" office:value-type="string" calcext:value-type="string">
            <text:p>Validar que en el botón dinámico de color naranja en la parte inferior y se muestre las diferentes transacciones que se pueden realizar con el radicado, una de estas deber una opción que se llama “Visualizar Radicad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7">
          <table:table-cell table:style-name="ce22" office:value-type="string" calcext:value-type="string">
            <text:p>CP29-03</text:p>
          </table:table-cell>
          <table:table-cell table:style-name="ce64" office:value-type="string" calcext:value-type="string">
            <text:p>Validar que cuando se haga el proceso anterior se muestre 4 secciones, la primera “Detalle del radicado”, “Documentos principales”, “Documentos del radicado” y “Trazabilidad del radicad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7">
          <table:table-cell table:style-name="ce22" office:value-type="string" calcext:value-type="string">
            <text:p>CP29-04</text:p>
          </table:table-cell>
          <table:table-cell table:style-name="ce64" office:value-type="string" calcext:value-type="string">
            <text:p>Validar que en la sección “Detalle del radicado”, se muestre la información asociada al radicado información como el cliente, usuario y dependencia responsible del radicado, fecha de vencimiento y de radicado, asunto del radicado tipo de radicado e información asociada a la TRD</text:p>
          </table:table-cell>
          <table:table-cell table:style-name="ce6" office:value-type="string" calcext:value-type="string">
            <text:p>ok</text:p>
          </table:table-cell>
          <table:table-cell table:style-name="ce8" office:value-type="string" calcext:value-type="string">
            <text:p>1. Se valida que se muestra todo el detalle del radicado y se evidencia la información que se describe en el item evaluado</text:p>
          </table:table-cell>
          <table:table-cell table:style-name="ce64"/>
          <table:table-cell table:style-name="ce4"/>
          <table:table-cell table:number-columns-repeated="16378"/>
        </table:table-row>
        <table:table-row table:style-name="ro7">
          <table:table-cell table:style-name="ce22" office:value-type="string" calcext:value-type="string">
            <text:p>CP29-05</text:p>
          </table:table-cell>
          <table:table-cell table:style-name="ce64" office:value-type="string" calcext:value-type="string">
            <text:p>Validar que en la sección “Trazabilidad del radicado” se muestre un registro asociado a cada una de las transacciones realizadas al radicado, se debe mostrar la transacción “Visualizar Radicado”, la fecha y hora en la que se realizo la transacción, usuario y dependencia que hizo el proceso y <text:s/>una observación</text:p>
          </table:table-cell>
          <table:table-cell table:style-name="ce6" office:value-type="string" calcext:value-type="string">
            <text:p>ok</text:p>
          </table:table-cell>
          <table:table-cell table:style-name="ce8" office:value-type="string" calcext:value-type="string">
            <text:p>1. Se valida que se muestra toda la trazabilidad del radicado, guardando usuario, fecha y hora en la que se hace el proceso y se evidencia la información que se describe en el item evaluado</text:p>
          </table:table-cell>
          <table:table-cell table:style-name="ce64"/>
          <table:table-cell table:style-name="ce4"/>
          <table:table-cell table:number-columns-repeated="16378"/>
        </table:table-row>
        <table:table-row table:style-name="ro7">
          <table:table-cell table:style-name="ce22" office:value-type="string" calcext:value-type="string">
            <text:p>CP29-06</text:p>
          </table:table-cell>
          <table:table-cell table:style-name="ce64" office:value-type="string" calcext:value-type="string">
            <text:p>Validar que en la sección “Documentos principales” se muestren los docuemntos o las plantillas que se han utilizado para dar respuesta al radicado, o el documento utilizado con la proyección de la comunicación oficial</text:p>
          </table:table-cell>
          <table:table-cell table:style-name="ce6" office:value-type="string" calcext:value-type="string">
            <text:p>ok</text:p>
          </table:table-cell>
          <table:table-cell table:style-name="ce8" office:value-type="string" calcext:value-type="string">
            <text:p>1. Se valida que se muestra todo el detalle del radicado y se evidencia la información que se describe en el item evaluado</text:p>
          </table:table-cell>
          <table:table-cell table:style-name="ce64"/>
          <table:table-cell table:style-name="ce4"/>
          <table:table-cell table:number-columns-repeated="16378"/>
        </table:table-row>
        <table:table-row table:style-name="ro7">
          <table:table-cell table:style-name="ce22" office:value-type="string" calcext:value-type="string">
            <text:p>CP29-07</text:p>
          </table:table-cell>
          <table:table-cell table:style-name="ce64" office:value-type="string" calcext:value-type="string">
            <text:p>Validar que en la sección “Documentos del Radicado”, se muestren todos los anexos o soportes asociados a un radicado, estos son cargados por la transacción “cargar anexos” o adjuntos que llegan por correo electrónico de forma automatica</text:p>
          </table:table-cell>
          <table:table-cell table:style-name="ce6" office:value-type="string" calcext:value-type="string">
            <text:p>ok</text:p>
          </table:table-cell>
          <table:table-cell table:style-name="ce8" office:value-type="string" calcext:value-type="string">
            <text:p>1. Se valida que se muestra todo el detalle del radicado y se evidencia la información que se describe en el item evaluado</text:p>
          </table:table-cell>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30 – Transacción – Cargar Imagen Principal</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30-01</text:p>
          </table:table-cell>
          <table:table-cell table:style-name="ce64" office:value-type="string" calcext:value-type="string">
            <text:p>Validar que cuando se ingrese al modulo se muestre una tabla con el listado de todos los radicados que se han asignado al usuario o creados por el usuario, este listado muestra diferentes columnas asociadas al radicado</text:p>
          </table:table-cell>
          <table:table-cell table:style-name="ce6" office:value-type="string" calcext:value-type="string">
            <text:p>ok</text:p>
          </table:table-cell>
          <table:table-cell table:style-name="ce90" office:value-type="string" calcext:value-type="string" table:number-columns-spanned="1" table:number-rows-spanned="2">
            <text:p>1. Se ingresa al sistema con el usuario admin, y se valida que se tiene el permiso para radicación estándar</text:p>
            <text:p>2. Se ingresar al modulo radicación – radicación estándar</text:p>
            <text:p>3. Se selecciona el radicado 2024-00998-000033-2</text:p>
            <text:p>4. Se da clic en el botón dinámico y se da clic en la opción Cargar Imagen Principal</text:p>
          </table:table-cell>
          <table:table-cell table:style-name="ce64"/>
          <table:table-cell table:style-name="ce4"/>
          <table:table-cell table:number-columns-repeated="16378"/>
        </table:table-row>
        <table:table-row table:style-name="ro7">
          <table:table-cell table:style-name="ce22" office:value-type="string" calcext:value-type="string">
            <text:p>CP30-02</text:p>
          </table:table-cell>
          <table:table-cell table:style-name="ce64" office:value-type="string" calcext:value-type="string">
            <text:p>Validar que al seleccionar un radicado y se de clic en el botón dinámico de color naranja en la parte inferior y se muestre la opción de “Cargar imagen principal” y al dar clic a dicha opción, se debe desplegar una ventana donde se muestre un campo de descripción, campo para ingresar el archivo y si este es publico o confidencial</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56">
          <table:table-cell table:style-name="ce22" office:value-type="string" calcext:value-type="string">
            <text:p>CP30-03</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8" office:value-type="string" calcext:value-type="string">
            <text:p>1. Se ingresa al sistema con el usuario admin, y se valida que se tiene el permiso para radicación estándar</text:p>
            <text:p>2. Se ingresar al modulo radicación – radicación estándar</text:p>
            <text:p>3. Se selecciona el radicado 2024-00998-000033-2</text:p>
            <text:p>4. Se da clic en el botón dinámico y se da clic en la opción Cargar Imagen Principal</text:p>
            <text:p>5. Se valida que en caso de no ingresar ningún campo y se procede a guardar se muestra el mensaje</text:p>
          </table:table-cell>
          <table:table-cell table:style-name="ce64"/>
          <table:table-cell table:style-name="ce4"/>
          <table:table-cell table:number-columns-repeated="16378"/>
        </table:table-row>
        <table:table-row table:style-name="ro57">
          <table:table-cell table:style-name="ce23" office:value-type="string" calcext:value-type="string">
            <text:p>CP30-04</text:p>
          </table:table-cell>
          <table:table-cell table:style-name="ce64" office:value-type="string" calcext:value-type="string">
            <text:p>Validar que cuando el proceso anterior se haga de forma correcta y el formulario muestre que el documento se cargo al 100%, se muestra un mensaje de confirmación indicando que se cargo correctamente</text:p>
          </table:table-cell>
          <table:table-cell table:style-name="ce6" office:value-type="string" calcext:value-type="string">
            <text:p>ok</text:p>
          </table:table-cell>
          <table:table-cell table:style-name="ce90" office:value-type="string" calcext:value-type="string" table:number-columns-spanned="1" table:number-rows-spanned="2">
            <text:p>1. Se ingresa al sistema con el usuario admin, y se valida que se tiene el permiso para radicación estándar</text:p>
            <text:p>2. Se ingresar al modulo radicación – radicación estándar</text:p>
            <text:p>3. Se selecciona el radicado 2024-00998-000033-2</text:p>
            <text:p>4. Se da clic en el botón dinámico y se da clic en la opción Cargar Imagen Principal</text:p>
            <text:p>5. Cuando se da clic en el botón de procesar se muestra mensaje de confirmación</text:p>
            <text:p>6. El archivo Listado de usuarios (1).pdf se cargó de forma correcta al radicado 2024-00998-000033-2</text:p>
          </table:table-cell>
          <table:table-cell table:style-name="ce64" office:value-type="string" calcext:value-type="string">
            <text:p>No se puede completar porque el cargue de archivos solo esta disponible en Chrome según el Log de selenium</text:p>
          </table:table-cell>
          <table:table-cell table:style-name="ce4"/>
          <table:table-cell table:number-columns-repeated="16378"/>
        </table:table-row>
        <table:table-row table:style-name="ro7">
          <table:table-cell table:style-name="ce22" office:value-type="string" calcext:value-type="string">
            <text:p>CP30-05</text:p>
          </table:table-cell>
          <table:table-cell table:style-name="ce64" office:value-type="string" calcext:value-type="string">
            <text:p>Validar que en el botón dinámico de color naranja en la parte inferior y se muestre las diferentes transacciones que se pueden realizar con el radicado, una de estas deber una opción que se llama “Visualizar Radicad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58">
          <table:table-cell table:style-name="ce22" office:value-type="string" calcext:value-type="string">
            <text:p>CP30-06</text:p>
          </table:table-cell>
          <table:table-cell table:style-name="ce64" office:value-type="string" calcext:value-type="string">
            <text:p>Validar que en la sección que se llama “Trazabilidad del radicado” se muestre un registro asociado a “Asociar imagen principal” mostrando fecha y hora en la que se realizo, usuario y dependencia que hizo el proceso y adicional una observación</text:p>
          </table:table-cell>
          <table:table-cell table:style-name="ce6" office:value-type="string" calcext:value-type="string">
            <text:p>ok</text:p>
          </table:table-cell>
          <table:table-cell table:style-name="ce8" office:value-type="string" calcext:value-type="string">
            <text:p>1. Se ingresa al sistema con el usuario admin, y se valida que se tiene el permiso para radicación estándar</text:p>
            <text:p>2. Se ingresar al modulo radicación – radicación estándar</text:p>
            <text:p>3. Se selecciona el radicado 2024-00998-000033-2</text:p>
            <text:p>4. Se evidencia que en la trazabilidad del radicado queda el registros asociado al proceso</text:p>
          </table:table-cell>
          <table:table-cell table:style-name="ce64" office:value-type="string" calcext:value-type="string">
            <text:p>se esta enviando una notificación de bienvenida</text:p>
          </table:table-cell>
          <table:table-cell table:style-name="ce4"/>
          <table:table-cell table:number-columns-repeated="16378"/>
        </table:table-row>
        <table:table-row table:style-name="ro7">
          <table:table-cell table:style-name="ce22" office:value-type="string" calcext:value-type="string">
            <text:p>CP30-07</text:p>
          </table:table-cell>
          <table:table-cell table:style-name="ce64" office:value-type="string" calcext:value-type="string">
            <text:p>Validar que en la sección “Documentos del radicado”, se muestre el archivo que se cargo, adicional de mostrar “Titulo del documento”, “Descripción”, “Tipo documental”, “Autor o emisor responsable”, “Clasificación de acceso”, “Formato”, “Sistema de donde se creo”, y “Estado”.</text:p>
          </table:table-cell>
          <table:table-cell table:style-name="ce6" office:value-type="string" calcext:value-type="string">
            <text:p>ok</text:p>
          </table:table-cell>
          <table:table-cell table:style-name="ce52" office:value-type="string" calcext:value-type="string" table:number-columns-spanned="1" table:number-rows-spanned="3">
            <text:p>1. Se ingresa al sistema con el usuario admin, y se valida que se tiene el permiso para radicación estándar</text:p>
            <text:p>2. Se ingresar al modulo radicación – radicación estándar</text:p>
            <text:p>3. Se selecciona el radicado 2024-00998-000033-2</text:p>
            <text:p>4. Se valida que en el documento seleccionado se muestra el detalle asociado al documento</text:p>
          </table:table-cell>
          <table:table-cell table:style-name="ce64"/>
          <table:table-cell table:style-name="ce4"/>
          <table:table-cell table:number-columns-repeated="16378"/>
        </table:table-row>
        <table:table-row table:style-name="ro59">
          <table:table-cell table:style-name="ce22" office:value-type="string" calcext:value-type="string">
            <text:p>CP30-08</text:p>
          </table:table-cell>
          <table:table-cell table:style-name="ce64" office:value-type="string" calcext:value-type="string">
            <text:p>Validar que al seleccionar el archivo que se cargo en el proceso anterior y se de clic en el botón dinámico de color naranja en la parte inferior, se muestre las opciones “Descargar” y/o “Ver”, “Borrar document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7">
          <table:table-cell table:style-name="ce22" office:value-type="string" calcext:value-type="string">
            <text:p>CP30-09</text:p>
          </table:table-cell>
          <table:table-cell table:style-name="ce64" office:value-type="string" calcext:value-type="string">
            <text:p>Validar que al seleccionar un archivo y dar clic en la opción de “Eliminar documento” el sistema muestre un mensaje de confirmación, una vez dado clic en dicho botón, el sistema debe eliminar el archivo, y dejar registro en la trazabilidad del radicado y auditoria del sistema la observación de este proces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31 – Transacción – Cargar anexos</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31-01</text:p>
          </table:table-cell>
          <table:table-cell table:style-name="ce64" office:value-type="string" calcext:value-type="string">
            <text:p>Validar que cuando se ingrese al modulo se muestre una tabla con el listado de todos los radicados que se han asignado al usuario o creados por el usuario, este listado muestra diferentes columnas asociadas al radic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1-02</text:p>
          </table:table-cell>
          <table:table-cell table:style-name="ce64" office:value-type="string" calcext:value-type="string">
            <text:p>Validar que al seleccionar un radicado y se de clic en el botón dinámico de color naranja en la parte inferior y se muestre la opción de “Cargar anexos” y al dar clic a dicha opción, se debe desplegar una ventana donde se muestre un campo de descripción, campo para ingresar el archivo y si este es publico o confidencial</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1-03</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3" office:value-type="string" calcext:value-type="string">
            <text:p>CP31-04</text:p>
          </table:table-cell>
          <table:table-cell table:style-name="ce64" office:value-type="string" calcext:value-type="string">
            <text:p>Validar que cuando el proceso anterior se haga de forma correcta y el formulario muestre que el documento se cargo al 100%, se muestra un mensaje de confirmación indicando que se cargo correctamente</text:p>
          </table:table-cell>
          <table:table-cell table:style-name="ce6" office:value-type="string" calcext:value-type="string">
            <text:p>ok</text:p>
          </table:table-cell>
          <table:table-cell table:style-name="ce16"/>
          <table:table-cell table:style-name="ce64" office:value-type="string" calcext:value-type="string">
            <text:p>No se puede completar porque el cargue de archivos solo esta disponible en Chrome según el Log de selenium</text:p>
          </table:table-cell>
          <table:table-cell table:style-name="ce4"/>
          <table:table-cell table:number-columns-repeated="16378"/>
        </table:table-row>
        <table:table-row table:style-name="ro7">
          <table:table-cell table:style-name="ce23" office:value-type="string" calcext:value-type="string">
            <text:p>CP31-05</text:p>
          </table:table-cell>
          <table:table-cell table:style-name="ce64" office:value-type="string" calcext:value-type="string">
            <text:p>Validar que cuando se de clic en el botón “Nuevo Archivo” esta opción despliegue una nueva sección donde se solicite la información de campo de descripción, campo para ingresar el archivo y si este es publico o confidencial; este proceso se debe poder replicar varias veces.</text:p>
          </table:table-cell>
          <table:table-cell table:style-name="ce6" office:value-type="string" calcext:value-type="string">
            <text:p>ok</text:p>
          </table:table-cell>
          <table:table-cell table:style-name="ce16"/>
          <table:table-cell table:style-name="ce64" office:value-type="string" calcext:value-type="string">
            <text:p>No se puede completar porque el cargue de archivos solo esta disponible en Chrome según el Log de selenium</text:p>
          </table:table-cell>
          <table:table-cell table:style-name="ce4"/>
          <table:table-cell table:number-columns-repeated="16378"/>
        </table:table-row>
        <table:table-row table:style-name="ro7">
          <table:table-cell table:style-name="ce6" office:value-type="string" calcext:value-type="string">
            <text:p>CP31-06</text:p>
          </table:table-cell>
          <table:table-cell table:style-name="ce12" office:value-type="string" calcext:value-type="string">
            <text:p>Validar que se permita cargar archivos con extensiones xlsx, pdf, mp3, mp4, png, jpg, git, zip, rar y en caso de cargar una archivo de alguna otra extrensión se muestre mensaje de error</text:p>
          </table:table-cell>
          <table:table-cell table:style-name="ce11" office:value-type="string" calcext:value-type="string">
            <text:p>ok</text:p>
          </table:table-cell>
          <table:table-cell table:style-name="ce28"/>
          <table:table-cell table:style-name="ce12"/>
          <table:table-cell table:style-name="ce29"/>
          <table:table-cell table:style-name="ce30" table:number-columns-repeated="21"/>
          <table:table-cell table:number-columns-repeated="16357"/>
        </table:table-row>
        <table:table-row table:style-name="ro7">
          <table:table-cell table:style-name="ce22" office:value-type="string" calcext:value-type="string">
            <text:p>CP31-07</text:p>
          </table:table-cell>
          <table:table-cell table:style-name="ce64" office:value-type="string" calcext:value-type="string">
            <text:p>Validar que en el botón dinámico de color naranja en la parte inferior y se muestre las diferentes transacciones que se pueden realizar con el radicado, una de estas deber una opción que se llama “Visualizar Radic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1-08</text:p>
          </table:table-cell>
          <table:table-cell table:style-name="ce64" office:value-type="string" calcext:value-type="string">
            <text:p>Validar que en la sección que se llama “Trazabilidad del radicado” se muestre un registro asociado a “Adjuntar anexo al radicado” mostrando fecha y hora en la que se realizo, usuario y dependencia que hizo el proceso y adicional una observación</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1-09</text:p>
          </table:table-cell>
          <table:table-cell table:style-name="ce64" office:value-type="string" calcext:value-type="string">
            <text:p>Validar que en la sección “Documentos del radicado”, se muestre el archivo que se cargo, adicional de mostrar “Titulo del documento”, “Descripción”, “Tipo documental”, “Autor o emisor responsable”, “Clasificación de acceso”, “Formato”, “Sistema de donde se creo”, y “Est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1-10</text:p>
          </table:table-cell>
          <table:table-cell table:style-name="ce64" office:value-type="string" calcext:value-type="string">
            <text:p>Validar que al seleccionar el archivo que se cargo en el proceso anterior y se de clic en el botón dinámico de color naranja en la parte inferior, se muestre las opciones “Descargar” y/o “Ver” o “Eliminar document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1-11</text:p>
          </table:table-cell>
          <table:table-cell table:style-name="ce64" office:value-type="string" calcext:value-type="string">
            <text:p>Validar que al seleccionar un archivo y dar clic en la opción de “Eliminar documento” el sistema muestre un mensaje de confirmación, una vez dado clic en dicho botón, el sistema debe eliminar el archivo, y dejar registro en la trazabilidad del radicado y auditoria del sistema la observación de este proces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32 – Transacción – Imprimir Stiker</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32-01</text:p>
          </table:table-cell>
          <table:table-cell table:style-name="ce64" office:value-type="string" calcext:value-type="string">
            <text:p>Validar que cuando se ingrese al modulo se muestre una tabla con el listado de todos los radicados que se han asignado al usuario o creados por el usuario, este listado muestra diferentes columnas asociadas al radic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2" office:value-type="string" calcext:value-type="string">
            <text:p>CP32-02</text:p>
          </table:table-cell>
          <table:table-cell table:style-name="ce12" office:value-type="string" calcext:value-type="string">
            <text:p>Validar que al seleccionar un radicado y se de clic en el botón dinámico de color naranja en la parte inferior y se muestre la opción de “Imprimir Stiker” y al dar clic a dicha opción, se debe descargar una archivo .png con las variables que se hayan activado en el modulo de configuración “Variables Correspondencia”</text:p>
          </table:table-cell>
          <table:table-cell table:style-name="ce11" office:value-type="string" calcext:value-type="string">
            <text:p>ok</text:p>
          </table:table-cell>
          <table:table-cell table:style-name="ce28"/>
          <table:table-cell table:style-name="ce12" office:value-type="string" calcext:value-type="string">
            <text:p>El sistema no permite realizar el procesos aparece un error 500</text:p>
          </table:table-cell>
          <table:table-cell table:style-name="ce29"/>
          <table:table-cell table:style-name="ce30" table:number-columns-repeated="21"/>
          <table:table-cell table:number-columns-repeated="16357"/>
        </table:table-row>
        <table:table-row table:style-name="ro1">
          <table:table-cell table:style-name="ce49" office:value-type="string" calcext:value-type="string" table:number-columns-spanned="2" table:number-rows-spanned="1">
            <text:p>CP33 – Transacción – Reasignar</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33-01</text:p>
          </table:table-cell>
          <table:table-cell table:style-name="ce64" office:value-type="string" calcext:value-type="string">
            <text:p>Validar que cuando se ingrese al modulo se muestre una tabla con el listado de todos los radicados que se han asignado al usuario o creados por el usuario, este listado muestra diferentes columnas asociadas al radic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50">
          <table:table-cell table:style-name="ce22" office:value-type="string" calcext:value-type="string">
            <text:p>CP33-02</text:p>
          </table:table-cell>
          <table:table-cell table:style-name="ce64" office:value-type="string" calcext:value-type="string">
            <text:p>Validar que al seleccionar un radicado y se de clic en el botón dinámico de color naranja en la parte inferior, se muestre la opción de “Reasignar” y al dar clic a dicha opción, se debe desplegar una ventana donde se muestre una serie de campos asociados a la “Dependencia destino”, “Usuario destino”, “Observación” y campos adicionales asociados “dependencia a informar”</text:p>
          </table:table-cell>
          <table:table-cell table:style-name="ce6" office:value-type="string" calcext:value-type="string">
            <text:p>ok</text:p>
          </table:table-cell>
          <table:table-cell table:style-name="ce16"/>
          <table:table-cell table:style-name="ce64" office:value-type="string" calcext:value-type="string">
            <text:p>exisitia una falla en el codigo donde el foreach de los radicados seleccionados en el front se cerraba antes de que empezada el foreach de los usuarios a reasignar</text:p>
          </table:table-cell>
          <table:table-cell table:style-name="ce4"/>
          <table:table-cell table:number-columns-repeated="16378"/>
        </table:table-row>
        <table:table-row table:style-name="ro7">
          <table:table-cell table:style-name="ce22" office:value-type="string" calcext:value-type="string">
            <text:p>CP33-03</text:p>
          </table:table-cell>
          <table:table-cell table:style-name="ce64" office:value-type="string" calcext:value-type="string">
            <text:p>Validar que en el proceso anterior se valide que todos los campos que tienen * no se permitan pasar en blanco y si es asi, mostrar mensaje indicando que no pueden ser vacios y que adicional los pinte de roj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3-04</text:p>
          </table:table-cell>
          <table:table-cell table:style-name="ce64" office:value-type="string" calcext:value-type="string">
            <text:p>Validar que en el listado de “Dependencia destino” se puede seleccionar mas de una opción y con base a la dependencia seleccionada se muestre el listado de usuarios asociados a la dependencia, en este listado tambien se debe poder seleccionar mas de una opción.</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3-05</text:p>
          </table:table-cell>
          <table:table-cell table:style-name="ce64" office:value-type="string" calcext:value-type="string">
            <text:p>Validar que cuando se diligencie todo el formulario y se de clic en la opción “Guardar” se muestre una alerta en la parte superior de confirmación indicando el radicado que se </text:p>
          </table:table-cell>
          <table:table-cell table:style-name="ce6"/>
          <table:table-cell table:style-name="ce16"/>
          <table:table-cell table:style-name="ce64" office:value-type="string" calcext:value-type="string">
            <text:p>Si se realiza el proceso, pero aparece un error 500 al reasignar el radicado</text:p>
          </table:table-cell>
          <table:table-cell table:style-name="ce4"/>
          <table:table-cell table:number-columns-repeated="16378"/>
        </table:table-row>
        <table:table-row table:style-name="ro7">
          <table:table-cell table:style-name="ce22" office:value-type="string" calcext:value-type="string">
            <text:p>CP33-06</text:p>
          </table:table-cell>
          <table:table-cell table:style-name="ce64" office:value-type="string" calcext:value-type="string">
            <text:p>Validar que en el botón dinámico de color naranja en la parte inferior y se muestre las diferentes transacciones que se pueden realizar con el radicado, una de estas deber una opción que se llama “Visualizar Radic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3-07</text:p>
          </table:table-cell>
          <table:table-cell table:style-name="ce64" office:value-type="string" calcext:value-type="string">
            <text:p>Validar que en la sección que se llama “Trazabilidad del radicado” se muestre un registro asociado a “Reasignar Radicado” mostrando fecha y hora en la que se realizo, usuario y dependencia que hizo el proceso y adicional una observación</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8" office:value-type="string" calcext:value-type="string">
            <text:p>CP33-08</text:p>
          </table:table-cell>
          <table:table-cell table:style-name="ce64" office:value-type="string" calcext:value-type="string">
            <text:p>Validar que se envie una notificación de correo electrónico al usuario tramitador del radicado, esta notificación debe mostrar el radicado que se asigno y el usuario desde el que se reasigno, adicional de mostrar un mensaje indicado que se asigno el radicado para que se realice el tramite correspondiente</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34 – Transacción – Asociar plantilla</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34-01</text:p>
          </table:table-cell>
          <table:table-cell table:style-name="ce64" office:value-type="string" calcext:value-type="string">
            <text:p>Validar que cuando se ingrese al modulo se muestre una tabla con el listado de todos los radicados que se han asignado al usuario o creados por el usuario, este listado muestra diferentes columnas asociadas al radic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4-02</text:p>
          </table:table-cell>
          <table:table-cell table:style-name="ce64" office:value-type="string" calcext:value-type="string">
            <text:p>Validar que al seleccionar un radicado y se de clic en el botón dinámico de color naranja en la parte inferior, se muestre la opción de “Asociar plantilla” y al dar clic a dicha opción, se debe desplegar una ventana donde se pueda ingresar el “Nombre archivo” el cual esta asociado a la respuesta que se esta dando, adicional se muestre un campo para seleccionar un archiv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4-03</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3" office:value-type="string" calcext:value-type="string">
            <text:p>CP34-04</text:p>
          </table:table-cell>
          <table:table-cell table:style-name="ce64" office:value-type="string" calcext:value-type="string">
            <text:p>Validar que cuando se diligencie todo el formulario y se de clic en el botón “Cargar Archivo” se muestre un mensaje de confirmación indicando que “Se cargó la plantilla PLANTILLA OFICIO SALIDA, a el radicado: XXXXX” y una vez aceptado el proceso se debio haber cambiado el estado del radicado “Plantilla asociada – Activo”</text:p>
          </table:table-cell>
          <table:table-cell table:style-name="ce6" office:value-type="string" calcext:value-type="string">
            <text:p>ok</text:p>
          </table:table-cell>
          <table:table-cell table:style-name="ce16"/>
          <table:table-cell table:style-name="ce64" office:value-type="string" calcext:value-type="string">
            <text:p>No se puede completar porque el cargue de archivos solo esta disponible en Chrome según el Log de selenium</text:p>
          </table:table-cell>
          <table:table-cell table:style-name="ce4"/>
          <table:table-cell table:number-columns-repeated="16378"/>
        </table:table-row>
        <table:table-row table:style-name="ro7">
          <table:table-cell table:style-name="ce22" office:value-type="string" calcext:value-type="string">
            <text:p>CP34-05</text:p>
          </table:table-cell>
          <table:table-cell table:style-name="ce64" office:value-type="string" calcext:value-type="string">
            <text:p>Validar que en el botón dinámico de color naranja en la parte inferior y se muestre las diferentes transacciones que se pueden realizar con el radicado, una de estas deber una opción que se llama “Visualizar Radic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4-06</text:p>
          </table:table-cell>
          <table:table-cell table:style-name="ce64" office:value-type="string" calcext:value-type="string">
            <text:p>Validar que en la sección que se llama “Trazabilidad del radicado” se muestre un registro asociado a “Asociar plantilla” mostrando fecha y hora en la que se realizo, usuario y dependencia que hizo el proceso y adicional una observación</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4-07</text:p>
          </table:table-cell>
          <table:table-cell table:style-name="ce64" office:value-type="string" calcext:value-type="string">
            <text:p>Validar que en la sección que se llama “Documentos principales” se muestre el documento que se cargo, y al seleccionarlo y se debe clic en el botón dinámico de color naranja en la parte inferior, se debe mostrar las opciones de “Versionamiento” y “Asociar Plantilla”</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35 – Transacción – Asociar plantilla – Versionamiento</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60">
          <table:table-cell table:style-name="ce22" office:value-type="string" calcext:value-type="string">
            <text:p>CP35-01</text:p>
          </table:table-cell>
          <table:table-cell table:style-name="ce64" office:value-type="string" calcext:value-type="string">
            <text:p>Validar que cuando se de clic en la opción de “Versionamiento” se despliegue una nueva ventana donde se muestre una tabla el listado de todos los documentos principales al radicado, esta tabla tiene las siguientes columnas “Autor o emisor responsable”, ”Titulo del documento”, <text:s/>”Formato”, ”Fecha carga”, ”Imagen principal”, ”Disponibilidad”, “página pública” y ”Est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5-02</text:p>
          </table:table-cell>
          <table:table-cell table:style-name="ce64" office:value-type="string" calcext:value-type="string">
            <text:p>Validar que en el “Listado de documentos principales” se muestren las diferentes versiones del documento cargado el cual se debe mostrar en estado Carg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5-03</text:p>
          </table:table-cell>
          <table:table-cell table:style-name="ce64" office:value-type="string" calcext:value-type="string">
            <text:p>Validar que cuando se seleccione alguno de los registros mostrados y se de clic en el botón dinámico de color naranja en la parte inferior se muestre las opciones “Combinar correspondencia” y “Descargar plantilla”</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5-04</text:p>
          </table:table-cell>
          <table:table-cell table:style-name="ce12" office:value-type="string" calcext:value-type="string">
            <text:p>Validar que se despliegue una ventana nueva, donde se muestre la información del destinatario al que se va a responder, en este caso debe mostrarse una opción que se llama “¿El destinatario es diferente al remitente?” si este se chequea se deben habilitar los campos para ingresar la información de a quien se va a responder</text:p>
          </table:table-cell>
          <table:table-cell table:style-name="ce11" office:value-type="string" calcext:value-type="string">
            <text:p>ok</text:p>
          </table:table-cell>
          <table:table-cell table:style-name="ce28"/>
          <table:table-cell table:style-name="ce12"/>
          <table:table-cell table:style-name="ce29"/>
          <table:table-cell table:style-name="ce30" table:number-columns-repeated="21"/>
          <table:table-cell table:number-columns-repeated="16357"/>
        </table:table-row>
        <table:table-row table:style-name="ro7">
          <table:table-cell table:style-name="ce22" office:value-type="string" calcext:value-type="string">
            <text:p>CP35-05</text:p>
          </table:table-cell>
          <table:table-cell table:style-name="ce12" office:value-type="string" calcext:value-type="string">
            <text:p>Validar que cuando se cheque la opción de “¿El destinatario es diferente al remitente?” y se de clic en el botón de procesar, al realizar este proceso se debe hacer la combinación de correspondencia con esa información.</text:p>
          </table:table-cell>
          <table:table-cell table:style-name="ce11" office:value-type="string" calcext:value-type="string">
            <text:p>ok</text:p>
          </table:table-cell>
          <table:table-cell table:style-name="ce28"/>
          <table:table-cell table:style-name="ce12"/>
          <table:table-cell table:style-name="ce29"/>
          <table:table-cell table:style-name="ce30" table:number-columns-repeated="21"/>
          <table:table-cell table:number-columns-repeated="16357"/>
        </table:table-row>
        <table:table-row table:style-name="ro7">
          <table:table-cell table:style-name="ce22" office:value-type="string" calcext:value-type="string">
            <text:p>CP35-06</text:p>
          </table:table-cell>
          <table:table-cell table:style-name="ce12" office:value-type="string" calcext:value-type="string">
            <text:p>Validar que en caso de no chequear la opción “¿El destinatario es diferente al remitente?” y se de clic en el botón de procesar, al realizar la combinación de correspondencia se haga con la información del mismo remitente.</text:p>
          </table:table-cell>
          <table:table-cell table:style-name="ce11" office:value-type="string" calcext:value-type="string">
            <text:p>ok</text:p>
          </table:table-cell>
          <table:table-cell table:style-name="ce28"/>
          <table:table-cell table:style-name="ce12"/>
          <table:table-cell table:style-name="ce29"/>
          <table:table-cell table:style-name="ce30" table:number-columns-repeated="21"/>
          <table:table-cell table:number-columns-repeated="16357"/>
        </table:table-row>
        <table:table-row table:style-name="ro7">
          <table:table-cell table:style-name="ce22" office:value-type="string" calcext:value-type="string">
            <text:p>CP35-07</text:p>
          </table:table-cell>
          <table:table-cell table:style-name="ce12" office:value-type="string" calcext:value-type="string">
            <text:p>Validar que cuando se de clic a la opción “Combinar Correspondencia” el sistema muestre un mensaje de confirmación indicando “Se realizó la combinación de correspondencia al documento PLANTILLA OFICIO SALIDA asociado a el radicado XXXXXX” y en la columna estado se muestre en “Combinación de correspondencia”</text:p>
          </table:table-cell>
          <table:table-cell table:style-name="ce11" office:value-type="string" calcext:value-type="string">
            <text:p>ok</text:p>
          </table:table-cell>
          <table:table-cell table:style-name="ce28"/>
          <table:table-cell table:style-name="ce12"/>
          <table:table-cell table:style-name="ce29"/>
          <table:table-cell table:style-name="ce30" table:number-columns-repeated="21"/>
          <table:table-cell table:number-columns-repeated="16357"/>
        </table:table-row>
        <table:table-row table:style-name="ro7">
          <table:table-cell table:style-name="ce22" office:value-type="string" calcext:value-type="string">
            <text:p>CP35-08</text:p>
          </table:table-cell>
          <table:table-cell table:style-name="ce64" office:value-type="string" calcext:value-type="string">
            <text:p>Validar que cuando se seleccione alguno de los registros mostrados y se de clic en el botón dinámico de color naranja en la parte inferior se muestre las opciones “Firmar documento” y “Descargar plantilla”</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5-09</text:p>
          </table:table-cell>
          <table:table-cell table:style-name="ce64" office:value-type="string" calcext:value-type="string">
            <text:p>Validar que cuando se de clic a la opción “Firmar documento” el sistema muestre las diferentes opciones de firmas “Firma QR”, “Firma Mecanica” y “Firma Fisica”, adicional de mostrar un campo para ingresar la contraseña del usuario que esta haciendo el proceso de firm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5-10</text:p>
          </table:table-cell>
          <table:table-cell table:style-name="ce64" office:value-type="string" calcext:value-type="string">
            <text:p>Validar que al seleccionar alguna de esas opciones de firma, luego de ingresar la contraseña y se de dar clic en el botón “Confirmar” se debe mostrar el documento convertido en pdf y el estado del documento se encuentre en “Firm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5-11</text:p>
          </table:table-cell>
          <table:table-cell table:style-name="ce64" office:value-type="string" calcext:value-type="string">
            <text:p>Validar que cuando se seleccione alguno de los registros mostrados y se de clic en el botón dinámico de color naranja en la parte inferior, se muestre las opciones “Ver” y “Descargar plantilla”</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5-12</text:p>
          </table:table-cell>
          <table:table-cell table:style-name="ce64" office:value-type="string" calcext:value-type="string">
            <text:p>Validar que cuando se haga el proceso anterior y se de clic en la opción de “Ver” se despliegue una nueva ventana donde se muestre <text:s/>la “Vista del documento”, esto debe pasar solo si la extención del documento es .pdf</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5-13</text:p>
          </table:table-cell>
          <table:table-cell table:style-name="ce64" office:value-type="string" calcext:value-type="string">
            <text:p>Validar que cuando se haga el proceso anterior y se de clic en la opción de “Descargar plantilla” el sistema descargue el archiv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28">
          <table:table-cell table:style-name="ce22" office:value-type="string" calcext:value-type="string">
            <text:p>CP35-14</text:p>
          </table:table-cell>
          <table:table-cell table:style-name="ce64" office:value-type="string" calcext:value-type="string">
            <text:p>Validar que al dar clic en la parte externa de la ventana, se retorne el formulario de “Visualizar Radicado” y en la sección que se llama “Trazabiliad del radicado”, se muestre una opción que haga referencia a “Combinar correspondencia” mostrando fecha y hora en la que se realizo, adicional el usuario y la dependencia que hizo el proces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52">
          <table:table-cell table:style-name="ce22" office:value-type="string" calcext:value-type="string">
            <text:p>CP35-15</text:p>
          </table:table-cell>
          <table:table-cell table:style-name="ce64" office:value-type="string" calcext:value-type="string">
            <text:p>Validar que al dar clic en la parte externa de la ventana, se retorne el formulario de “Visualizar Radicado” y en la sección que se llama “Trazabiliad del radicado”, se muestre una opción que haga referencia a “Firmar documento” mostrando fecha y hora en la que se realizo, adicional el usuario y la dependencia que hizo el proces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36 – Transacción – Solicitud VoBo</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36-01</text:p>
          </table:table-cell>
          <table:table-cell table:style-name="ce64" office:value-type="string" calcext:value-type="string">
            <text:p>Validar que cuando se ingrese al modulo se muestre una tabla con el listado de todos los radicados que se han asignado al usuario o creados por el usuario, este listado muestra diferentes columnas asociadas al radic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6-02</text:p>
          </table:table-cell>
          <table:table-cell table:style-name="ce12" office:value-type="string" calcext:value-type="string">
            <text:p>Validar que al seleccionar un radicado y se de clic en el botón dinámico de color naranja en la parte inferior, se muestre la opción de “Solicitud Vo.Bo” y al dar clic a dicha opción, se debe desplegar una ventana donde se pueda seleccionar una o varias “dependencias” a las que se les puede asignar el radicado para dar visto bueno adicional de un campo de “Observación”</text:p>
          </table:table-cell>
          <table:table-cell table:style-name="ce11" office:value-type="string" calcext:value-type="string">
            <text:p>ok</text:p>
          </table:table-cell>
          <table:table-cell table:style-name="ce28"/>
          <table:table-cell table:style-name="ce12"/>
          <table:table-cell table:style-name="ce29"/>
          <table:table-cell table:style-name="ce30" table:number-columns-repeated="21"/>
          <table:table-cell table:number-columns-repeated="16357"/>
        </table:table-row>
        <table:table-row table:style-name="ro7">
          <table:table-cell table:style-name="ce22" office:value-type="string" calcext:value-type="string">
            <text:p>CP36-03</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6-04</text:p>
          </table:table-cell>
          <table:table-cell table:style-name="ce64" office:value-type="string" calcext:value-type="string">
            <text:p>Validar que cuando se de clic en la opción “Solicitud VoBo” si para la dependencia no hay usuarios jefe el sistema muestre un mensaje “Noy hay usuarios jefes para recibir solicitudes VOB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3" office:value-type="string" calcext:value-type="string">
            <text:p>CP36-05</text:p>
          </table:table-cell>
          <table:table-cell table:style-name="ce64" office:value-type="string" calcext:value-type="string">
            <text:p>Validar que cuando se diligencie todo el formulario y se de clic en la opción “Guardar” se muestre una alerta en la parte superior de confirmación indicando el radicado que se </text:p>
          </table:table-cell>
          <table:table-cell table:style-name="ce6"/>
          <table:table-cell table:style-name="ce16"/>
          <table:table-cell table:style-name="ce64" office:value-type="string" calcext:value-type="string">
            <text:p>El sistema no permite realizar el procesos aparece un error 500</text:p>
          </table:table-cell>
          <table:table-cell table:style-name="ce4"/>
          <table:table-cell table:number-columns-repeated="16378"/>
        </table:table-row>
        <table:table-row table:style-name="ro7">
          <table:table-cell table:style-name="ce62" office:value-type="string" calcext:value-type="string">
            <text:p>CP36-06</text:p>
          </table:table-cell>
          <table:table-cell table:style-name="ce64" office:value-type="string" calcext:value-type="string">
            <text:p>Validar que en el botón dinámico de color naranja en la parte inferior y se muestre las diferentes transacciones que se pueden realizar con el radicado, una de estas deber una opción que se llama “Visualizar Radicado”</text:p>
          </table:table-cell>
          <table:table-cell table:style-name="ce6"/>
          <table:table-cell table:style-name="ce16"/>
          <table:table-cell table:style-name="ce64" office:value-type="string" calcext:value-type="string">
            <text:p>No se puede realizar el proceso debido al fallo de la prueba anterior</text:p>
          </table:table-cell>
          <table:table-cell table:style-name="ce4"/>
          <table:table-cell table:number-columns-repeated="16378"/>
        </table:table-row>
        <table:table-row table:style-name="ro7">
          <table:table-cell table:style-name="ce62" office:value-type="string" calcext:value-type="string">
            <text:p>CP36-07</text:p>
          </table:table-cell>
          <table:table-cell table:style-name="ce64" office:value-type="string" calcext:value-type="string">
            <text:p>Validar que en la sección que se llama “Trazabilidad del radicado” se muestre un registro asociado a “Solicitud de visto bueno” mostrando fecha y hora en la que se realizo, usuario y dependencia que hizo el proceso y adicional una observación</text:p>
          </table:table-cell>
          <table:table-cell table:style-name="ce6"/>
          <table:table-cell table:style-name="ce16"/>
          <table:table-cell table:style-name="ce64" office:value-type="string" calcext:value-type="string">
            <text:p>No se puede realizar el proceso debido al fallo de la prueba anterior</text:p>
          </table:table-cell>
          <table:table-cell table:style-name="ce4"/>
          <table:table-cell table:number-columns-repeated="16378"/>
        </table:table-row>
        <table:table-row table:style-name="ro7">
          <table:table-cell table:style-name="ce62" office:value-type="string" calcext:value-type="string">
            <text:p>CP36-08</text:p>
          </table:table-cell>
          <table:table-cell table:style-name="ce64" office:value-type="string" calcext:value-type="string">
            <text:p>Validar que el radicado que se haya asignado al usuario jefe de la dependencia</text:p>
          </table:table-cell>
          <table:table-cell table:style-name="ce6"/>
          <table:table-cell table:style-name="ce16"/>
          <table:table-cell table:style-name="ce64" office:value-type="string" calcext:value-type="string">
            <text:p>No se puede realizar el proceso debido al fallo de la prueba anterior</text:p>
          </table:table-cell>
          <table:table-cell table:style-name="ce4"/>
          <table:table-cell table:number-columns-repeated="16378"/>
        </table:table-row>
        <table:table-row table:style-name="ro1">
          <table:table-cell table:style-name="ce49" office:value-type="string" calcext:value-type="string" table:number-columns-spanned="2" table:number-rows-spanned="1">
            <text:p>CP37 – Transacción – VoBo</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62" office:value-type="string" calcext:value-type="string">
            <text:p>CP37-01</text:p>
          </table:table-cell>
          <table:table-cell table:style-name="ce64" office:value-type="string" calcext:value-type="string">
            <text:p>Validar que cuando se ingrese al modulo se muestre una tabla con el listado de todos los radicados que se han asignado al usuario o creados por el usuario, este listado muestra diferentes columnas asociadas al radicado</text:p>
          </table:table-cell>
          <table:table-cell table:style-name="ce6"/>
          <table:table-cell table:style-name="ce16"/>
          <table:table-cell table:style-name="ce64"/>
          <table:table-cell table:style-name="ce4"/>
          <table:table-cell table:number-columns-repeated="16378"/>
        </table:table-row>
        <table:table-row table:style-name="ro7">
          <table:table-cell table:style-name="ce62" office:value-type="string" calcext:value-type="string">
            <text:p>CP37-02</text:p>
          </table:table-cell>
          <table:table-cell table:style-name="ce12" office:value-type="string" calcext:value-type="string">
            <text:p>Validar que al seleccionar un radicado y se de clic en el botón dinámico de color naranja en la parte inferior, se muestre la opción de “Vo.Bo” y al dar clic a dicha opción, el radicado debe quedar aprobado, y en la trazabilidad debe quedar registro del proceso</text:p>
          </table:table-cell>
          <table:table-cell table:style-name="ce11"/>
          <table:table-cell table:style-name="ce28"/>
          <table:table-cell table:style-name="ce12"/>
          <table:table-cell table:style-name="ce29"/>
          <table:table-cell table:style-name="ce30" table:number-columns-repeated="21"/>
          <table:table-cell table:number-columns-repeated="16357"/>
        </table:table-row>
        <table:table-row table:style-name="ro7">
          <table:table-cell table:style-name="ce62" office:value-type="string" calcext:value-type="string">
            <text:p>CP37-03</text:p>
          </table:table-cell>
          <table:table-cell table:style-name="ce64" office:value-type="string" calcext:value-type="string">
            <text:p>Validar que cuando se haga el proceso anterior se muestre una nueva ventana donde se muestren 2 opciones “DEVOLVER” y “REASIGNAR”, para que el usuario jefe pueda indicar cual la acción que desea realizar</text:p>
          </table:table-cell>
          <table:table-cell table:style-name="ce6"/>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38 – Transacción – Solicitud de anulación</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38-01</text:p>
          </table:table-cell>
          <table:table-cell table:style-name="ce64" office:value-type="string" calcext:value-type="string">
            <text:p>Validar que cuando se ingrese al modulo se muestre una tabla con el listado de todos los radicados que se han asignado al usuario o creados por el usuario, este listado muestra diferentes columnas asociadas al radic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8-02</text:p>
          </table:table-cell>
          <table:table-cell table:style-name="ce64" office:value-type="string" calcext:value-type="string">
            <text:p>Validar que al seleccionar un radicado y se de clic en el botón dinámico de color naranja en la parte inferior, se muestre la opción de “Solicitud de anulación” y al dar clic a dicha opción, se debe desplegar una ventana donde se pueda ingresar una “Observación”</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8-03</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3" office:value-type="string" calcext:value-type="string">
            <text:p>CP38-04</text:p>
          </table:table-cell>
          <table:table-cell table:style-name="ce64" office:value-type="string" calcext:value-type="string">
            <text:p>Validar que cuando se diligencie todo el formulario y se de clic en la opción “Guardar” se muestre una alerta en la parte superior de confirmación indicando el radicado que se </text:p>
          </table:table-cell>
          <table:table-cell table:style-name="ce6"/>
          <table:table-cell table:style-name="ce16"/>
          <table:table-cell table:style-name="ce64" office:value-type="string" calcext:value-type="string">
            <text:p>El sistema no permite realizar el procesos aparece un error 500</text:p>
          </table:table-cell>
          <table:table-cell table:style-name="ce4"/>
          <table:table-cell table:number-columns-repeated="16378"/>
        </table:table-row>
        <table:table-row table:style-name="ro7">
          <table:table-cell table:style-name="ce62" office:value-type="string" calcext:value-type="string">
            <text:p>CP38-05</text:p>
          </table:table-cell>
          <table:table-cell table:style-name="ce64" office:value-type="string" calcext:value-type="string">
            <text:p>Validar que en el botón dinámico de color naranja en la parte inferior y se muestre las diferentes transacciones que se pueden realizar con el radicado, una de estas deber una opción que se llama “Visualizar Radicado”</text:p>
          </table:table-cell>
          <table:table-cell table:style-name="ce6"/>
          <table:table-cell table:style-name="ce16"/>
          <table:table-cell table:style-name="ce64" office:value-type="string" calcext:value-type="string">
            <text:p>No se puede realizar el proceso debido al fallo de la prueba anterior</text:p>
          </table:table-cell>
          <table:table-cell table:style-name="ce4"/>
          <table:table-cell table:number-columns-repeated="16378"/>
        </table:table-row>
        <table:table-row table:style-name="ro7">
          <table:table-cell table:style-name="ce62" office:value-type="string" calcext:value-type="string">
            <text:p>CP38-06</text:p>
          </table:table-cell>
          <table:table-cell table:style-name="ce64" office:value-type="string" calcext:value-type="string">
            <text:p>Validar que en la sección que se llama “Trazabilidad del radicado” se muestre un registro asociado a “Solicitud de anulación” mostrando fecha y hora en la que se realizo, usuario y dependencia que hizo el proceso y adicional una observación</text:p>
          </table:table-cell>
          <table:table-cell table:style-name="ce6"/>
          <table:table-cell table:style-name="ce16"/>
          <table:table-cell table:style-name="ce64" office:value-type="string" calcext:value-type="string">
            <text:p>No se puede realizar el proceso debido al fallo de la prueba anterior</text:p>
          </table:table-cell>
          <table:table-cell table:style-name="ce4"/>
          <table:table-cell table:number-columns-repeated="16378"/>
        </table:table-row>
        <table:table-row table:style-name="ro1">
          <table:table-cell table:style-name="ce49" office:value-type="string" calcext:value-type="string" table:number-columns-spanned="2" table:number-rows-spanned="1">
            <text:p>CP39 – Transacción – Devolver radicado</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39-01</text:p>
          </table:table-cell>
          <table:table-cell table:style-name="ce64" office:value-type="string" calcext:value-type="string">
            <text:p>Validar que cuando se ingrese al modulo se muestre una tabla con el listado de todos los radicados que se han asignado al usuario o creados por el usuario, este listado muestra diferentes columnas asociadas al radic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9-02</text:p>
          </table:table-cell>
          <table:table-cell table:style-name="ce64" office:value-type="string" calcext:value-type="string">
            <text:p>Validar que al seleccionar un radicado y se de clic en el botón dinámico de color naranja en la parte inferior, se muestre la opción de “Devolver radicado” y al dar clic a dicha opción, se debe desplegar una ventana donde se pueda ingresar una “Observación”</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9-03</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9-04</text:p>
          </table:table-cell>
          <table:table-cell table:style-name="ce64" office:value-type="string" calcext:value-type="string">
            <text:p>Validar que cuando se haga clic en el botón de guardar se muestre un mensaje de confirmación indicando que se ingreso de forma correcta, mostrando un mensaje “Está acción se aplicará en todos los radicados seleccionados” una vez confirmado se mostrara una alerta indicando “Devolución exitosa. para el consecutivo temporal N° XXXXX. El usuario encargado fue notificado.”</text:p>
          </table:table-cell>
          <table:table-cell table:style-name="ce6" office:value-type="string" calcext:value-type="string">
            <text:p>ok</text:p>
          </table:table-cell>
          <table:table-cell table:style-name="ce16"/>
          <table:table-cell table:style-name="ce64" office:value-type="string" calcext:value-type="string">
            <text:p>Si se realizo el proceso, pero aparece un error 500 al devolver el radicado</text:p>
          </table:table-cell>
          <table:table-cell table:style-name="ce4"/>
          <table:table-cell table:number-columns-repeated="16378"/>
        </table:table-row>
        <table:table-row table:style-name="ro7">
          <table:table-cell table:style-name="ce22" office:value-type="string" calcext:value-type="string">
            <text:p>CP39-05</text:p>
          </table:table-cell>
          <table:table-cell table:style-name="ce64" office:value-type="string" calcext:value-type="string">
            <text:p>Validar que en el botón dinámico de color naranja en la parte inferior y se muestre las diferentes transacciones que se pueden realizar con el radicado, una de estas deber una opción que se llama “Visualizar Radic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39-06</text:p>
          </table:table-cell>
          <table:table-cell table:style-name="ce64" office:value-type="string" calcext:value-type="string">
            <text:p>Validar que en la sección que se llama “Trazabilidad del radicado” se muestre un registro asociado a “Devolver radicado” mostrando fecha y hora en la que se realizo, usuario y dependencia que hizo el proceso y adicional una observación</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40 – Transacción – Copiar a informado</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40-01</text:p>
          </table:table-cell>
          <table:table-cell table:style-name="ce64" office:value-type="string" calcext:value-type="string">
            <text:p>Validar que cuando se ingrese al modulo se muestre una tabla con el listado de todos los radicados que se han asignado al usuario o creados por el usuario, este listado muestra diferentes columnas asociadas al radic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40-02</text:p>
          </table:table-cell>
          <table:table-cell table:style-name="ce64" office:value-type="string" calcext:value-type="string">
            <text:p>Validar que al seleccionar un radicado y se de clic en el botón dinámico de color naranja en la parte inferior, se muestre la opción de “Copiar a informado” y al dar clic a dicha opción, se debe desplegar una ventana donde se pueda ingresar una “Observación”, seleccionar “Dependencias” y al seleccionar una dependencia cargar el listado de usuario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40-03</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40-04</text:p>
          </table:table-cell>
          <table:table-cell table:style-name="ce64" office:value-type="string" calcext:value-type="string">
            <text:p>Validar que en las listas desplegables de “Dependencia” y de “usuarios” se pueda seleccionar mas de una opción y cuando se diligencie todo el formulario se muestre un mensaje de confirmación “Copia enviada satisfactoriamente al correo electrónico de los usuarios XXXX, XXXXX”</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40-05</text:p>
          </table:table-cell>
          <table:table-cell table:style-name="ce64" office:value-type="string" calcext:value-type="string">
            <text:p>Validar que en el botón dinámico de color naranja en la parte inferior y se muestre las diferentes transacciones que se pueden realizar con el radicado, una de estas deber una opción que se llama “Visualizar Radic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40-06</text:p>
          </table:table-cell>
          <table:table-cell table:style-name="ce64" office:value-type="string" calcext:value-type="string">
            <text:p>Validar que en la sección que se llama “Trazabilidad del radicado” se muestre un registro asociado a “Copiar a informado” mostrando fecha y hora en la que se realizo, usuario y dependencia que hizo el proceso y adicional una observación</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41 – Transacción – Respuesta por Correo</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41-01</text:p>
          </table:table-cell>
          <table:table-cell table:style-name="ce64" office:value-type="string" calcext:value-type="string">
            <text:p>Validar que cuando se ingrese al modulo se muestre una tabla con el listado de todos los radicados que se han asignado al usuario o creados por el usuario, este listado muestra diferentes columnas asociadas al radic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41-02</text:p>
          </table:table-cell>
          <table:table-cell table:style-name="ce12" office:value-type="string" calcext:value-type="string">
            <text:p>Validar que al seleccionar un radicado en estado Firmado – Activo y se de clic en el botón dinámico de color naranja en la parte inferior, se muestre la opción de “Respuesta por Correo” y al dar clic a dicha opción, se debe desplegar una ventana donde se pueda ingresar varios correos, asunto y cuerpo del correo</text:p>
          </table:table-cell>
          <table:table-cell table:style-name="ce11" office:value-type="string" calcext:value-type="string">
            <text:p>ok</text:p>
          </table:table-cell>
          <table:table-cell table:style-name="ce28"/>
          <table:table-cell table:style-name="ce12"/>
          <table:table-cell table:style-name="ce29"/>
          <table:table-cell table:style-name="ce30" table:number-columns-repeated="21"/>
          <table:table-cell table:number-columns-repeated="16357"/>
        </table:table-row>
        <table:table-row table:style-name="ro7">
          <table:table-cell table:style-name="ce22" office:value-type="string" calcext:value-type="string">
            <text:p>CP41-03</text:p>
          </table:table-cell>
          <table:table-cell table:style-name="ce64" office:value-type="string" calcext:value-type="string">
            <text:p>Validar que cuando se ingrese un correo en el campo “Correos” y se de clic en el botón “AGREGAR CORREO” ese correo se muestre en la parte inferior; asi mismo se debe hacer por cada correo que se ingrese o al que se desee enviar la respuesta</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41-04</text:p>
          </table:table-cell>
          <table:table-cell table:style-name="ce64" office:value-type="string" calcext:value-type="string">
            <text:p>Validar que en la parte inferior se muestre una tabla con el listado de todos los documentos asociados al radicado, esta tabla tiene las columnas “Nombre”, “Descripción”, “Tipo de documento”, “Usuario”, adicional se debe poder seleccionar uno de los registros asociado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41-05</text:p>
          </table:table-cell>
          <table:table-cell table:style-name="ce64" office:value-type="string" calcext:value-type="string">
            <text:p>Validar que el sistema informe si el remitente destinatario tiene correo asociado para enviar la respuesta, en caso de no tenerlo se debe mostrar una alerta que diga “El remitente/destinatario no autorizó el envio de respuestas por correo electrónico, razón por la cual la respuesta emitida debe ser de forma física a la dirección de correspondencia”</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41-06</text:p>
          </table:table-cell>
          <table:table-cell table:style-name="ce64" office:value-type="string" calcext:value-type="string">
            <text:p>Validar que al dar clic en el botón “ENVIAR”, el sistema envie una notificación por correo electrónico dicha notificación un adjunto con la respuesta dada y en caso de haber seleccionado un registro este documento tambien debe ir como adjunto al correo</text:p>
          </table:table-cell>
          <table:table-cell table:style-name="ce6" office:value-type="string" calcext:value-type="string">
            <text:p>ok</text:p>
          </table:table-cell>
          <table:table-cell table:style-name="ce16"/>
          <table:table-cell table:style-name="ce64" office:value-type="string" calcext:value-type="string">
            <text:p>se realiza la modificacion del radicado para activar el permiso de envio de correos y ya realiza el cambio normalmente</text:p>
          </table:table-cell>
          <table:table-cell table:style-name="ce4"/>
          <table:table-cell table:number-columns-repeated="16378"/>
        </table:table-row>
        <table:table-row table:style-name="ro7">
          <table:table-cell table:style-name="ce22" office:value-type="string" calcext:value-type="string">
            <text:p>CP41-07</text:p>
          </table:table-cell>
          <table:table-cell table:style-name="ce64" office:value-type="string" calcext:value-type="string">
            <text:p>Validar que en la sección que se llama “Trazabilidad del radicado” se muestre un registro asociado a “Respuesta por correo” mostrando fecha y hora en la que se realizo, usuario y dependencia que hizo el proceso y adicional una observación</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42 – Transacción – Incluir en expediente</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42-01</text:p>
          </table:table-cell>
          <table:table-cell table:style-name="ce64" office:value-type="string" calcext:value-type="string">
            <text:p>Validar que cuando se ingrese al modulo se muestre una tabla con el listado de todos los radicados que se han asignado al usuario o creados por el usuario, este listado muestra diferentes columnas asociadas al radic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42-02</text:p>
          </table:table-cell>
          <table:table-cell table:style-name="ce64" office:value-type="string" calcext:value-type="string">
            <text:p>Validar que al seleccionar un radicado y se de clic en el botón dinámico de color naranja en la parte inferior, se muestre la opción de “Incluir en expediente” y al dar clic a dicha opción, se debe desplegar una ventana donde se pueda buscar un expediente por el “Número expediente” o por “Nombre expediente”</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42-03</text:p>
          </table:table-cell>
          <table:table-cell table:style-name="ce64" office:value-type="string" calcext:value-type="string">
            <text:p>Validar que si hay expedientes sociados con alguno de los criterios ingresados de busqueda en el “listado de expedientes” se muestren las opciones que corresponden al criterio ingresado y que de este listado se pueda seleccionar una opción</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42-04</text:p>
          </table:table-cell>
          <table:table-cell table:style-name="ce64" office:value-type="string" calcext:value-type="string">
            <text:p>Validar que luego de realizar el proceso anterior se habilite el botón de “Confirmar” para que el sistema muestre un mensaje de confirmación “Se incluyeron los radicados: XXXXXXXX, al expediente: XXXXXXX”</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42-05</text:p>
          </table:table-cell>
          <table:table-cell table:style-name="ce64" office:value-type="string" calcext:value-type="string">
            <text:p>Validar que en el botón dinámico de color naranja en la parte inferior y se muestre las diferentes transacciones que se pueden realizar con el radicado, una de estas deber una opción que se llama “Visualizar Radic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42-06</text:p>
          </table:table-cell>
          <table:table-cell table:style-name="ce64" office:value-type="string" calcext:value-type="string">
            <text:p>Validar que en la sección que se llama “Trazabilidad del radicado” se muestre un registro asociado a “Incluir en expediente” mostrando fecha y hora en la que se realizo, usuario y dependencia que hizo el proceso y adicional una observación</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42-07</text:p>
          </table:table-cell>
          <table:table-cell table:style-name="ce64" office:value-type="string" calcext:value-type="string">
            <text:p>Validar que en la sección “Detalle del radicado” se agregue un enlace de acceso para ingresar al expediente “Expedientes:</text:p>
            <text:p>XXXXX - XXXXXX” y ver el contenido del mism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61">
          <table:table-cell table:style-name="ce49" office:value-type="string" calcext:value-type="string" table:number-columns-spanned="2" table:number-rows-spanned="1">
            <text:p>CP43 – Transacción – Respuesta Parcial</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43-01</text:p>
          </table:table-cell>
          <table:table-cell table:style-name="ce64" office:value-type="string" calcext:value-type="string">
            <text:p>Validar que cuando se ingrese al modulo se muestre una tabla con el listado de todos los radicados que se han asignado al usuario o creados por el usuario, este listado muestra diferentes columnas asociadas al radic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55">
          <table:table-cell table:style-name="ce22" office:value-type="string" calcext:value-type="string">
            <text:p>CP43-02</text:p>
          </table:table-cell>
          <table:table-cell table:style-name="ce64" office:value-type="string" calcext:value-type="string">
            <text:p>Validar que al seleccionar un radicado y se de clic en el botón dinámico de color naranja en la parte inferior, se muestre la opción de “Respuesta Parcial” y al dar clic a dicha opción, se debe desplegar una ventana donde se solicite ingresar el nombre de la respuesta que se va a dar, la plantilla con la respuesta que se va a dar y adicional solicitar unos días de termino y con base a esta poner una nueva fecha de vencimiento de termino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55">
          <table:table-cell table:style-name="ce22" office:value-type="string" calcext:value-type="string">
            <text:p>CP43-03</text:p>
          </table:table-cell>
          <table:table-cell table:style-name="ce64" office:value-type="string" calcext:value-type="string">
            <text:p>Validar que cuando una vez se haga el proceso anterior la plantilla que se cargo se debe mostrar en la sección de documentos principales, en el campo de seleccionar archivo solo se debe permitir cargar docx, odt, doc, al realizar este proceso se debe guardar en la trazbilidad del radicado la observación “Se realizo ampliación de terminos en el radicado, ampliando X dias y dando nueva fecha de vencimiento X”</text:p>
          </table:table-cell>
          <table:table-cell table:style-name="ce6" office:value-type="string" calcext:value-type="string">
            <text:p>ok</text:p>
          </table:table-cell>
          <table:table-cell table:style-name="ce16"/>
          <table:table-cell table:style-name="ce64" office:value-type="string" calcext:value-type="string">
            <text:p>estaba comentado el codigo que realizaba el cambio de estado a respuesta parcial</text:p>
          </table:table-cell>
          <table:table-cell table:style-name="ce4"/>
          <table:table-cell table:number-columns-repeated="16378"/>
        </table:table-row>
        <table:table-row table:style-name="ro7">
          <table:table-cell table:style-name="ce22" office:value-type="string" calcext:value-type="string">
            <text:p>CP43-04</text:p>
          </table:table-cell>
          <table:table-cell table:style-name="ce64" office:value-type="string" calcext:value-type="string">
            <text:p>Validar que cuando se seleccione un radicado que se encuentre en estado “Respuesta Parcial” se permita cargar una nueva plantilla y hacer todo el proceso nuevamente, generando un nuevo numero de radicado, y una vez se firme ese documento cambiar el estado del radicado a “Activo”</text:p>
          </table:table-cell>
          <table:table-cell table:style-name="ce6" office:value-type="string" calcext:value-type="string">
            <text:p>ok</text:p>
          </table:table-cell>
          <table:table-cell table:style-name="ce16"/>
          <table:table-cell table:style-name="ce64" office:value-type="string" calcext:value-type="string">
            <text:p>se muestra de forma correcta la trazabilidad para respuesta definitiva y el cambio de estado se realiza correctamente</text:p>
          </table:table-cell>
          <table:table-cell table:style-name="ce4"/>
          <table:table-cell table:number-columns-repeated="16378"/>
        </table:table-row>
        <table:table-row table:style-name="ro7">
          <table:table-cell table:style-name="ce6" office:value-type="string" calcext:value-type="string">
            <text:p>CP43-05</text:p>
          </table:table-cell>
          <table:table-cell table:style-name="ce64" office:value-type="string" calcext:value-type="string">
            <text:p>Validar que en el tablero de inicio se muestre mostrar una sección donde se listen los radicados que se encuentren en estado “Respuesta Parcial”, esto debe ser visible para usuarios de rol “usuarios jefes”, “usuarios funcionales” y “ventanilla de radicación”</text:p>
          </table:table-cell>
          <table:table-cell table:style-name="ce6" office:value-type="string" calcext:value-type="string">
            <text:p>ok</text:p>
          </table:table-cell>
          <table:table-cell table:style-name="ce16"/>
          <table:table-cell table:style-name="ce64" office:value-type="string" calcext:value-type="string">
            <text:p>Se crea la tabla respuesta parcial en el dashboard con relacion a algunos tipos de usuarios</text:p>
          </table:table-cell>
          <table:table-cell table:style-name="ce4"/>
          <table:table-cell table:number-columns-repeated="16378"/>
        </table:table-row>
        <table:table-row table:style-name="ro62">
          <table:table-cell table:style-name="ce49" office:value-type="string" calcext:value-type="string" table:number-columns-spanned="2" table:number-rows-spanned="1">
            <text:p>CP44 – Transacción – Traslado por Competencia</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44-01</text:p>
          </table:table-cell>
          <table:table-cell table:style-name="ce64" office:value-type="string" calcext:value-type="string">
            <text:p>Validar que cuando se ingrese al modulo se muestre una tabla con el listado de todos los radicados que se han asignado al usuario o creados por el usuario, este listado muestra diferentes columnas asociadas al radic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44-02</text:p>
          </table:table-cell>
          <table:table-cell table:style-name="ce64" office:value-type="string" calcext:value-type="string">
            <text:p>Validar que al seleccionar un radicado y se de clic en el botón dinámico de color naranja en la parte inferior, se muestre la opción de “Traslado por competencia” y al dar clic a dicha opción, se debe desplegar una ventana donde se solicite dependencia y una observación, donde se indique porque se traslada por competencia.</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44-03</text:p>
          </table:table-cell>
          <table:table-cell table:style-name="ce64" office:value-type="string" calcext:value-type="string">
            <text:p>Validar que cuando se haga el proceso anterior debe quedar registro en la trazabilidad del radicado y en el log del sistema el proceso que se esta realizando y el radicado debe quedar en estado finalizado y quedar guardado en el expediente de TRASLADADOS POR COMPETENCIA si el expediente no existe se debe crea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45 – Transacción – No requiere respuesta</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45-01</text:p>
          </table:table-cell>
          <table:table-cell table:style-name="ce64" office:value-type="string" calcext:value-type="string">
            <text:p>Validar que cuando se ingrese al modulo se muestre una tabla con el listado de todos los radicados que se han asignado al usuario o creados por el usuario, este listado muestra diferentes columnas asociadas al radic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45-02</text:p>
          </table:table-cell>
          <table:table-cell table:style-name="ce64" office:value-type="string" calcext:value-type="string">
            <text:p>Validar que al seleccionar un radicado y se de clic en el botón dinámico de color naranja en la parte inferior, se muestre la opción de “No requiere respuesta” y al dar clic a dicha opción, se muestre un mensaje de confirmación indicando que el radicado se marco como no requiere respuesta y el radicado debe desaparecer del listado de radicado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45-03</text:p>
          </table:table-cell>
          <table:table-cell table:style-name="ce64" office:value-type="string" calcext:value-type="string">
            <text:p>Validar que en el botón dinámico de color naranja en la parte inferior y se muestre las diferentes transacciones que se pueden realizar con el radicado, una de estas deber una opción que se llama “Visualizar Radic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45-04</text:p>
          </table:table-cell>
          <table:table-cell table:style-name="ce64" office:value-type="string" calcext:value-type="string">
            <text:p>Validar que en la sección que se llama “Trazabilidad del radicado” se muestre un registro asociado a “No requiere respuesta” mostrando fecha y hora en la que se realizo, usuario y dependencia que hizo el proceso y adicional una observación</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46 – Transacción – Desistimiento PQRS</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46-01</text:p>
          </table:table-cell>
          <table:table-cell table:style-name="ce64" office:value-type="string" calcext:value-type="string">
            <text:p>Validar que cuando se ingrese al modulo se muestre una tabla con el listado de todos los radicados que se han asignado al usuario o creados por el usuario, este listado muestra diferentes columnas asociadas al radic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46-02</text:p>
          </table:table-cell>
          <table:table-cell table:style-name="ce64" office:value-type="string" calcext:value-type="string">
            <text:p>Validar que al seleccionar un radicado de PQRS y se de clic en el botón dinámico de color naranja en la parte inferior, se muestre la opción de “Desistimiento PQRS” al dar clic en dicha opción se despliegue un formulario donde se solicite una observación del porque se esta desistien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46-03</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46-04</text:p>
          </table:table-cell>
          <table:table-cell table:style-name="ce64" office:value-type="string" calcext:value-type="string">
            <text:p>Validar que cuando se ingrese la observación del porque se va a desistir de una PQRS y se procese la información, se muestre mensaje de confirmación “Radicado PQRSD desisti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2" office:value-type="string" calcext:value-type="string">
            <text:p>CP46-05</text:p>
          </table:table-cell>
          <table:table-cell table:style-name="ce64" office:value-type="string" calcext:value-type="string">
            <text:p>Validar que en el botón dinámico de color naranja en la parte inferior y se muestre las diferentes transacciones que se pueden realizar con el radicado, una de estas deber una opción que se llama “Visualizar Radicado”</text:p>
          </table:table-cell>
          <table:table-cell table:style-name="ce6" office:value-type="string" calcext:value-type="string">
            <text:p>ok</text:p>
          </table:table-cell>
          <table:table-cell table:style-name="ce16"/>
          <table:table-cell table:style-name="ce64" office:value-type="string" calcext:value-type="string">
            <text:p>No se pudo realizar debido al anterior proceso el radicado desaparece de la bandeja de entrada</text:p>
          </table:table-cell>
          <table:table-cell table:style-name="ce4"/>
          <table:table-cell table:number-columns-repeated="16378"/>
        </table:table-row>
        <table:table-row table:style-name="ro7">
          <table:table-cell table:style-name="ce62" office:value-type="string" calcext:value-type="string">
            <text:p>CP46-06</text:p>
          </table:table-cell>
          <table:table-cell table:style-name="ce64" office:value-type="string" calcext:value-type="string">
            <text:p>Validar que en la sección que se llama “Trazabilidad del radicado” se muestre un registro asociado a “Desistimiento PQRS” mostrando fecha y hora en la que se realizo, usuario y dependencia que hizo el proceso y adicional una observación</text:p>
          </table:table-cell>
          <table:table-cell table:style-name="ce6" office:value-type="string" calcext:value-type="string">
            <text:p>ok</text:p>
          </table:table-cell>
          <table:table-cell table:style-name="ce16"/>
          <table:table-cell table:style-name="ce64" office:value-type="string" calcext:value-type="string">
            <text:p>No se pudo realizar debido al anterior proceso el radicado desaparece de la bandeja de entrada</text:p>
          </table:table-cell>
          <table:table-cell table:style-name="ce4"/>
          <table:table-cell table:number-columns-repeated="16378"/>
        </table:table-row>
        <table:table-row table:style-name="ro1">
          <table:table-cell table:style-name="ce49" office:value-type="string" calcext:value-type="string" table:number-columns-spanned="2" table:number-rows-spanned="1">
            <text:p>CP47 – Transacción – Descartar consecutivo</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47-01</text:p>
          </table:table-cell>
          <table:table-cell table:style-name="ce64" office:value-type="string" calcext:value-type="string">
            <text:p>Validar que cuando se ingrese al modulo se muestre una tabla con el listado de todos los radicados que se han asignado al usuario o creados por el usuario, este listado muestra diferentes columnas asociadas al radic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63">
          <table:table-cell table:style-name="ce22" office:value-type="string" calcext:value-type="string">
            <text:p>CP47-02</text:p>
          </table:table-cell>
          <table:table-cell table:style-name="ce64" office:value-type="string" calcext:value-type="string">
            <text:p>Validar que al seleccionar un radicado de salida y se de clic en el botón dinámico de color naranja en la parte inferior, se muestre la opción de “Descartar Consecutivo” y al dar clic a dicha opción, se debe desplegar una ventana donde permita ingresar una observacion del porque se requiere descarta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47-03</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47-04</text:p>
          </table:table-cell>
          <table:table-cell table:style-name="ce64" office:value-type="string" calcext:value-type="string">
            <text:p><text:span text:style-name="T2">Validar que cuando se diligencie la descripcion y se de clic en el botón “Gardar se muestre un mensaje de confirmación indicando que “Se descarto el consecutivo temporal”</text:span>, a el radicado: XXXXX”</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48 – Transaccion – Skina Scan</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6" office:value-type="string" calcext:value-type="string">
            <text:p>CP48-01</text:p>
          </table:table-cell>
          <table:table-cell table:style-name="ce64" office:value-type="string" calcext:value-type="string">
            <text:p>Validar que cuando se ingrese al modulo se muestre una tabla con el listado de todos los radicados que se han asignado al usuario o creados por el usuario, este listado muestra diferentes columnas asociadas al radic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49 – Transacción – Listo para enviar</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49-01</text:p>
          </table:table-cell>
          <table:table-cell table:style-name="ce64" office:value-type="string" calcext:value-type="string">
            <text:p>Validar que cuando se ingrese al modulo se muestre una tabla con el listado de todos los radicados que se han asignado al usuario o creados por el usuario, este listado muestra diferentes columnas asociadas al radicado </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49-02</text:p>
          </table:table-cell>
          <table:table-cell table:style-name="ce64" office:value-type="string" calcext:value-type="string">
            <text:p>Validar que al seleccionar un radicado en estado firmado y se de clic en el botón dinámico de color naranja en la parte inferior, se muestre la opción de “Listo para enviar” y al dar clic a dicha opción, se debe desplegar un mensaje de confirmacion “Registro actualizado correctamente, ahora se encuentra disponible en el módulo de distribución y enví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49-03</text:p>
          </table:table-cell>
          <table:table-cell table:style-name="ce64" office:value-type="string" calcext:value-type="string">
            <text:p>Validar que en el botón dinámico de color naranja en la parte inferior y se muestre las diferentes transacciones que se pueden realizar con el radicado, una de estas deber una opción que se llama “Visualizar Radic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49-04</text:p>
          </table:table-cell>
          <table:table-cell table:style-name="ce64" office:value-type="string" calcext:value-type="string">
            <text:p>Validar que en la sección que se llama “Trazabilidad del radicado” se muestre un registro asociado a “Listo para enviar” mostrando fecha y hora en la que se realizo, el usuario y dependencia que hizo el proceso y adicional una observación</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50 – Transacción – Descarga paquete documentos</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22" office:value-type="string" calcext:value-type="string">
            <text:p>CP50-01</text:p>
          </table:table-cell>
          <table:table-cell table:style-name="ce64" office:value-type="string" calcext:value-type="string">
            <text:p>Validar que cuando se ingrese al modulo se muestre una tabla con el listado de todos los radicados que se han asignado al usuario o creados por el usuario, este listado muestra diferentes columnas asociadas al radicado </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22" office:value-type="string" calcext:value-type="string">
            <text:p>CP50-02</text:p>
          </table:table-cell>
          <table:table-cell table:style-name="ce64" office:value-type="string" calcext:value-type="string">
            <text:p>Validar que al seleccionar un radicado y se de clic en el botón dinámico de color naranja en la parte inferior, se muestre la opción de “Descarga paquete documentos” y al dar clic a dicha opción, se debe desplegar una venta para confirmar la transacción “Si, descargar!” o cacelarla “No, cancela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2" office:value-type="string" calcext:value-type="string">
            <text:p>CP50-03</text:p>
          </table:table-cell>
          <table:table-cell table:style-name="ce64" office:value-type="string" calcext:value-type="string">
            <text:p>Validar que al dar clic en la opción “Si, descargar!” Se descarguen todos los documentos presentes en el radicado</text:p>
          </table:table-cell>
          <table:table-cell table:style-name="ce6" office:value-type="string" calcext:value-type="string">
            <text:p>ok</text:p>
          </table:table-cell>
          <table:table-cell table:style-name="ce16"/>
          <table:table-cell table:style-name="ce64" office:value-type="string" calcext:value-type="string">
            <text:p>El sistema no permite realizar el procesos aparece un error 500</text:p>
          </table:table-cell>
          <table:table-cell table:style-name="ce4"/>
          <table:table-cell table:number-columns-repeated="16378"/>
        </table:table-row>
        <table:table-row table:style-name="ro1">
          <table:table-cell table:style-name="ce49" office:value-type="string" calcext:value-type="string" table:number-columns-spanned="2" table:number-rows-spanned="1">
            <text:p>CP51 – Gestión correspondencia – Distribución y envío</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6" office:value-type="string" calcext:value-type="string">
            <text:p>CP51-01</text:p>
          </table:table-cell>
          <table:table-cell table:style-name="ce64" office:value-type="string" calcext:value-type="string">
            <text:p>Validar que cuando se ingrese al modulo se muestre una tabla con el listado de todos los radicados que se encuentran en estado de “Listo para Envia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1-02</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1-03</text:p>
          </table:table-cell>
          <table:table-cell table:style-name="ce64" office:value-type="string" calcext:value-type="string">
            <text:p>Validar que al selecionar un registro y este se encuentre en estado "Listo para enviar", y se de clic en el botón dinámico de color naranja en la parte inferior, se deben mostrar las opciones <text:s/>"Enviar Radicado" y "Visualizar Radi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54">
          <table:table-cell table:style-name="ce6" office:value-type="string" calcext:value-type="string">
            <text:p>CP51-04</text:p>
          </table:table-cell>
          <table:table-cell table:style-name="ce64" office:value-type="string" calcext:value-type="string">
            <text:p>Validar que al seleccionar un registro y se de clic en el botón dinámico ubicado en la parte inferior de color naranja, en la opción de "Enviar Radicado", y este proceso se despliegue una nueva ventana donde se solicite ingresar la regional, con base a la selección mostrar los proveedores, con base a la selección precargar los servicios disponibles y de forma adicional una observación del envio que se esta hacien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1-05</text:p>
          </table:table-cell>
          <table:table-cell table:style-name="ce64" office:value-type="string" calcext:value-type="string">
            <text:p>Validar que cuando se diligencie toda la información solicitada y se de clic en el botón "Enviar" se muestre un mensaje solicitando confirmación del proceso realizando, y una vez hecha la confirmación el sistema debe cambiar el estado del radicado a "Pendiente por entrega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1-06</text:p>
          </table:table-cell>
          <table:table-cell table:style-name="ce64" office:value-type="string" calcext:value-type="string">
            <text:p>Validar que al selecionar un registro y este se encuentre en estado "Pendiente por entregar", y se de clic en el botón dinámico de color naranja en la parte inferior, se deben mostrar las opciones <text:s/>"Plantilla Excel", "Planilla de correspondencia", "Devolución", "Entregado" y "Visualizar Radi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50">
          <table:table-cell table:style-name="ce6" office:value-type="string" calcext:value-type="string">
            <text:p>CP51-07</text:p>
          </table:table-cell>
          <table:table-cell table:style-name="ce64" office:value-type="string" calcext:value-type="string">
            <text:p>Validar que al seleccionar un radicado y este se encuentre en estado "Pendiente por entregar" y se de clic en el botón dinámico ubicado en la parte inferior de color naranja, y se de clic en la opción de "Plantilla Excel" se proceda a descargar un archivo .xlsx con el nombre plantilla_de_correspondencia.xlsx, validar que este archivo muestre las columnas N°, RADICADO, FECHA DE RADICACIÓN, DESTINATARIO / RESPONSABLE, DIRECCIÓN, CIUDAD DESTINO, FECHA DE RECIBIDO, NO. GUÍA</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50">
          <table:table-cell table:style-name="ce6" office:value-type="string" calcext:value-type="string">
            <text:p>CP51-08</text:p>
          </table:table-cell>
          <table:table-cell table:style-name="ce64" office:value-type="string" calcext:value-type="string">
            <text:p>Validar que al seleccionar un radicado y este se encuentre en estado "Pendiente por entregar" y se de clic en el botón dinámico ubicado en la parte inferior de color naranja, y se de clic en la opción de "Plantilla Excel" se proceda a descargar un archivo .xlsx con el nombre plantilla_de_correspondencia.xlsx, validar que este archivo muestre las columnas N°, RADICADO, FECHA DE RADICACIÓN, DESTINATARIO / RESPONSABLE, DIRECCIÓN, CIUDAD DESTINO, FECHA DE RECIBIDO, NO. GUÍA</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50">
          <table:table-cell table:style-name="ce6" office:value-type="string" calcext:value-type="string">
            <text:p>CP51-09</text:p>
          </table:table-cell>
          <table:table-cell table:style-name="ce64" office:value-type="string" calcext:value-type="string">
            <text:p>Validar que al seleccionar un radicado y este se encuentre en estado "Pendiente por entregar" y se de clic en el botón dinámico ubicado en la parte inferior de color naranja, y se de clic en la opción de "Planilla de correspondencia" se proceda a descargar un archivo .pdf con el nombre planilla_de_correspondencia_guia_xxxx.pdf, validar que este archivo muestre las columnas N°, RADICADO, FECHA DE RADICACIÓN, DESTINATARIO / RESPONSABLE, DIRECCIÓN, CIUDAD DESTINO, FECHA DE RECIBIDO, NO. GUÍA</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32">
          <table:table-cell table:style-name="ce6" office:value-type="string" calcext:value-type="string">
            <text:p>CP51-10</text:p>
          </table:table-cell>
          <table:table-cell table:style-name="ce64" office:value-type="string" calcext:value-type="string">
            <text:p>Validar que al seleccionar un registro y se de clic en el botón dinámico ubicado en la parte inferior de color naranja, en la opción de "Devolución" se despliegue una ventana donde se solicite seleccionar cual es el motivo de la devolución y la observación correspondiente asociada a la devolución que se esta hacien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32">
          <table:table-cell table:style-name="ce6" office:value-type="string" calcext:value-type="string">
            <text:p>CP51-11</text:p>
          </table:table-cell>
          <table:table-cell table:style-name="ce64" office:value-type="string" calcext:value-type="string">
            <text:p>Validar que en el proceso anterior el sistema despliegue una ventana de confirmación donde se muestre "Está acción se aplicará en todos los radicados seleccionados", y al dar clic en Confirmar, el sistema muestre un mensaje de confirmación del proceso que se hizo y dejar el estado de ese radicado en "Devuelt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32">
          <table:table-cell table:style-name="ce6" office:value-type="string" calcext:value-type="string">
            <text:p>CP51-12</text:p>
          </table:table-cell>
          <table:table-cell table:style-name="ce64" office:value-type="string" calcext:value-type="string">
            <text:p>Validar que al seleccionar un radicado y este se encuentre en estado "Pendiente por entregar" y se de clic en el botón dinámico ubicado en la parte inferior de color naranja, y se de clic en la opción "Entregado" el sistema mostrara un mensaje de confirmación indicando " Está acción se aplicará en todos los radicados seleccionados" y luego de confirmar carmbiar el estado del radicado a <text:s/>"Entreg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32">
          <table:table-cell table:style-name="ce6" office:value-type="string" calcext:value-type="string">
            <text:p>CP51-13</text:p>
          </table:table-cell>
          <table:table-cell table:style-name="ce64" office:value-type="string" calcext:value-type="string">
            <text:p>Validar que al seleccionar un radicado y se de clic en el botón dinámico ubicado en la parte inferior de color naranja, la opción de "Visualizar Radicado", el sistema despliegue un formulario con la información del radicado donde se podra observar una sección que se llama "Correspondencia del radic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32">
          <table:table-cell table:style-name="ce6" office:value-type="string" calcext:value-type="string">
            <text:p>CP51-14</text:p>
          </table:table-cell>
          <table:table-cell table:style-name="ce64" office:value-type="string" calcext:value-type="string">
            <text:p>Validar que cuando se de clic en el botón “FILTROS” se despliegue una ventana nueva donde se muestren los campos “Numero Radicado”, “Asunto”, “Tipo Radicado”, “Remitente/destinatario”, “Tipo documental”, “Tipo proveedor”, "Tipo de servicio", "Motivo devolución" y rangos de fechas, adicional de mostrar una lista desplegable indicando la cantidad de registros a mostra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1-15</text:p>
          </table:table-cell>
          <table:table-cell table:style-name="ce64"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1-16</text:p>
          </table:table-cell>
          <table:table-cell table:style-name="ce64" office:value-type="string" calcext:value-type="string">
            <text:p>Validar que cuando se de clic en alguno de los botones de “CSV”, “EXCEL”, “PDF” y “IMPRIMIR” el sistema descargue o genere el correspondiente archiv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52 – Gestión correspondencia – Reasignación masiva</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6" office:value-type="string" calcext:value-type="string">
            <text:p>CP52-01</text:p>
          </table:table-cell>
          <table:table-cell table:style-name="ce64" office:value-type="string" calcext:value-type="string">
            <text:p>Validar que cuando se ingrese al modulo se muestre una tabla con el listado de todos los radicados que se han asignado al usuario o creados por el usuario, este listado muestra diferentes columnas asociadas al radic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2-02</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2-03</text:p>
          </table:table-cell>
          <table:table-cell table:style-name="ce64" office:value-type="string" calcext:value-type="string">
            <text:p>Validar que cuando se seleccione alguno de estos registros, en el botón dinámico de color naranja en la parte inferior se muestren las opciones “Reasigna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2-04</text:p>
          </table:table-cell>
          <table:table-cell table:style-name="ce64" office:value-type="string" calcext:value-type="string">
            <text:p>Validar que cuando se de clic en la opción “Reasignar” se despliegue una nueva ventana donde se solicita el listado de “dependencia destino” y al seleccionar una o varias opciones se debe cargar el listado de “Usuario detino” el cual debe dejar seleccionar una o varias opcione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2-05</text:p>
          </table:table-cell>
          <table:table-cell table:style-name="ce64" office:value-type="string" calcext:value-type="string">
            <text:p>Validar que cuando se haga el proceso anterior, se muestre un listado de “dependencias” y al seleccionar una opción o varias opciones se debe llenar el listado de “usuarios” el cual debe permitir seleccionar una o varias opciones, adicional de ingresar una observación del porque reasigna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2-06</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2-07</text:p>
          </table:table-cell>
          <table:table-cell table:style-name="ce64" office:value-type="string" calcext:value-type="string">
            <text:p>Validar que cuando se haga clic en el botón de procesar se muestre un mensaje de confirmación indicando que se realizo el proceso de forma correcta. Ej: Radicado reasignado correctamente</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2-08</text:p>
          </table:table-cell>
          <table:table-cell table:style-name="ce64" office:value-type="string" calcext:value-type="string">
            <text:p>Validar que cuando se de clic en el botón “FILTROS” se despliegue una ventana nueva donde se muestren los campos “Dependencia del usuario tramitador”, “Usuario tramitador”, “Tipo documental”, “Número radicado” y “Rangos de fechas”, adicional de mostrar una lista desplegable indicando la cantidad de registros a mostra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2-09</text:p>
          </table:table-cell>
          <table:table-cell table:style-name="ce64"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2-10</text:p>
          </table:table-cell>
          <table:table-cell table:style-name="ce64" office:value-type="string" calcext:value-type="string">
            <text:p>Validar que cuando se de clic en alguno de los botones de “CSV”, “EXCEL”, “PDF” y “IMPRIMIR” el sistema descargue o genere el correspondiente archiv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53 – Gestión correspondencia – Anulación</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6" office:value-type="string" calcext:value-type="string">
            <text:p>CP53-01</text:p>
          </table:table-cell>
          <table:table-cell table:style-name="ce64" office:value-type="string" calcext:value-type="string">
            <text:p>Validar que cuando se ingrese al modulo se muestre una tabla con el listado de radicados que han sido solicitados ser anulados por los diferentes usuario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3-02</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28">
          <table:table-cell table:style-name="ce6" office:value-type="string" calcext:value-type="string">
            <text:p>CP53-03</text:p>
          </table:table-cell>
          <table:table-cell table:style-name="ce33" office:value-type="string" calcext:value-type="string">
            <text:p>Validar que cuando se de clic en el botón “FILTROS” se despliegue una ventana nueva donde se muestren los campos "tipo radicado", "Numero Radicado", "Estado del radicado", "Dependencia", "Usuario", "Observación" y rangos de fechas, adicional de mostrar una lista desplegable indicando la cantidad de registros a mostrar</text:p>
          </table:table-cell>
          <table:table-cell table:style-name="ce34" office:value-type="string" calcext:value-type="string">
            <text:p>ok</text:p>
          </table:table-cell>
          <table:table-cell table:style-name="ce35"/>
          <table:table-cell table:style-name="ce36"/>
          <table:table-cell table:style-name="ce10" table:number-columns-repeated="22"/>
          <table:table-cell table:number-columns-repeated="16357"/>
        </table:table-row>
        <table:table-row table:style-name="ro7">
          <table:table-cell table:style-name="ce6" office:value-type="string" calcext:value-type="string">
            <text:p>CP53-04</text:p>
          </table:table-cell>
          <table:table-cell table:style-name="ce37"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38" office:value-type="string" calcext:value-type="string">
            <text:p>ok</text:p>
          </table:table-cell>
          <table:table-cell table:style-name="ce39"/>
          <table:table-cell table:style-name="ce40"/>
          <table:table-cell table:style-name="ce10" table:number-columns-repeated="22"/>
          <table:table-cell table:number-columns-repeated="16357"/>
        </table:table-row>
        <table:table-row table:style-name="ro7">
          <table:table-cell table:style-name="ce6" office:value-type="string" calcext:value-type="string">
            <text:p>CP53-05</text:p>
          </table:table-cell>
          <table:table-cell table:style-name="ce37" office:value-type="string" calcext:value-type="string">
            <text:p>Validar que cuando se de clic en alguno de los botones de “CSV”, “EXCEL”, “PDF” y “IMPRIMIR” el sistema descargue o genere el correspondiente archivo</text:p>
          </table:table-cell>
          <table:table-cell table:style-name="ce38" office:value-type="string" calcext:value-type="string">
            <text:p>ok</text:p>
          </table:table-cell>
          <table:table-cell table:style-name="ce39"/>
          <table:table-cell table:style-name="ce40"/>
          <table:table-cell table:style-name="ce10" table:number-columns-repeated="22"/>
          <table:table-cell table:number-columns-repeated="16357"/>
        </table:table-row>
        <table:table-row table:style-name="ro7">
          <table:table-cell table:style-name="ce6" office:value-type="string" calcext:value-type="string">
            <text:p>CP53-06</text:p>
          </table:table-cell>
          <table:table-cell table:style-name="ce64" office:value-type="string" calcext:value-type="string">
            <text:p>Validar que cuando se seleccione alguno de estos registros, en el botón dinámico de color naranja en la parte inferior se muestren las opciones “Aprobar solicitud”, “Rechazar solicitud”</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3-07</text:p>
          </table:table-cell>
          <table:table-cell table:style-name="ce64" office:value-type="string" calcext:value-type="string">
            <text:p>Validar que al seleccionar un radicado y se de clic en el botón dinámico de color naranja en la parte inferior, se muestre la opción de “Aprobar solicitud” y al dar clic en dicha opción, se debe desplegar un mensaje de confirmación indicando que “Se va a generar una acta de anulación”</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64">
          <table:table-cell table:style-name="ce6" office:value-type="string" calcext:value-type="string">
            <text:p>CP53-08</text:p>
          </table:table-cell>
          <table:table-cell table:style-name="ce64" office:value-type="string" calcext:value-type="string">
            <text:p>Validar que cuando se haga el proceso anterior se despliegue una nueva ventana donde se solicite ingresar una observación en la que se justifique porque se aprueba la solicitud realizada, una vez realizado el proceso se muestre un mensaje de confirmación indicando el No. de acta que se va a descarga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3-09</text:p>
          </table:table-cell>
          <table:table-cell table:style-name="ce64" office:value-type="string" calcext:value-type="string">
            <text:p>Validar que cuando se seleccione alguno de los registros mostrados y se de clic en el botón dinámico de color naranja en la parte inferior se muestre las opciones “Descargar pdf de aceptación”</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65">
          <table:table-cell table:style-name="ce6" office:value-type="string" calcext:value-type="string">
            <text:p>CP53-10</text:p>
          </table:table-cell>
          <table:table-cell table:style-name="ce64" office:value-type="string" calcext:value-type="string">
            <text:p>Validar que al seleccionar un radicado y se de clic en el botón dinámico de color naranja en la parte inferior, se muestre la opción de “Rechazar solicitud” <text:s/>se despliegue una ventana donde se ingrese una observación del porque se esta rechazando la solicitud de anulación y una vez realizado este proceso se mostrara un mensaje de confirmación “Registro almacenado correctamente”</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54 – Gestión Archivo - Asignación de espacio físico</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6" office:value-type="string" calcext:value-type="string">
            <text:p>CP54-01</text:p>
          </table:table-cell>
          <table:table-cell table:style-name="ce64" office:value-type="string" calcext:value-type="string">
            <text:p>Validar que cuando se de clic en la opción de Gestión Archivo la opción de Asignación de espacio Físico, el sistema despliegue dicho modulo, siempre y cuando el usuario tenga el permiso asign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4-02</text:p>
          </table:table-cell>
          <table:table-cell table:style-name="ce64" office:value-type="string" calcext:value-type="string">
            <text:p>Valdiar que cuando se haga el proceso anterior se muestre una tabla con los espacios Físicos que se han creado en el sistema, donde se debe mostrar las columnas "Edificio", "Piso", "Área de archivo", "Estante", "Cuerpo", <text:s/>"Módulos", "Fecha creación", "Est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4-03</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4-04</text:p>
          </table:table-cell>
          <table:table-cell table:style-name="ce64" office:value-type="string" calcext:value-type="string">
            <text:p>Validar que cuando se de clic en el botón dinámico de color naranja en la parte inferior se muestre las opciones “Agregar”, el sistema despliegue un formulario donde se ingrese la información relacionada a las ubicaciónes topograficas con las que cuenta la entidad</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4-05</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4-06</text:p>
          </table:table-cell>
          <table:table-cell table:style-name="ce64" office:value-type="string" calcext:value-type="string">
            <text:p>Validar que se solicite el nombre del ediciación, el departamente y municipio donde esta ubicado fisicamente el archivo, adicional de pedir información relacionada al piso, area de arachivo, estande, entrepaño, modulo, caja y cuerp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4-07</text:p>
          </table:table-cell>
          <table:table-cell table:style-name="ce64" office:value-type="string" calcext:value-type="string">
            <text:p>Validar que se pueda ingresar el nombre de un edificio nuevo a configurar o permitir buscar un edicifico ya existente dando le clic a la opción "Seleccionar edificio existente"</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4-08</text:p>
          </table:table-cell>
          <table:table-cell table:style-name="ce64" office:value-type="string" calcext:value-type="string">
            <text:p>Validar que una vez diligenciado todo el formulario y habiendo dado clic en el botón de "Agregar", el sistema haya creado la asignación y permita agregar mas opciones, desde la sección que se habilito una vez realizado el proceso anterio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4-09</text:p>
          </table:table-cell>
          <table:table-cell table:style-name="ce64" office:value-type="string" calcext:value-type="string">
            <text:p>Validar que una vez hecho el proceso completo y haber dado clic en el botón de guardar el sistema muestre mensaje de confirmación con el mensaje "Registro almacenado correctamente"</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4-10</text:p>
          </table:table-cell>
          <table:table-cell table:style-name="ce64" office:value-type="string" calcext:value-type="string">
            <text:p>Validar que al dar clic en la opción “Cambiar estado” permita inactivar el edificio seleccionado en caso de estar activo o de lo contrario, activar en caso de encontrarse inactiv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4-11</text:p>
          </table:table-cell>
          <table:table-cell table:style-name="ce64" office:value-type="string" calcext:value-type="string">
            <text:p>Validar que al dar clic en la opción “Ver”, se muestre una ventana donde se vea el detalle del edificio que se encuentra creado en el sistemas, los campos a mostrar “Nombre edificio”, “Departamento”, “Municipio”, “Fecha creación del edificio”, “Piso”, “Área de archivo”, “Módulo”, “Estante”, “Entrepaño”, “Caja” y “Cuerp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4-12</text:p>
          </table:table-cell>
          <table:table-cell table:style-name="ce64" office:value-type="string" calcext:value-type="string">
            <text:p>Validar que al dar clic en la opción "Actualizar" el sistema muestre el formulario diligenciado con la información asociada al registro seleccion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64">
          <table:table-cell table:style-name="ce6" office:value-type="string" calcext:value-type="string">
            <text:p>CP54-13</text:p>
          </table:table-cell>
          <table:table-cell table:style-name="ce64" office:value-type="string" calcext:value-type="string">
            <text:p>Validar que cuando se de clic en el botón “FILTROS” se despliegue una ventana nueva donde se muestren los campos “Nombre edificio”, “Numero de piso”, “Area de archivo”, “Estado”, “Estante”, “Cuerpo” y rangos de fechas, adicional de mostrar una lista desplegable indicando la cantidad de registros a mostra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4-14</text:p>
          </table:table-cell>
          <table:table-cell table:style-name="ce64"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4-15</text:p>
          </table:table-cell>
          <table:table-cell table:style-name="ce33" office:value-type="string" calcext:value-type="string">
            <text:p>Validar que cuando se de clic en alguno de los botones de “CSV”, “EXCEL”, “PDF” y “IMPRIMIR” el sistema descargue o genere el correspondiente archivo</text:p>
          </table:table-cell>
          <table:table-cell table:style-name="ce6" office:value-type="string" calcext:value-type="string">
            <text:p>ok</text:p>
          </table:table-cell>
          <table:table-cell table:style-name="ce16"/>
          <table:table-cell table:style-name="ce36"/>
          <table:table-cell table:style-name="ce10" table:number-columns-repeated="22"/>
          <table:table-cell table:number-columns-repeated="16357"/>
        </table:table-row>
        <table:table-row table:style-name="ro1">
          <table:table-cell table:style-name="ce49" office:value-type="string" calcext:value-type="string" table:number-columns-spanned="2" table:number-rows-spanned="1">
            <text:p>CP55 – Gestión de archivo - Archivar expediente</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66">
          <table:table-cell table:style-name="ce6" office:value-type="string" calcext:value-type="string">
            <text:p>CP55-01</text:p>
          </table:table-cell>
          <table:table-cell table:style-name="ce64" office:value-type="string" calcext:value-type="string">
            <text:p>Validar que cuando se de clic en la opción de Gestión Archivo la opción de Archivar Expediente, el sistema despliegue dicho modulo, siempre y cuando el usuario tenga el permiso asignado</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asignarle una ubicación física a los expedientes que se encuentren cerrados.</text:p>
            <text:p>2. Se ingresa al modulo de Gestión de Archivo - Archivar expediente</text:p>
            <text:p>3. Se valida que se listan todos los expedientes que se encuentran en estado cerrados pero sin una ubicación</text:p>
          </table:table-cell>
          <table:table-cell table:style-name="ce64"/>
          <table:table-cell table:style-name="ce4"/>
          <table:table-cell table:number-columns-repeated="16378"/>
        </table:table-row>
        <table:table-row table:style-name="ro67">
          <table:table-cell table:style-name="ce6" office:value-type="string" calcext:value-type="string">
            <text:p>CP55-02</text:p>
          </table:table-cell>
          <table:table-cell table:style-name="ce64" office:value-type="string" calcext:value-type="string">
            <text:p>Valdiar que cuando se haga el proceso anterior se muestre una tabla con los expedientes que ya se encuentran cerrados y listos para darle una ubicación en el sistema, donde se debe mostrar las columnas "Número expediente", "Expediente", "Descripcion", "Serie", "Subserie", "Creacion", "Tiempo en gestion", "Tiempo en central", "Espacio físico" y "Estado"</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asignarle una ubicación física a los expedientes que se encuentren cerrados.</text:p>
            <text:p>2. Se ingresa al modulo de Gestión de Archivo - Archivar expediente</text:p>
            <text:p>3. Se valida que se listan todos los expedientes que se encuentran en estado cerrados pero sin una ubicación</text:p>
            <text:p>4. Se valida el expediente que se va a archivar, y se evidencian las columnas que se mencionan en el item evaluado</text:p>
          </table:table-cell>
          <table:table-cell table:style-name="ce64"/>
          <table:table-cell table:style-name="ce4"/>
          <table:table-cell table:number-columns-repeated="16378"/>
        </table:table-row>
        <table:table-row table:style-name="ro68">
          <table:table-cell table:style-name="ce6" office:value-type="string" calcext:value-type="string">
            <text:p>CP55-03</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asignarle una ubicación física a los expedientes que se encuentren cerrados.</text:p>
            <text:p>2. Se ingresa al modulo de Gestión de Archivo - Archivar expediente</text:p>
            <text:p>3. Se da clic a la opción de FILTROS, y se busca por el número del expediente 20240099905022 y se muestran resultados</text:p>
          </table:table-cell>
          <table:table-cell table:style-name="ce64"/>
          <table:table-cell table:style-name="ce4"/>
          <table:table-cell table:number-columns-repeated="16378"/>
        </table:table-row>
        <table:table-row table:style-name="ro69">
          <table:table-cell table:style-name="ce6" office:value-type="string" calcext:value-type="string">
            <text:p>CP55-04</text:p>
          </table:table-cell>
          <table:table-cell table:style-name="ce64" office:value-type="string" calcext:value-type="string">
            <text:p>Validar que cuando se de clic en el botón “FILTROS” se despliegue una ventana nueva donde se muestren los campos “Nombre edificio”, “Numero de piso”, “Area de archivo”, “Estado”, “Estante”, “Cuerpo” y rangos de fechas, adicional de mostrar una lista desplegable indicando la cantidad de registros a mostrar</text:p>
          </table:table-cell>
          <table:table-cell table:style-name="ce6" office:value-type="string" calcext:value-type="string">
            <text:p>ok</text:p>
          </table:table-cell>
          <table:table-cell table:style-name="ce90" office:value-type="string" calcext:value-type="string" table:number-columns-spanned="1" table:number-rows-spanned="2">
            <text:p>1. Se ingresa con el usuario admin el cual es el usuario que va a realizar el proceso de asignarle una ubicación física a los expedientes que se encuentren cerrados.</text:p>
            <text:p>2. Se ingresa al modulo de Gestión de Archivo - Archivar expediente</text:p>
            <text:p>3. Se da clic a la opción de FILTROS, y se busca por el número del expediente 20240099905022 y se muestran resultados</text:p>
            <text:p>4. Se ingresa un rango de fechas desde el mes de julio al mes de agosto, y muestra resultados.</text:p>
            <text:p>5. Se ingresa a la opción de filtros y se busca por el nombre del expediente y rango de fechas, obteniendo resultados</text:p>
          </table:table-cell>
          <table:table-cell table:style-name="ce64"/>
          <table:table-cell table:style-name="ce4"/>
          <table:table-cell table:number-columns-repeated="16378"/>
        </table:table-row>
        <table:table-row table:style-name="ro7">
          <table:table-cell table:style-name="ce6" office:value-type="string" calcext:value-type="string">
            <text:p>CP55-05</text:p>
          </table:table-cell>
          <table:table-cell table:style-name="ce64"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70">
          <table:table-cell table:style-name="ce6" office:value-type="string" calcext:value-type="string">
            <text:p>CP55-06</text:p>
          </table:table-cell>
          <table:table-cell table:style-name="ce33" office:value-type="string" calcext:value-type="string">
            <text:p>Validar que cuando se de clic en alguno de los botones de “CSV”, “EXCEL”, “PDF” y “IMPRIMIR” el sistema descargue o genere el correspondiente archivo</text:p>
          </table:table-cell>
          <table:table-cell table:style-name="ce6" office:value-type="string" calcext:value-type="string">
            <text:p>ok</text:p>
          </table:table-cell>
          <table:table-cell table:style-name="ce8" office:value-type="string" calcext:value-type="string">
            <text:p>1. Luego de realizar el proceso del item anterior, se da clic en las opciones de descarga CSV</text:p>
            <text:p>2. El sistema descarga el archivo con el nombre Listado de expedientes.csv</text:p>
            <text:p>3. Se da clic en las opciones de descarga EXCEL y el sistema descarga archivo Listado de expedientes.xlsx</text:p>
            <text:p>4. Se da clic en las opciones de descarga PDF y el sistema descarga archivo Listado de expedientes.pdf</text:p>
          </table:table-cell>
          <table:table-cell table:style-name="ce122"/>
          <table:table-cell table:number-columns-repeated="16379"/>
        </table:table-row>
        <table:table-row table:style-name="ro69">
          <table:table-cell table:style-name="ce6" office:value-type="string" calcext:value-type="string">
            <text:p>CP55-07</text:p>
          </table:table-cell>
          <table:table-cell table:style-name="ce64" office:value-type="string" calcext:value-type="string">
            <text:p>Validar que al seleccionar un expediente y este se encuentre en estado "Pendiente por archivar" y se proceda a dar clic en el botón dinámico de color naranja en la parte inferior, se muestren las opciones de "Archivar" y "Ver Ubicación"</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asignarle una ubicación física a los expedientes que se encuentren cerrados.</text:p>
            <text:p>2. Se ingresa al modulo de Gestión de Archivo - Archivar expediente 3. Se selecciona el expediente al que se le va a asignar una ubicación física y se da clic en el botón dinámico</text:p>
          </table:table-cell>
          <table:table-cell table:style-name="ce64"/>
          <table:table-cell table:style-name="ce4"/>
          <table:table-cell table:number-columns-repeated="16378"/>
        </table:table-row>
        <table:table-row table:style-name="ro71">
          <table:table-cell table:style-name="ce6" office:value-type="string" calcext:value-type="string">
            <text:p>CP55-08</text:p>
          </table:table-cell>
          <table:table-cell table:style-name="ce64" office:value-type="string" calcext:value-type="string">
            <text:p>Validar que al hacer el proceso anterior en sistema despliegue una nueva ventana donde se solicite ingresar información relacionada a la ubicación que se le asignara al radicado, esta ventana debe mostrar una serie de campos haciendo referencia a departamento, municipio y con base a esta selección se precarguen listados correspondientes a edificio, piso, archivo, estante, modulo, entrepaño, caja, cuerpo y unidad de conservación</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asignarle una ubicación física a los expedientes que se encuentren cerrados.</text:p>
            <text:p>2. Se ingresa al modulo de Gestión de Archivo - Archivar expediente 3. Se selecciona el expediente al que se le va a asignar una ubicación física y se da clic en el botón dinámico</text:p>
            <text:p>4. Se da clic en la opción Archivar, y se procede a ingresar los datos del departamento, municipio.</text:p>
            <text:p>5. Luego se selecciona la opción de Edificio, piso y área de archivo.</text:p>
            <text:p>6. Luego se ingresa el estante, modulo, entrepaño, caja, cuerpo y unidad de conservación</text:p>
            <text:p>7. Se da clic en guardar</text:p>
          </table:table-cell>
          <table:table-cell table:style-name="ce64"/>
          <table:table-cell table:style-name="ce4"/>
          <table:table-cell table:number-columns-repeated="16378"/>
        </table:table-row>
        <table:table-row table:style-name="ro72">
          <table:table-cell table:style-name="ce6" office:value-type="string" calcext:value-type="string">
            <text:p>CP55-09</text:p>
          </table:table-cell>
          <table:table-cell table:style-name="ce64" office:value-type="string" calcext:value-type="string">
            <text:p>Validar que cuando se haga clic en el botón de guardar y los campos que tiene * esten vacios, el sistema debe pintar los campos de color rojo y mostrar mensaje de “algo esta mal”</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asignarle una ubicación física a los expedientes que se encuentren cerrados.</text:p>
            <text:p>2. Se ingresa al modulo de Gestión de Archivo - Archivar expediente</text:p>
            <text:p>3. Se selecciona el expediente al que se le va a asignar una ubicación física y se da clic en el botón dinámico</text:p>
            <text:p>4. Se da clic en el botón guardar sin diligenciar información para lo cual el sistema muestra el mensaje de error sobre los campos obligatorios</text:p>
          </table:table-cell>
          <table:table-cell table:style-name="ce64"/>
          <table:table-cell table:style-name="ce4"/>
          <table:table-cell table:number-columns-repeated="16378"/>
        </table:table-row>
        <table:table-row table:style-name="ro73">
          <table:table-cell table:style-name="ce6" office:value-type="string" calcext:value-type="string">
            <text:p>CP55-10</text:p>
          </table:table-cell>
          <table:table-cell table:style-name="ce64" office:value-type="string" calcext:value-type="string">
            <text:p>Validar una vez diligenciada toda la información que se solicita y haber dado clic en el botón dinámico de color naranja en la parte inferior se muestre un mensaje de confirmación indicando que el proceso se hizo de forma correcta y de forma adicional el estado de los expedientes seleccionados este en "Archivado" y en la columna Espacio Físico Asignado</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asignarle una ubicación física a los expedientes que se encuentren cerrados.</text:p>
            <text:p>2. Se ingresa al modulo de Gestión de Archivo - Archivar expediente 3. Se selecciona el expediente al que se le va a asignar una ubicación física y se da clic en el botón dinámico</text:p>
            <text:p>4. Se da clic en la opción Archivar, y se procede a ingresar los datos del departamento, municipio.</text:p>
            <text:p>5. Luego se selecciona la opción de Edificio, piso y área de archivo.</text:p>
            <text:p>6. Luego se ingresa el estante, modulo, entrepaño, caja, cuerpo y unidad de conservación</text:p>
            <text:p>7. Se da clic en guardar</text:p>
            <text:p>8. Luego se muestra mensaje de confirmación del proceso realizado y se evidencia que cambia el estado del expediente</text:p>
          </table:table-cell>
          <table:table-cell table:style-name="ce64"/>
          <table:table-cell table:style-name="ce4"/>
          <table:table-cell table:number-columns-repeated="16378"/>
        </table:table-row>
        <table:table-row table:style-name="ro74">
          <table:table-cell table:style-name="ce6" office:value-type="string" calcext:value-type="string">
            <text:p>CP55-11</text:p>
          </table:table-cell>
          <table:table-cell table:style-name="ce64" office:value-type="string" calcext:value-type="string">
            <text:p>Validar que al seleccionar un expediente y este se encuentre en estado "Archivado" y se proceda a dar clic en el botón dinámico de color naranja en la parte inferior, se muestren las opciones de "Archivar", "Rotulo de Caja" y "Rotulo carpeta"</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asignarle una ubicación física a los expedientes que se encuentren cerrados.</text:p>
            <text:p>2. Se ingresa al modulo de Gestión de Archivo - Archivar expediente</text:p>
            <text:p>3. Seleccionar un expediente que se encuentre en estado “Archivado”</text:p>
            <text:p>4. Se valida que se muestran en el botón dinámico las opciones de ver ubicación, rotulo de caja, rotulo carpeta</text:p>
          </table:table-cell>
          <table:table-cell table:style-name="ce64"/>
          <table:table-cell table:style-name="ce4"/>
          <table:table-cell table:number-columns-repeated="16378"/>
        </table:table-row>
        <table:table-row table:style-name="ro75">
          <table:table-cell table:style-name="ce6" office:value-type="string" calcext:value-type="string">
            <text:p>CP55-12</text:p>
          </table:table-cell>
          <table:table-cell table:style-name="ce64" office:value-type="string" calcext:value-type="string">
            <text:p>Validar que al seleccionar un expediente y dar clic en el botón dinámico de color naranja en la parte inferior, en la opción de <text:s/>"Ver Ubicación" se muestre un formulario con la información de la ubicación donde se encuentra el expediente, esto debe mostrar el Detalle, la Localización y Radicados del expediente</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asignarle una ubicación física a los expedientes que se encuentren cerrados.</text:p>
            <text:p>2. Se ingresa al modulo de Gestión de Archivo - Archivar expediente</text:p>
            <text:p>3. Seleccionar un expediente que se encuentre en estado “Archivado”</text:p>
            <text:p>4. Se valida que se muestran en el botón dinámico las opciones de ver ubicación, rotulo de caja, rotulo carpeta</text:p>
            <text:p>5. Dar clic en la opción “Ver ubicación” se muestra el detalle de la ubicación del expediente</text:p>
          </table:table-cell>
          <table:table-cell table:style-name="ce64"/>
          <table:table-cell table:style-name="ce4"/>
          <table:table-cell table:number-columns-repeated="16378"/>
        </table:table-row>
        <table:table-row table:style-name="ro75">
          <table:table-cell table:style-name="ce6" office:value-type="string" calcext:value-type="string">
            <text:p>CP55-13</text:p>
          </table:table-cell>
          <table:table-cell table:style-name="ce64" office:value-type="string" calcext:value-type="string">
            <text:p>Validar que al seleccionar un expediente y dar clic en el botón dinámico de color naranja en la parte inferior, en la opción de <text:s/>"Rotulo de Caja" se muestre un mensaje de confirmación "Se generó correctamente el rótulo de caja" y adicional que se descargue un archivo pdf, donde se muestre los datos del cliente logo y nombre</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asignarle una ubicación física a los expedientes que se encuentren cerrados.</text:p>
            <text:p>2. Se ingresa al modulo de Gestión de Archivo - Archivar expediente</text:p>
            <text:p>3. Seleccionar un expediente que se encuentre en estado “Archivado”</text:p>
            <text:p>4. Se valida que se muestran en el botón dinámico las opciones de ver ubicación, rotulo de caja, rotulo carpeta</text:p>
            <text:p>5. Dar clic en la opción “rotulo caja” el sistema descarga un archivo pdf con la estructura que se indica</text:p>
          </table:table-cell>
          <table:table-cell table:style-name="ce64"/>
          <table:table-cell table:style-name="ce4"/>
          <table:table-cell table:number-columns-repeated="16378"/>
        </table:table-row>
        <table:table-row table:style-name="ro76">
          <table:table-cell table:style-name="ce6" office:value-type="string" calcext:value-type="string">
            <text:p>CP55-14</text:p>
          </table:table-cell>
          <table:table-cell table:style-name="ce64" office:value-type="string" calcext:value-type="string">
            <text:p>Validar que al seleccionar un expediente y dar clic en el botón dinámico de color naranja en la parte inferior, en la opción de <text:s/>"Rotulo carpeta" se muestre un mensaje de confirmación "Se generó correctamente el rotulo carpeta" y adicional que se descargue un archivo pdf, donde se muestre los datos del cliente logo y nombre</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asignarle una ubicación física a los expedientes que se encuentren cerrados.</text:p>
            <text:p>2. Se ingresa al modulo de Gestión de Archivo - Archivar expediente</text:p>
            <text:p>3. Seleccionar un expediente que se encuentre en estado “Archivado”</text:p>
            <text:p>4. Se valida que se muestran en el botón dinámico las opciones de ver ubicación, rotulo de caja, rotulo carpeta</text:p>
            <text:p>5. Dar clic en la opción “rotulo carpeta” el sistema descarga un archivo pdf con la estructura que se indica</text:p>
          </table:table-cell>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56 – Gestión Archivo – Transferencias Documentales</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6" office:value-type="string" calcext:value-type="string">
            <text:p>CP56-01</text:p>
          </table:table-cell>
          <table:table-cell table:style-name="ce64" office:value-type="string" calcext:value-type="string">
            <text:p>Validar que cuando se de clic en la opción de Gestión Archivo la opción de Transferencias Documentales, el sistema despliegue dicho modulo, siempre y cuando el usuario tenga el permiso asignado</text:p>
          </table:table-cell>
          <table:table-cell table:style-name="ce1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6-02</text:p>
          </table:table-cell>
          <table:table-cell table:style-name="ce64" office:value-type="string" calcext:value-type="string">
            <text:p>Validar que en este modulo de “Transferencias Documentales” se muestre todos los expedientes que cumplieron los tiempos de retención tanto de gestión como de central segun corresponda</text:p>
          </table:table-cell>
          <table:table-cell table:style-name="ce16" office:value-type="string" calcext:value-type="string">
            <text:p>ok</text:p>
          </table:table-cell>
          <table:table-cell table:style-name="ce16"/>
          <table:table-cell table:style-name="ce64"/>
          <table:table-cell table:style-name="ce4"/>
          <table:table-cell table:number-columns-repeated="16378"/>
        </table:table-row>
        <table:table-row table:style-name="ro24">
          <table:table-cell table:style-name="ce6" office:value-type="string" calcext:value-type="string">
            <text:p>CP56-03</text:p>
          </table:table-cell>
          <table:table-cell table:style-name="ce64" office:value-type="string" calcext:value-type="string">
            <text:p>Validar que cuando se ingrese al modulo se muestre una tabla con el listado de expedientes que ya cumplieron los tiempos de archivo gestión o tiempos de archivo central, y que se encuentren archivados en una estructura de archivo ya definida (ubicación topografica)… se deben mostrar las columnas “Expediente” ”Número expediente ”, “Serie”, ”Subserie”, ”Fecha proceso”, “Dependencia”, ”Usuario”, ”Tipo de archivo”, “Estado”</text:p>
          </table:table-cell>
          <table:table-cell table:style-name="ce1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6-04</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1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6-05</text:p>
          </table:table-cell>
          <table:table-cell table:style-name="ce64" office:value-type="string" calcext:value-type="string">
            <text:p>Validar que al seleccionar un expediente y este se encuentre en estado “Pendiente por transferir” y adicional se encuentre en una ubicación topografica, se muestre en el botón flotante de color naranja que se muestra en la parte inferior, las opciones “Aceptar Transferencia”, “Rechazar Transferencia”, “FUID pdf, “FUID xlsx” y “FUID xml”</text:p>
          </table:table-cell>
          <table:table-cell table:style-name="ce1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6-06</text:p>
          </table:table-cell>
          <table:table-cell table:style-name="ce64" office:value-type="string" calcext:value-type="string">
            <text:p>Validar que al seleccionar un expediente de los que se muestra y se de clic en alguna de las opciones mencionadas anteriormente “FUID pdf”, “FUID xlsx” y “FUID xml” se genere un documento en la extesión correspondiente</text:p>
          </table:table-cell>
          <table:table-cell table:style-name="ce1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6-07</text:p>
          </table:table-cell>
          <table:table-cell table:style-name="ce64" office:value-type="string" calcext:value-type="string">
            <text:p>Validar que si se intenta generar el formato del proceso anterior y el expediente no tiene documentos incluidos, se muestre mensaje “</text:p>
            <text:p>No se encontraron datos de archivo del expediente N° XXXXXX”</text:p>
          </table:table-cell>
          <table:table-cell table:style-name="ce16" office:value-type="string" calcext:value-type="string">
            <text:p>ok</text:p>
          </table:table-cell>
          <table:table-cell table:style-name="ce16"/>
          <table:table-cell table:style-name="ce64"/>
          <table:table-cell table:style-name="ce4"/>
          <table:table-cell table:number-columns-repeated="16378"/>
        </table:table-row>
        <table:table-row table:style-name="ro52">
          <table:table-cell table:style-name="ce6" office:value-type="string" calcext:value-type="string">
            <text:p>CP56-08</text:p>
          </table:table-cell>
          <table:table-cell table:style-name="ce64" office:value-type="string" calcext:value-type="string">
            <text:p>Validar que al seleccionar un expediente y se de clic a la opción <text:s/>“Aceptar Transferencia” el sistema debe cambiar el estado del expediente a “Transferencia aceptada” y adicional mostrar mensaje de confirmación “Estado actualizado del expediente XXXXX – NOMBRE EXPEDIENTE”</text:p>
          </table:table-cell>
          <table:table-cell table:style-name="ce16" office:value-type="string" calcext:value-type="string">
            <text:p>ok</text:p>
          </table:table-cell>
          <table:table-cell table:style-name="ce16"/>
          <table:table-cell table:style-name="ce64"/>
          <table:table-cell table:style-name="ce4"/>
          <table:table-cell table:number-columns-repeated="16378"/>
        </table:table-row>
        <table:table-row table:style-name="ro50">
          <table:table-cell table:style-name="ce6" office:value-type="string" calcext:value-type="string">
            <text:p>CP56-09</text:p>
          </table:table-cell>
          <table:table-cell table:style-name="ce64" office:value-type="string" calcext:value-type="string">
            <text:p>Validar que al seleccionar un expediente y se de clic a la opción “Archivar” la cual se muestra cuando se selecciona un expediente que se encuentra en estado “Transferencia aceptada”, despliegue un modal donde se solicite ingresar cierta información, los cuales son obligatorios, los campos son: “Departamento”, “Municipio”, “Edificio”, “Piso”, “Area de archivo”, “Estante”, “Modulo”, “Entrepaño”, “Caja”, “Cuerpo” y “Unidad de conservación”</text:p>
          </table:table-cell>
          <table:table-cell table:style-name="ce1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6-10</text:p>
          </table:table-cell>
          <table:table-cell table:style-name="ce64" office:value-type="string" calcext:value-type="string">
            <text:p>Validar que cuando se realice el proceso que se describe en la fila anterior, procese la información y se de clic en guardar, el sistema muestre un mensaje de confirmación indicando que se hizo el proceso correctamente.</text:p>
          </table:table-cell>
          <table:table-cell table:style-name="ce1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6-11</text:p>
          </table:table-cell>
          <table:table-cell table:style-name="ce64" office:value-type="string" calcext:value-type="string">
            <text:p>Validar que al seleccionar un expediente y se de clic a la opción “Rechazar Transferencia” el sistema debe desplegar un modal donde se solicite una observación del porque se rechaza la transferencia, en caso de no diligenciarlo se muestre mensaje en rojo indicando que el campo es obligatorio.</text:p>
          </table:table-cell>
          <table:table-cell table:style-name="ce1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6-12</text:p>
          </table:table-cell>
          <table:table-cell table:style-name="ce64" office:value-type="string" calcext:value-type="string">
            <text:p>Validar que cuando se haga el proceso anterior y luego se procese la información y se de clic en guardar, el sistema muestre un mensaje de confirmación indicando que se hizo el proceso correctamente.</text:p>
          </table:table-cell>
          <table:table-cell table:style-name="ce16" office:value-type="string" calcext:value-type="string">
            <text:p>ok</text:p>
          </table:table-cell>
          <table:table-cell table:style-name="ce16"/>
          <table:table-cell table:style-name="ce64"/>
          <table:table-cell table:style-name="ce4"/>
          <table:table-cell table:number-columns-repeated="16378"/>
        </table:table-row>
        <table:table-row table:style-name="ro69">
          <table:table-cell table:style-name="ce6" office:value-type="string" calcext:value-type="string">
            <text:p>CP56-13</text:p>
          </table:table-cell>
          <table:table-cell table:style-name="ce64" office:value-type="string" calcext:value-type="string">
            <text:p>Validar que cuando se de clic en el botón “FILTROS” se despliegue una ventana nueva donde se muestren los campos “Nº expediente”, “Nombre”, “Nombre dependencia”, “Usuario creador”, rangos de fechas, “Serie”, “Subserie”, “Tipo de archivo” y “Estado” adicional de mostrar una lista desplegable indicando la cantidad de registros a mostrar</text:p>
          </table:table-cell>
          <table:table-cell table:style-name="ce6" office:value-type="string" calcext:value-type="string">
            <text:p>ok</text:p>
          </table:table-cell>
          <table:table-cell table:style-name="ce90" office:value-type="string" calcext:value-type="string" table:number-columns-spanned="1" table:number-rows-spanned="2">
            <text:p>1. Se ingresa con el usuario admin el cual es el usuario que va a realizar el proceso de asignarle una ubicación física a los expedientes que se encuentren cerrados.</text:p>
            <text:p>2. Se ingresa al modulo de Gestión de Archivo - Archivar expediente</text:p>
            <text:p>3. Se da clic a la opción de FILTROS, y se busca por el número del expediente 20240099905022 y se muestran resultados</text:p>
            <text:p>4. Se ingresa un rango de fechas desde el mes de julio al mes de agosto, y muestra resultados.</text:p>
            <text:p>5. Se ingresa a la opción de filtros y se busca por el nombre del expediente y rango de fechas, obteniendo resultados</text:p>
          </table:table-cell>
          <table:table-cell table:style-name="ce64"/>
          <table:table-cell table:style-name="ce4"/>
          <table:table-cell table:number-columns-repeated="16378"/>
        </table:table-row>
        <table:table-row table:style-name="ro7">
          <table:table-cell table:style-name="ce6" office:value-type="string" calcext:value-type="string">
            <text:p>CP56-14</text:p>
          </table:table-cell>
          <table:table-cell table:style-name="ce64"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70">
          <table:table-cell table:style-name="ce6" office:value-type="string" calcext:value-type="string">
            <text:p>CP56-15</text:p>
          </table:table-cell>
          <table:table-cell table:style-name="ce33" office:value-type="string" calcext:value-type="string">
            <text:p>Validar que cuando se de clic en alguno de los botones de “CSV”, “EXCEL”, “PDF” y “IMPRIMIR” el sistema descargue o genere el correspondiente archivo</text:p>
          </table:table-cell>
          <table:table-cell table:style-name="ce6" office:value-type="string" calcext:value-type="string">
            <text:p>ok</text:p>
          </table:table-cell>
          <table:table-cell table:style-name="ce8" office:value-type="string" calcext:value-type="string">
            <text:p>1. Luego de realizar el proceso del item anterior, se da clic en las opciones de descarga CSV</text:p>
            <text:p>2. El sistema descarga el archivo con el nombre Listado de expedientes.csv</text:p>
            <text:p>3. Se da clic en las opciones de descarga EXCEL y el sistema descarga archivo Listado de expedientes.xlsx</text:p>
            <text:p>4. Se da clic en las opciones de descarga PDF y el sistema descarga archivo Listado de expedientes.pdf</text:p>
          </table:table-cell>
          <table:table-cell table:style-name="ce122"/>
          <table:table-cell table:number-columns-repeated="16379"/>
        </table:table-row>
        <table:table-row table:style-name="ro1">
          <table:table-cell table:style-name="ce49" office:value-type="string" calcext:value-type="string" table:number-columns-spanned="2" table:number-rows-spanned="1">
            <text:p>CP57 – Gestión Archivo – Disposición Final</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6" office:value-type="string" calcext:value-type="string">
            <text:p>CP57-01</text:p>
          </table:table-cell>
          <table:table-cell table:style-name="ce64" office:value-type="string" calcext:value-type="string">
            <text:p>Validar que cuando se de clic en la opción de Gestión Archivo la opción de disposición final, esto debe ser valido si se cuenta con el permiso asignado en el rol del usuari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7">
          <table:table-cell table:style-name="ce6" office:value-type="string" calcext:value-type="string">
            <text:p>CP57-02</text:p>
          </table:table-cell>
          <table:table-cell table:style-name="ce64" office:value-type="string" calcext:value-type="string">
            <text:p>Validar que cuando se de clic a la opción “Disposición final” se despliegue una vista donde se muestre el detalle de todos los expedientes que se encuentran cerrados y a los que se le debe aplicar una disposición final segun corresponda, esta vista debe motrar una sección que se llame “Series y subseries documentales de eliminacion” donde se muestren todos los expedientes que tiene dicha serie y subserie en disposición.</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7-03</text:p>
          </table:table-cell>
          <table:table-cell table:style-name="ce64" office:value-type="string" calcext:value-type="string">
            <text:p>Validar que en la sección “Series y subseries documentales de eliminacion” se muestren las columnas de “Numero Expediente”, “Nombre Expediente”, “Tiempo gestión”, “Tiempo central”, “Aprobada Eliminación AGN” y “Estado” …. el cual debe decir cerr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9">
          <table:table-cell table:style-name="ce6" office:value-type="string" calcext:value-type="string">
            <text:p>CP57-04</text:p>
          </table:table-cell>
          <table:table-cell table:style-name="ce64" office:value-type="string" calcext:value-type="string">
            <text:p>Validar que al seleccionar una opción en la sección de “Series y subseries documentales de eliminacion” y se de clic en el botón dinámico de color naranja en la parte inferior, se muestre la opción de “Aprobación por el AGN” y al dar clic en dicha opción, se debe <text:s/>desplagar un modal donde se solicite un archivo pdf, y este debe tener como nombre aprocacion_por_agn_eliminacion.pdf</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7-05</text:p>
          </table:table-cell>
          <table:table-cell table:style-name="ce64" office:value-type="string" calcext:value-type="string">
            <text:p>Valida que al realizar el proceso anterior se muestre en la columna Aprobada Eliminación AGN la palabra SI y desde allí se pueda ver el archivo que se gener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7-06</text:p>
          </table:table-cell>
          <table:table-cell table:style-name="ce64" office:value-type="string" calcext:value-type="string">
            <text:p>Validar que exista una función o un cron que se ejecute diariamente en el cual se deba buscar en la base de datos los expedientes que en la fecha de cental ya se haya cumplido para que se marque como eliminado en el estado</text:p>
          </table:table-cell>
          <table:table-cell table:style-name="ce6" office:value-type="string" calcext:value-type="string">
            <text:p>ok</text:p>
          </table:table-cell>
          <table:table-cell table:style-name="ce16"/>
          <table:table-cell table:style-name="ce64" office:value-type="string" calcext:value-type="string">
            <text:p>hace falta validar</text:p>
          </table:table-cell>
          <table:table-cell table:style-name="ce4"/>
          <table:table-cell table:number-columns-repeated="16378"/>
        </table:table-row>
        <table:table-row table:style-name="ro7">
          <table:table-cell table:style-name="ce6" office:value-type="string" calcext:value-type="string">
            <text:p>CP57-07</text:p>
          </table:table-cell>
          <table:table-cell table:style-name="ce64" office:value-type="string" calcext:value-type="string">
            <text:p>Validar que cuando se busque un expediente y este se encuentre en estado eliminado no se muestre en el sistema, solamente en el modulo de disposición final</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55">
          <table:table-cell table:style-name="ce6" office:value-type="string" calcext:value-type="string">
            <text:p>CP57-08</text:p>
          </table:table-cell>
          <table:table-cell table:style-name="ce64" office:value-type="string" calcext:value-type="string">
            <text:p>Validar que cuando se de clic a la opción “Disposición final” se despliegue una vista donde se muestre el detalle de todos los expedientes que se encuentran cerrados y a los que se le debe aplicar una disposición final segun corresponda, esta vista debe motrar una sección que se llame “Series y subseries documentales de seleccion” donde se muestren todos los expedientes que tiene dicha serie y subserie en disposición.</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55">
          <table:table-cell table:style-name="ce6" office:value-type="string" calcext:value-type="string">
            <text:p>CP57-09</text:p>
          </table:table-cell>
          <table:table-cell table:style-name="ce64" office:value-type="string" calcext:value-type="string">
            <text:p>Validar que cuando se de clic en alguno de los botones de “CSV”, “EXCEL”, “PDF” y “IMPRIMIR” el sistema descargue o genere el correspondiente archivo</text:p>
          </table:table-cell>
          <table:table-cell table:style-name="ce6"/>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7-10</text:p>
          </table:table-cell>
          <table:table-cell table:style-name="ce64" office:value-type="string" calcext:value-type="string">
            <text:p>Validar que exista una función o un cron que se ejecute diariamente el cual busque todos los expedientes que tengan como subserie asignada una que tenga en disposición final selección, a dichos expediente se les debe aplicar un % dicho porcentaje son los expedientes que deben quedar como activos, todos los demas en estado eliminados</text:p>
          </table:table-cell>
          <table:table-cell table:style-name="ce6" office:value-type="string" calcext:value-type="string">
            <text:p>ok</text:p>
          </table:table-cell>
          <table:table-cell table:style-name="ce16"/>
          <table:table-cell table:style-name="ce64" office:value-type="string" calcext:value-type="string">
            <text:p>hace falta validar</text:p>
          </table:table-cell>
          <table:table-cell table:style-name="ce4"/>
          <table:table-cell table:number-columns-repeated="16378"/>
        </table:table-row>
        <table:table-row table:style-name="ro50">
          <table:table-cell table:style-name="ce6" office:value-type="string" calcext:value-type="string">
            <text:p>CP57-11</text:p>
          </table:table-cell>
          <table:table-cell table:style-name="ce64" office:value-type="string" calcext:value-type="string">
            <text:p>Validar que cuando se de clic a la opción “Disposición final” se despliegue una vista donde se muestre el detalle de todos los expedientes que se encuentran cerrados y a los que se le debe aplicar una disposición final segun corresponda, esta vista debe motrar una sección que se llame “Series y subseries documentales de conservacion total” donde se muestren todos los expedientes que tiene dicha serie y subserie en disposición.</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50">
          <table:table-cell table:style-name="ce6" office:value-type="string" calcext:value-type="string">
            <text:p>CP57-12</text:p>
          </table:table-cell>
          <table:table-cell table:style-name="ce64" office:value-type="string" calcext:value-type="string">
            <text:p>Validar que cuando se de clic en alguno de los botones de “CSV”, “EXCEL”, “PDF” y “IMPRIMIR” el sistema descargue o genere el correspondiente archivo</text:p>
          </table:table-cell>
          <table:table-cell table:style-name="ce6"/>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58 – Gestión Archivo – Inventarios Documentales</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number-columns-repeated="16379"/>
        </table:table-row>
        <table:table-row table:style-name="ro78">
          <table:table-cell table:style-name="ce6" office:value-type="string" calcext:value-type="string">
            <text:p>CP58-01</text:p>
          </table:table-cell>
          <table:table-cell table:style-name="ce64" office:value-type="string" calcext:value-type="string">
            <text:p>Validar que cuando se de clic en la opción de Gestión Archivo la opción de Inventarios Documentales, esto debe ser valido siempre y cuando el usuario tenga el permiso asign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8-02</text:p>
          </table:table-cell>
          <table:table-cell table:style-name="ce64" office:value-type="string" calcext:value-type="string">
            <text:p>Validar que cuando se ingrese al modulo se muestre una tabla con el listado de todos las series y sunseries con base a la dependencia, se debe mostrar las columnas“codigo dependencia”, “nombre dependencia”, “unidad administrativa”, “Tiene expedientes”, “Fecha creación Dependencia”</text:p>
          </table:table-cell>
          <table:table-cell table:style-name="ce6" office:value-type="string" calcext:value-type="string">
            <text:p>ok</text:p>
          </table:table-cell>
          <table:table-cell table:style-name="ce16"/>
          <table:table-cell table:style-name="ce124"/>
          <table:table-cell table:style-name="ce4"/>
          <table:table-cell table:number-columns-repeated="16378"/>
        </table:table-row>
        <table:table-row table:style-name="ro5">
          <table:table-cell table:style-name="ce6" office:value-type="string" calcext:value-type="string">
            <text:p>CP58-03</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16"/>
          <table:table-cell table:style-name="ce124"/>
          <table:table-cell table:style-name="ce4"/>
          <table:table-cell table:number-columns-repeated="16378"/>
        </table:table-row>
        <table:table-row table:style-name="ro7">
          <table:table-cell table:style-name="ce6" office:value-type="string" calcext:value-type="string">
            <text:p>CP58-04</text:p>
          </table:table-cell>
          <table:table-cell table:style-name="ce64" office:value-type="string" calcext:value-type="string">
            <text:p>Validar que al seleccionar una dependencias de las que se muestra y se de clic en el botón dinámico de color naranja que se muestra en la parte inferior, se deben mostrar 3 opciones “FUID excel”, “FUID pdf”, “FUID xml”, cada una de estas opciones debe generar un documento en la extesión correspondiente</text:p>
          </table:table-cell>
          <table:table-cell table:style-name="ce6" office:value-type="string" calcext:value-type="string">
            <text:p>ok</text:p>
          </table:table-cell>
          <table:table-cell table:style-name="ce16"/>
          <table:table-cell table:style-name="ce124"/>
          <table:table-cell table:style-name="ce4"/>
          <table:table-cell table:number-columns-repeated="16378"/>
        </table:table-row>
        <table:table-row table:style-name="ro6">
          <table:table-cell table:style-name="ce6" office:value-type="string" calcext:value-type="string">
            <text:p>CP58-05</text:p>
          </table:table-cell>
          <table:table-cell table:style-name="ce64" office:value-type="string" calcext:value-type="string">
            <text:p>Validar que si se intenta generar el formato del proceso anterior y el expediente no tiene documentos incluidos, se muestre mensaje “ No se encontraron datos de archivo del expediente N° XXXXXX”</text:p>
          </table:table-cell>
          <table:table-cell table:style-name="ce6" office:value-type="string" calcext:value-type="string">
            <text:p>ok</text:p>
          </table:table-cell>
          <table:table-cell table:style-name="ce16"/>
          <table:table-cell table:style-name="ce124"/>
          <table:table-cell table:style-name="ce4"/>
          <table:table-cell table:number-columns-repeated="16378"/>
        </table:table-row>
        <table:table-row table:style-name="ro79">
          <table:table-cell table:style-name="ce6" office:value-type="string" calcext:value-type="string">
            <text:p>CP58-06</text:p>
          </table:table-cell>
          <table:table-cell table:style-name="ce64" office:value-type="string" calcext:value-type="string">
            <text:p>Validar que en documento que se descarga debe tener la siguiente estructura: mostrar una columna que muestre <text:span text:style-name="T1">Entidad productora</text:span> debe ir el nombre que esta configurado en configuración general - Configuración del cliente, columna que muestre <text:span text:style-name="T1">Entidad administrativa</text:span> el nombre de la dependencia padre de la dependencia seleccionada, columna que muestre<text:span text:style-name="T1"> Orficina Productora</text:span> el nombre de la dependencia seleccionada, columna que muestre <text:span text:style-name="T1">Fecha Elaboración</text:span> fecha en la que se esta generando el formato, columna que muestre<text:span text:style-name="T1"> Objeto</text:span> Inventario documental individual por dependencia, columna que muestre <text:span text:style-name="T1">fecha inicial</text:span> es la fecha del primer documento cargado en el expediente y columna que muestre<text:span text:style-name="T1"> fecha final</text:span> es la fecha del ultimo documento cargado en el expediente, columna que muestre <text:span text:style-name="T1">Numero de folios</text:span> es la totalidad de docuentos incluidos en el expediente, columna que muestre <text:span text:style-name="T1">Soporte documental</text:span> debe ir Electronico y columna que muestre <text:span text:style-name="T1">Observaciones</text:span> Formato realizado automaticamente por el istema de gestión documental <text:span text:style-name="T1">OrfeoNG</text:span></text:p>
          </table:table-cell>
          <table:table-cell table:style-name="ce6" office:value-type="string" calcext:value-type="string">
            <text:p>ok</text:p>
          </table:table-cell>
          <table:table-cell table:style-name="ce16"/>
          <table:table-cell table:style-name="ce124"/>
          <table:table-cell table:style-name="ce4"/>
          <table:table-cell table:number-columns-repeated="16378"/>
        </table:table-row>
        <table:table-row table:style-name="ro7">
          <table:table-cell table:style-name="ce6" office:value-type="string" calcext:value-type="string">
            <text:p>CP58-07</text:p>
          </table:table-cell>
          <table:table-cell table:style-name="ce64" office:value-type="string" calcext:value-type="string">
            <text:p>Validar que al dar clic en en el botón dinámico de color naranja ubicando en la parte inferior, que se llame cargar formato FUID, cuando se debe clic en dicha opción se debe desplegar un modal donde yo pueda cargar un archivo xlsx</text:p>
          </table:table-cell>
          <table:table-cell table:style-name="ce6" office:value-type="string" calcext:value-type="string">
            <text:p>ok</text:p>
          </table:table-cell>
          <table:table-cell table:style-name="ce16"/>
          <table:table-cell table:style-name="ce124"/>
          <table:table-cell table:style-name="ce4"/>
          <table:table-cell table:number-columns-repeated="16378"/>
        </table:table-row>
        <table:table-row table:style-name="ro69">
          <table:table-cell table:style-name="ce6" office:value-type="string" calcext:value-type="string">
            <text:p>CP58-08</text:p>
          </table:table-cell>
          <table:table-cell table:style-name="ce64" office:value-type="string" calcext:value-type="string">
            <text:p>Validar que cuando se de clic en el botón “FILTROS” se despliegue una ventana nueva donde se muestren los campos “Nombre dependencia”, “Numero expediente” y rangos de fechas, adicional de mostrar una lista desplegable indicando la cantidad de registros a mostrar</text:p>
          </table:table-cell>
          <table:table-cell table:style-name="ce6" office:value-type="string" calcext:value-type="string">
            <text:p>ok</text:p>
          </table:table-cell>
          <table:table-cell table:style-name="ce90" office:value-type="string" calcext:value-type="string" table:number-columns-spanned="1" table:number-rows-spanned="2">
            <text:p>1. Se ingresa con el usuario admin el cual es el usuario que va a realizar el proceso de asignarle una ubicación física a los expedientes que se encuentren cerrados.</text:p>
            <text:p>2. Se ingresa al modulo de Gestión de Archivo - Archivar expediente</text:p>
            <text:p>3. Se da clic a la opción de FILTROS, y se busca por el número del expediente 20240099905022 y se muestran resultados</text:p>
            <text:p>4. Se ingresa un rango de fechas desde el mes de julio al mes de agosto, y muestra resultados.</text:p>
            <text:p>5. Se ingresa a la opción de filtros y se busca por el nombre del expediente y rango de fechas, obteniendo resultados</text:p>
          </table:table-cell>
          <table:table-cell table:style-name="ce64"/>
          <table:table-cell table:style-name="ce4"/>
          <table:table-cell table:number-columns-repeated="16378"/>
        </table:table-row>
        <table:table-row table:style-name="ro7">
          <table:table-cell table:style-name="ce6" office:value-type="string" calcext:value-type="string">
            <text:p>CP58-09</text:p>
          </table:table-cell>
          <table:table-cell table:style-name="ce64"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70">
          <table:table-cell table:style-name="ce6" office:value-type="string" calcext:value-type="string">
            <text:p>CP58-10</text:p>
          </table:table-cell>
          <table:table-cell table:style-name="ce33" office:value-type="string" calcext:value-type="string">
            <text:p>Validar que cuando se de clic en alguno de los botones de “CSV”, “EXCEL”, “PDF” y “IMPRIMIR” el sistema descargue o genere el correspondiente archivo</text:p>
          </table:table-cell>
          <table:table-cell table:style-name="ce6" office:value-type="string" calcext:value-type="string">
            <text:p>ok</text:p>
          </table:table-cell>
          <table:table-cell table:style-name="ce8" office:value-type="string" calcext:value-type="string">
            <text:p>1. Luego de realizar el proceso del item anterior, se da clic en las opciones de descarga CSV</text:p>
            <text:p>2. El sistema descarga el archivo con el nombre Listado de expedientes.csv</text:p>
            <text:p>3. Se da clic en las opciones de descarga EXCEL y el sistema descarga archivo Listado de expedientes.xlsx</text:p>
            <text:p>4. Se da clic en las opciones de descarga PDF y el sistema descarga archivo Listado de expedientes.pdf</text:p>
          </table:table-cell>
          <table:table-cell table:style-name="ce122"/>
          <table:table-cell table:number-columns-repeated="16379"/>
        </table:table-row>
        <table:table-row table:style-name="ro1">
          <table:table-cell table:style-name="ce49" office:value-type="string" calcext:value-type="string" table:number-columns-spanned="2" table:number-rows-spanned="1">
            <text:p>CP59 – Préstamos documentales - Solicitar préstamo</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6" office:value-type="string" calcext:value-type="string">
            <text:p>CP59-01</text:p>
          </table:table-cell>
          <table:table-cell table:style-name="ce64" office:value-type="string" calcext:value-type="string">
            <text:p>Validar que cuando se de clic en la opción de préstamos Documentales la opción de Solicitar préstamo, esto debe ser valido siempre y cuando el usuario tenga el permiso asign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9-02</text:p>
          </table:table-cell>
          <table:table-cell table:style-name="ce64" office:value-type="string" calcext:value-type="string">
            <text:p>Validar que cuando se ingrese al modulo se muestre una tabla con el listado de todos los radicados que se encuentran archivados y que pueden ser solicitados para préstamo, esta tabla debe mostrar las columnas "Número de radicado", "Fecha", "Asunto", "Tipo documental", "Expediente", "Área de archivo", "Módulo", "Entrepaño", "Caja" y "Est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9-03</text:p>
          </table:table-cell>
          <table:table-cell table:style-name="ce64" office:value-type="string" calcext:value-type="string">
            <text:p>Validar que cuando se ingrese al modulo se muestre un botón de “FILTROS” en la parte superior y en la parte inferior se muestren los botones “CSV”, “EXCEL”, “PDF” y “IMPRIMI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9-04</text:p>
          </table:table-cell>
          <table:table-cell table:style-name="ce64" office:value-type="string" calcext:value-type="string">
            <text:p>Validar que cuando se de clic en el botón “FILTROS” se despliegue una ventana nueva donde se muestren los campos “Numero Radicado”, “Nombre Expediente”, “Dependencia”, “Estado”, "Asunto", "Tipo documental" y rangos de fechas, adicional de mostrar una lista desplegable indicando la cantidad de registros a mostrar</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9-05</text:p>
          </table:table-cell>
          <table:table-cell table:style-name="ce64"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9-06</text:p>
          </table:table-cell>
          <table:table-cell table:style-name="ce64" office:value-type="string" calcext:value-type="string">
            <text:p>Validar que cuando se de clic en alguno de los botones de “CSV”, “EXCEL”, “PDF” y “IMPRIMIR” el sistema descargue o genere el correspondiente archiv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9-07</text:p>
          </table:table-cell>
          <table:table-cell table:style-name="ce64" office:value-type="string" calcext:value-type="string">
            <text:p>Validar que al seleccionar un expediente y se de clic en el botón dinámico de color naranja que se muestra en la parte inferior, se muestre la opción de "Solicitud préstamo", <text:s/>y dar clic en dicha opción el sistema despliegue una ventana nueva donde se solite información relacionada al tipo préstamo, requerimiento y observación</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9-08</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59-09</text:p>
          </table:table-cell>
          <table:table-cell table:style-name="ce64" office:value-type="string" calcext:value-type="string">
            <text:p>Validar que al diligenciar toda la información que solicitan en el proceso anterior, el sistema muestre un mensaje de confirmación "registro almacenado correctamente" adicional de cambiar el estado del expediente a "Archivado - Solicitud de Préstam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60 – Préstamos documentales - Administrar préstamo</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50">
          <table:table-cell table:style-name="ce6" office:value-type="string" calcext:value-type="string">
            <text:p>CP60-01</text:p>
          </table:table-cell>
          <table:table-cell table:style-name="ce64" office:value-type="string" calcext:value-type="string">
            <text:p>Validar que cuando se de clic en la opción de préstamos Documentales la opción de Administrar préstamos, esto debe ser valido siempre y cuando el usuario tenga el permiso asignado</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solicitar prestado un expediente</text:p>
            <text:p>2. Se ingresa al modulo de préstamos Documentales - Préstamo de expedientes</text:p>
          </table:table-cell>
          <table:table-cell table:style-name="ce64"/>
          <table:table-cell table:style-name="ce4"/>
          <table:table-cell table:number-columns-repeated="16378"/>
        </table:table-row>
        <table:table-row table:style-name="ro80">
          <table:table-cell table:style-name="ce6" office:value-type="string" calcext:value-type="string">
            <text:p>CP60-02</text:p>
          </table:table-cell>
          <table:table-cell table:style-name="ce64" office:value-type="string" calcext:value-type="string">
            <text:p>Validar que cuando se ingrese al modulo se muestre una tabla con el listado de todos los radicados que se encuentran en solicitud de préstamo, esta tabla debe mostrar las columnas "Número de radicado", "Asunto", "Tipo documental", "Expediente", "Tipo préstamo", "Requerimiento", "Fecha solicitud préstamo", "Área de archivo", "Módulo", "Entrepaño", "Caja", "Usuario", "Dependencia" y "Estado"</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solicitar prestado un expediente</text:p>
            <text:p>2. Se ingresa al modulo de préstamos Documentales - Administrar préstamo</text:p>
            <text:p>3. Se valida que cuando se ingresa a esta opción el sistema muestra los radicados que han sido solicitados ser prestado por los diferentes usuarios del sistema</text:p>
            <text:p>4. Se valida que las columnas que se indican se deben mostrar si se muestran de forma correcta</text:p>
          </table:table-cell>
          <table:table-cell table:style-name="ce64"/>
          <table:table-cell table:style-name="ce4"/>
          <table:table-cell table:number-columns-repeated="16378"/>
        </table:table-row>
        <table:table-row table:style-name="ro81">
          <table:table-cell table:style-name="ce6" office:value-type="string" calcext:value-type="string">
            <text:p>CP60-03</text:p>
          </table:table-cell>
          <table:table-cell table:style-name="ce64" office:value-type="string" calcext:value-type="string">
            <text:p>Validar que cuando se ingrese al modulo se muestre un botón de “FILTROS” en la parte superior y en la parte inferior se muestren los botones “CSV”, “EXCEL”, “PDF” y “IMPRIMIR”</text:p>
          </table:table-cell>
          <table:table-cell table:style-name="ce6" office:value-type="string" calcext:value-type="string">
            <text:p>ok</text:p>
          </table:table-cell>
          <table:table-cell table:style-name="ce8" office:value-type="string" calcext:value-type="string">
            <text:p>1. Se evidencia que si se muestran las opciones del botón de filtro y la opción de descargar los diferentes extensiones</text:p>
          </table:table-cell>
          <table:table-cell table:style-name="ce64"/>
          <table:table-cell table:style-name="ce4"/>
          <table:table-cell table:number-columns-repeated="16378"/>
        </table:table-row>
        <table:table-row table:style-name="ro82">
          <table:table-cell table:style-name="ce6" office:value-type="string" calcext:value-type="string">
            <text:p>CP60-04</text:p>
          </table:table-cell>
          <table:table-cell table:style-name="ce33" office:value-type="string" calcext:value-type="string">
            <text:p>Validar que cuando se de clic en el botón “FILTROS” se despliegue una ventana nueva donde se muestren los campos "Número de radicado", "Asunto", "Tipo documental", "Expediente", "Tipo préstamo", "Dependencia", "Usuario", “Estado”, y rangos de fechas, adicional de mostrar una lista desplegable indicando la cantidad de registros a mostrar</text:p>
          </table:table-cell>
          <table:table-cell table:style-name="ce6" office:value-type="string" calcext:value-type="string">
            <text:p>ok</text:p>
          </table:table-cell>
          <table:table-cell table:style-name="ce106" office:value-type="string" calcext:value-type="string" table:number-columns-spanned="1" table:number-rows-spanned="2">
            <text:p>1. Se ingresa con el usuario admin el cual es el usuario que va a realizar el proceso de solicitar prestado un radicado</text:p>
            <text:p>2. Se ingresa al modulo de préstamos Documentales - Administrar préstamo</text:p>
            <text:p>3. Se da clic en la opción filtros y se realiza la búsqueda por rango de fechas desde el mes de julio al mes de agosto obteniendo como resultado XX registros</text:p>
            <text:p>4. Se ingresa como criterio de búsqueda el campo numero de radicado XXXXXXXXXX y rango de fechas desde el mes de julio al mes de agosto, obteniendo XX registros</text:p>
            <text:p/>
          </table:table-cell>
          <table:table-cell table:style-name="ce64"/>
          <table:table-cell table:style-name="ce4"/>
          <table:table-cell table:number-columns-repeated="16378"/>
        </table:table-row>
        <table:table-row table:style-name="ro48">
          <table:table-cell table:style-name="ce6" office:value-type="string" calcext:value-type="string">
            <text:p>CP60-05</text:p>
          </table:table-cell>
          <table:table-cell table:style-name="ce37"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36">
          <table:table-cell table:style-name="ce6" office:value-type="string" calcext:value-type="string">
            <text:p>CP60-06</text:p>
          </table:table-cell>
          <table:table-cell table:style-name="ce37" office:value-type="string" calcext:value-type="string">
            <text:p>Validar que cuando se de clic en alguno de los botones de “CSV”, “EXCEL”, “PDF” y “IMPRIMIR” el sistema descargue o genere el correspondiente archivo</text:p>
          </table:table-cell>
          <table:table-cell table:style-name="ce6" office:value-type="string" calcext:value-type="string">
            <text:p>ok</text:p>
          </table:table-cell>
          <table:table-cell table:style-name="ce8" office:value-type="string" calcext:value-type="string">
            <text:p>1. Luego de realizar el proceso del item anterior, se da clic en las opciones de descarga CSV</text:p>
            <text:p>2. El sistema descarga el archivo con el nombre Listado de radicados.csv</text:p>
            <text:p>3. Se da clic en las opciones de descarga EXCEL y el sistema descarga archivo Listado de radicados.xlsx</text:p>
            <text:p>4. Se da clic en las opciones de descarga PDF y el sistema descarga archivo Listado de radicados.pdf</text:p>
            <text:p>5. Se muestran las columnas Número de radicado, Asunto, Tipo documental, Expediente, Tipo préstamo, Requerimiento, Fecha solicitud préstamo, Área de archivo, Módulo, Entrepaño, Caja Usuario, Dependencia y Estado</text:p>
          </table:table-cell>
          <table:table-cell table:style-name="ce64"/>
          <table:table-cell table:style-name="ce4"/>
          <table:table-cell table:number-columns-repeated="16378"/>
        </table:table-row>
        <table:table-row table:style-name="ro7">
          <table:table-cell table:style-name="ce6" office:value-type="string" calcext:value-type="string">
            <text:p>CP60-07</text:p>
          </table:table-cell>
          <table:table-cell table:style-name="ce64" office:value-type="string" calcext:value-type="string">
            <text:p>Validar que al seleccionar un expediente en estado "Solicitud de Préstamo" y se de clic en el botón dinámico de color naranja que se muestra en la parte inferior, se muestren las opciones "Historial", "Rechazar solicitud" y "Aprobar Solicitud"</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60">
          <table:table-cell table:style-name="ce6" office:value-type="string" calcext:value-type="string">
            <text:p>CP60-08</text:p>
          </table:table-cell>
          <table:table-cell table:style-name="ce64" office:value-type="string" calcext:value-type="string">
            <text:p>Validar que al seleccionar un expediente en estado "Solicitud de préstamo" y se de clic en el botón dinámico de color naranja y luego dar clic en la opción de "Historial", el sistema despliegue un formulario donde se muestre el historial del préstamo que se ha realizado en el expediente seleccionado, este histórico debe mostrar la fecha, hora, usuario, dependencia y observación sobre la solicitud de préstamo realiz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83">
          <table:table-cell table:style-name="ce6" office:value-type="string" calcext:value-type="string">
            <text:p>CP60-09</text:p>
          </table:table-cell>
          <table:table-cell table:style-name="ce64" office:value-type="string" calcext:value-type="string">
            <text:p>Validar que al seleccionar un expediente en estado "Solicitud de préstamo" y se de clic en el botón dinámico de color naranja y luego dar clic en la opción de "Aprobar Solicitud", el sistema despliegue un formulario donde se solicite fecha en la que se debe devolver el préstamo, una observación del préstamo y la contraseña del solicitante.</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84">
          <table:table-cell table:style-name="ce6" office:value-type="string" calcext:value-type="string">
            <text:p>CP60-10</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solicitar prestado un expediente</text:p>
            <text:p>2. Se ingresa al modulo de préstamos Documentales - Administrar préstamo</text:p>
            <text:p>3. Se debe seleccionar un registro asociado al expediente que se va a solicitar prestado</text:p>
            <text:p>4. Se da clic en el botón dinámico a la opción “Solicitud Préstamo” dar clic en la opción de enviar sin diligenciar información</text:p>
            <text:p>5. Se valida que efectivamente los campos sino se diligencian se muestra el mensaje</text:p>
          </table:table-cell>
          <table:table-cell table:style-name="ce64"/>
          <table:table-cell table:style-name="ce4"/>
          <table:table-cell table:number-columns-repeated="16378"/>
        </table:table-row>
        <table:table-row table:style-name="ro7">
          <table:table-cell table:style-name="ce6" office:value-type="string" calcext:value-type="string">
            <text:p>CP60-11</text:p>
          </table:table-cell>
          <table:table-cell table:style-name="ce64" office:value-type="string" calcext:value-type="string">
            <text:p>Validar que cuando se ingrese la contraseña del solicitante y esta se encuentre errada se muestre mensaje indicando el error para que asi se proceda a corregir la contraseña y se pueda guardar el registro del préstamos realiz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60-12</text:p>
          </table:table-cell>
          <table:table-cell table:style-name="ce64" office:value-type="string" calcext:value-type="string">
            <text:p>Validar que al diligenciar toda la información que se solicita y se de clic en guardar, se muestre un mensaje de confirmación indicando que se hizo el proceso correctamente y de forma adicional validar que se muestre en el histórico del préstamo asociado al expediente</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60-13</text:p>
          </table:table-cell>
          <table:table-cell table:style-name="ce64" office:value-type="string" calcext:value-type="string">
            <text:p>Validar que al seleccionar un expediente en estado "préstamo Aprobado" y se de clic en el botón dinámico de color naranja y luego dar clic en la opción de "Devolver Solicitud", el sistema despliegue un formulario donde se solicite ingresar una observación del estado en el que se devolvió el préstamo adicional de solicitar la contraseña del usuario solicitante.</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85">
          <table:table-cell table:style-name="ce6" office:value-type="string" calcext:value-type="string">
            <text:p>CP60-14</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solicitar prestado un expediente</text:p>
            <text:p>2. Se ingresa al modulo de préstamos Documentales - Administrar préstamo</text:p>
            <text:p>3. Se debe seleccionar un registro asociado al expediente que se va a solicitar prestado</text:p>
            <text:p>4. Se da clic en el botón dinámico a la opción “Solicitud Préstamo” dar clic en la opción de enviar sin diligenciar información</text:p>
            <text:p>5. Se valida que efectivamente los campos sino se diligencian se muestra el mensaje</text:p>
          </table:table-cell>
          <table:table-cell table:style-name="ce64"/>
          <table:table-cell table:style-name="ce4"/>
          <table:table-cell table:number-columns-repeated="16378"/>
        </table:table-row>
        <table:table-row table:style-name="ro7">
          <table:table-cell table:style-name="ce6" office:value-type="string" calcext:value-type="string">
            <text:p>CP60-15</text:p>
          </table:table-cell>
          <table:table-cell table:style-name="ce64" office:value-type="string" calcext:value-type="string">
            <text:p>Validar que cuando se ingrese la contraseña del solicitante y esta se encuentre errada se muestre mensaje indicando el error para que asi se proceda a corregir la contraseña y se pueda guardar el registro del préstamos realizado</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7">
          <table:table-cell table:style-name="ce6" office:value-type="string" calcext:value-type="string">
            <text:p>CP60-16</text:p>
          </table:table-cell>
          <table:table-cell table:style-name="ce64" office:value-type="string" calcext:value-type="string">
            <text:p>Validar que al diligenciar toda la información que se solicita y se de clic en guardar, se muestre un mensaje de confirmación indicando que se hizo el proceso correctamente y de forma adicional validar que se muestre en el histórico del préstamo asociado al expediente</text:p>
          </table:table-cell>
          <table:table-cell table:style-name="ce6" office:value-type="string" calcext:value-type="string">
            <text:p>ok</text:p>
          </table:table-cell>
          <table:table-cell table:style-name="ce16"/>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61 – Préstamos documentales - Préstamo de expedientes</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46">
          <table:table-cell table:style-name="ce6" office:value-type="string" calcext:value-type="string">
            <text:p>CP61-01</text:p>
          </table:table-cell>
          <table:table-cell table:style-name="ce64" office:value-type="string" calcext:value-type="string">
            <text:p>Validar que cuando se de clic en la opción de préstamos Documentales la opción de préstamos de Expediente, esto debe ser valido siempre y cuando el usuario tenga el permiso asignado</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solicitar prestado un expediente</text:p>
            <text:p>2. Se ingresa al modulo de préstamos Documentales - Préstamo de expedientes</text:p>
          </table:table-cell>
          <table:table-cell table:style-name="ce64"/>
          <table:table-cell table:style-name="ce4"/>
          <table:table-cell table:number-columns-repeated="16378"/>
        </table:table-row>
        <table:table-row table:style-name="ro86">
          <table:table-cell table:style-name="ce6" office:value-type="string" calcext:value-type="string">
            <text:p>CP61-02</text:p>
          </table:table-cell>
          <table:table-cell table:style-name="ce64" office:value-type="string" calcext:value-type="string">
            <text:p>Validar que cuando se ingrese al modulo se muestre una tabla con el listado de todos los expedientes que se encuentran archivados y que pueden ser solicitados para préstamo, esta tabla debe mostrar las columnas "Número expediente", "Nombre expediente", "Dependencia responsable", "Usuario responsable", "Bodega", "Estante", "Entrepaño", "Caja" y "Estado</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solicitar prestado un expediente</text:p>
            <text:p>2. Se ingresa al modulo de préstamos Documentales - Préstamo de expedientes</text:p>
            <text:p>3. Se valida que cuando se ingresa a esta opción el sistema muestra los expedientes que están disponibles para ser solicitados para prestar</text:p>
            <text:p>4. Se valida que las columnas que se indican se deben mostrar si se muestran de forma correcta</text:p>
          </table:table-cell>
          <table:table-cell table:style-name="ce64"/>
          <table:table-cell table:style-name="ce4"/>
          <table:table-cell table:number-columns-repeated="16378"/>
        </table:table-row>
        <table:table-row table:style-name="ro87">
          <table:table-cell table:style-name="ce6" office:value-type="string" calcext:value-type="string">
            <text:p>CP61-03</text:p>
          </table:table-cell>
          <table:table-cell table:style-name="ce64" office:value-type="string" calcext:value-type="string">
            <text:p>Validar que cuando se ingrese al modulo se muestre un botón de “FILTROS” en la parte superior y en la parte inferior se muestren los botones “CSV”, “EXCEL”, “PDF” y “IMPRIMIR”</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solicitar prestado un expediente</text:p>
            <text:p>2. Se ingresa al modulo de préstamos Documentales - Préstamo de expedientes</text:p>
            <text:p>3. Se da clic a la opción de FILTROS, y se busca por el número del expediente 20240099905022 y se muestran resultados</text:p>
          </table:table-cell>
          <table:table-cell table:style-name="ce64"/>
          <table:table-cell table:style-name="ce4"/>
          <table:table-cell table:number-columns-repeated="16378"/>
        </table:table-row>
        <table:table-row table:style-name="ro2">
          <table:table-cell table:style-name="ce6" office:value-type="string" calcext:value-type="string">
            <text:p>CP61-04</text:p>
          </table:table-cell>
          <table:table-cell table:style-name="ce64" office:value-type="string" calcext:value-type="string">
            <text:p>Validar que cuando se de clic en el botón “FILTROS” se despliegue una ventana nueva donde se muestren los campos “Numero Expediente”, “Nombre Expediente”, “Dependencia”, “Estado”, y rangos de fechas, adicional de mostrar una lista desplegable indicando la cantidad de registros a mostrar</text:p>
          </table:table-cell>
          <table:table-cell table:style-name="ce6" office:value-type="string" calcext:value-type="string">
            <text:p>ok</text:p>
          </table:table-cell>
          <table:table-cell table:style-name="ce90" office:value-type="string" calcext:value-type="string" table:number-columns-spanned="1" table:number-rows-spanned="2">
            <text:p>1. Se ingresa con el usuario admin el cual es el usuario que va a realizar el proceso de solicitar prestado un expediente</text:p>
            <text:p>2. Se ingresa al modulo de préstamos Documentales - Préstamo de expedientes</text:p>
            <text:p>3. Se da clic a la opción de FILTROS, y se busca por el número del expediente 20240099905022 y se muestran resultados</text:p>
            <text:p>4. Se da clic a la opción de FILTROS y se busca por rango de fechas del mes de julio al mes de agosto y se muestran resultados</text:p>
            <text:p>5. Se da clic a la opción de FILTROS y se busca por el estado del expediente y se encuentra resultados</text:p>
          </table:table-cell>
          <table:table-cell table:style-name="ce64"/>
          <table:table-cell table:style-name="ce4"/>
          <table:table-cell table:number-columns-repeated="16378"/>
        </table:table-row>
        <table:table-row table:style-name="ro88">
          <table:table-cell table:style-name="ce6" office:value-type="string" calcext:value-type="string">
            <text:p>CP61-05</text:p>
          </table:table-cell>
          <table:table-cell table:style-name="ce64"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67">
          <table:table-cell table:style-name="ce6" office:value-type="string" calcext:value-type="string">
            <text:p>CP61-06</text:p>
          </table:table-cell>
          <table:table-cell table:style-name="ce64" office:value-type="string" calcext:value-type="string">
            <text:p>Validar que cuando se de clic en alguno de los botones de “CSV”, “EXCEL”, “PDF” y “IMPRIMIR” el sistema descargue o genere el correspondiente archivo</text:p>
          </table:table-cell>
          <table:table-cell table:style-name="ce6" office:value-type="string" calcext:value-type="string">
            <text:p>ok</text:p>
          </table:table-cell>
          <table:table-cell table:style-name="ce8" office:value-type="string" calcext:value-type="string">
            <text:p>1. Luego de realizar el proceso del item anterior, se da clic en las opciones de descarga CSV</text:p>
            <text:p>2. El sistema descarga el archivo con el nombre Listado de expedientes.csv</text:p>
            <text:p>3. Se da clic en las opciones de descarga EXCEL y el sistema descarga archivo Listado de expedientes.xlsx</text:p>
            <text:p>4. Se da clic en las opciones de descarga PDF y el sistema descarga archivo Listado de expedientes.pdf</text:p>
          </table:table-cell>
          <table:table-cell table:style-name="ce64"/>
          <table:table-cell table:style-name="ce4"/>
          <table:table-cell table:number-columns-repeated="16378"/>
        </table:table-row>
        <table:table-row table:style-name="ro89">
          <table:table-cell table:style-name="ce6" office:value-type="string" calcext:value-type="string">
            <text:p>CP61-07</text:p>
          </table:table-cell>
          <table:table-cell table:style-name="ce64" office:value-type="string" calcext:value-type="string">
            <text:p>Validar que al seleccionar un expediente y se de clic en el botón dinámico de color naranja que se muestra en la parte inferior, se muestre la opción de "Solicitud préstamo", <text:s/>y dar clic en dicha opción el sistema despliegue una ventana nueva donde se solicite información relacionada al tipo préstamo, requerimiento y observación</text:p>
          </table:table-cell>
          <table:table-cell table:style-name="ce6" office:value-type="string" calcext:value-type="string">
            <text:p>ok</text:p>
          </table:table-cell>
          <table:table-cell table:style-name="ce90" office:value-type="string" calcext:value-type="string" table:number-columns-spanned="1" table:number-rows-spanned="2">
            <text:p>1. Se ingresa con el usuario admin el cual es el usuario que va a realizar el proceso de solicitar prestado un expediente</text:p>
            <text:p>2. Se ingresa al modulo de préstamos Documentales - Préstamo de expedientes</text:p>
            <text:p>3. Se debe seleccionar un registro asociado al expediente que se va a solicitar prestado</text:p>
            <text:p>4. Se da clic en el botón dinámico a la opción Solicitud Préstamo” y se despliega un formulario donde se solicita ingresar la información asociada al préstamo</text:p>
            <text:p>5. Seleccionar el tipo de préstamo, luego seleccionar el requerimiento y por ultimo la observación</text:p>
            <text:p>6. Se da clic en el botón de enviar para procesar la información</text:p>
          </table:table-cell>
          <table:table-cell table:style-name="ce64"/>
          <table:table-cell table:style-name="ce4"/>
          <table:table-cell table:number-columns-repeated="16378"/>
        </table:table-row>
        <table:table-row table:style-name="ro7">
          <table:table-cell table:style-name="ce6" office:value-type="string" calcext:value-type="string">
            <text:p>CP61-08</text:p>
          </table:table-cell>
          <table:table-cell table:style-name="ce64" office:value-type="string" calcext:value-type="string">
            <text:p>Validar que al diligenciar toda la información que solicitan en el proceso anterior, el sistema muestre un mensaje de confirmación "registro almacenado correctamente" adicional de cambiar el estado del expediente a "Archivado - Solicitud de Préstam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90">
          <table:table-cell table:style-name="ce6" office:value-type="string" calcext:value-type="string">
            <text:p>CP61-09</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solicitar prestado un expediente</text:p>
            <text:p>2. Se ingresa al modulo de préstamos Documentales - Préstamo de expedientes</text:p>
            <text:p>3. Se debe seleccionar un registro asociado al expediente que se va a solicitar prestado</text:p>
            <text:p>4. Se da clic en el botón dinámico a la opción Solicitud Préstamo” dar clic en la opción de enviar sin diligenciar información</text:p>
            <text:p>5. Se valida que efectivamente los campos sino se diligencian se muestra el mensaje</text:p>
          </table:table-cell>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62 – Préstamos documentales - Administrar préstamo de expedientes</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91">
          <table:table-cell table:style-name="ce6" office:value-type="string" calcext:value-type="string">
            <text:p>CP62-01</text:p>
          </table:table-cell>
          <table:table-cell table:style-name="ce64" office:value-type="string" calcext:value-type="string">
            <text:p>Validar que cuando se de clic en la opción de préstamos Documentales la opción de Administrar préstamos de Expediente, esto debe ser valido siempre y cuando el usuario tenga el permiso asignado</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solicitar prestado un expediente</text:p>
            <text:p>2. Se ingresa al modulo de préstamos Documentales – Administrar préstamos de Expediente</text:p>
          </table:table-cell>
          <table:table-cell table:style-name="ce64"/>
          <table:table-cell table:style-name="ce4"/>
          <table:table-cell table:number-columns-repeated="16378"/>
        </table:table-row>
        <table:table-row table:style-name="ro72">
          <table:table-cell table:style-name="ce6" office:value-type="string" calcext:value-type="string">
            <text:p>CP62-02</text:p>
          </table:table-cell>
          <table:table-cell table:style-name="ce64" office:value-type="string" calcext:value-type="string">
            <text:p>Validar que cuando se ingrese al modulo se muestre una tabla con el listado de todos los expedientes que se encuentran en solicitud de préstamo, esta tabla debe mostrar las columnas "Número expediente", "Nombre expediente", "Dependencia responsable", "Tipo de préstamo", "Fecha solicitud préstamo", "Requerimiento", "Bodega", "Estante", "Entrepaño", "Caja", "Usuario que solicita" y "Estado"</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solicitar prestado un expediente</text:p>
            <text:p>2. Se ingresa al modulo de préstamos Documentales – Administrar préstamos de Expediente</text:p>
            <text:p>3. Se valida que se muestren los expedientes que fueron solicitados para ser prestados, los cuales se deben encontrar en estado “solicitud de Préstamo”</text:p>
            <text:p>4. Se valida que se muestran las columnas que se mencionan en el expediente</text:p>
          </table:table-cell>
          <table:table-cell table:style-name="ce64"/>
          <table:table-cell table:style-name="ce4"/>
          <table:table-cell table:number-columns-repeated="16378"/>
        </table:table-row>
        <table:table-row table:style-name="ro92">
          <table:table-cell table:style-name="ce6" office:value-type="string" calcext:value-type="string">
            <text:p>CP62-03</text:p>
          </table:table-cell>
          <table:table-cell table:style-name="ce64" office:value-type="string" calcext:value-type="string">
            <text:p>Validar que cuando se ingrese al modulo se muestre un botón de “FILTROS” en la parte superior y en la parte inferior se muestren los botones “CSV”, “EXCEL”, “PDF” y “IMPRIMIR”</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solicitar prestado un expediente</text:p>
            <text:p>2. Se ingresa al modulo de préstamos Documentales – Administrar préstamos de Expediente</text:p>
            <text:p>3. Se valida que se muestren los expedientes que fueron solicitados para ser prestados, los cuales se deben encontrar en estado “solicitud de Préstamo”</text:p>
            <text:p>4. Se valida que se muestran las opciones de FILTROS y botones de exportación en los diferentes tipos de archivos solicitados</text:p>
          </table:table-cell>
          <table:table-cell table:style-name="ce64"/>
          <table:table-cell table:style-name="ce4"/>
          <table:table-cell table:number-columns-repeated="16378"/>
        </table:table-row>
        <table:table-row table:style-name="ro93">
          <table:table-cell table:style-name="ce6" office:value-type="string" calcext:value-type="string">
            <text:p>CP62-04</text:p>
          </table:table-cell>
          <table:table-cell table:style-name="ce33" office:value-type="string" calcext:value-type="string">
            <text:p>Validar que cuando se de clic en el botón “FILTROS” se despliegue una ventana nueva donde se muestren los campos “Numero Expediente”, “Nombre Expediente”, “Dependencia”, “Estado”, y rangos de fechas, adicional de mostrar una lista desplegable indicando la cantidad de registros a mostrar</text:p>
          </table:table-cell>
          <table:table-cell table:style-name="ce34" office:value-type="string" calcext:value-type="string">
            <text:p>ok</text:p>
          </table:table-cell>
          <table:table-cell table:style-name="ce8" office:value-type="string" calcext:value-type="string">
            <text:p>1. Se ingresa con el usuario admin el cual es el usuario que va a realizar el proceso de solicitar prestado un expediente</text:p>
            <text:p>2. Se ingresa al modulo de préstamos Documentales – Administrar préstamos de Expediente</text:p>
            <text:p>3. Se valida que se muestren los expedientes que fueron solicitados para ser prestados, los cuales se deben encontrar en estado “solicitud de Préstamo”</text:p>
            <text:p>4. Se valida que se muestran las opciones de FILTROS y botones de exportación en los diferentes tipos de archivos solicitados</text:p>
            <text:p>5. Se da clic en el botón de filtros y se realiza la búsqueda por número de expediente 20240099905022 y muestra resultados</text:p>
          </table:table-cell>
          <table:table-cell table:style-name="ce36"/>
          <table:table-cell table:style-name="ce10" table:number-columns-repeated="22"/>
          <table:table-cell table:number-columns-repeated="16357"/>
        </table:table-row>
        <table:table-row table:style-name="ro94">
          <table:table-cell table:style-name="ce6" office:value-type="string" calcext:value-type="string">
            <text:p>CP62-05</text:p>
          </table:table-cell>
          <table:table-cell table:style-name="ce37"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38" office:value-type="string" calcext:value-type="string">
            <text:p>ok</text:p>
          </table:table-cell>
          <table:table-cell table:style-name="ce110" office:value-type="string" calcext:value-type="string">
            <text:p>1. Se ingresa con el usuario admin el cual es el usuario que va a realizar el proceso de solicitar prestado un expediente</text:p>
            <text:p>2. Se ingresa al modulo de préstamos Documentales – Administrar préstamos de Expediente</text:p>
            <text:p>3. Se valida que se muestren los expedientes que fueron solicitados para ser prestados, los cuales se deben encontrar en estado “solicitud de Préstamo”</text:p>
            <text:p>4. Se valida que se muestran las opciones de FILTROS y botones de exportación en los diferentes tipos de archivos solicitados</text:p>
            <text:p>5. Se da clic en el botón de filtros y se realiza la búsqueda por número de expediente 20240099905022 y muestra resultados</text:p>
            <text:p>6. Se realiza búsqueda por rango de fechas desde el mes de julio al mes de agosto y el sistema muestra los resultados correspondientes</text:p>
          </table:table-cell>
          <table:table-cell table:style-name="ce40"/>
          <table:table-cell table:style-name="ce10" table:number-columns-repeated="22"/>
          <table:table-cell table:number-columns-repeated="16357"/>
        </table:table-row>
        <table:table-row table:style-name="ro67">
          <table:table-cell table:style-name="ce6" office:value-type="string" calcext:value-type="string">
            <text:p>CP62-06</text:p>
          </table:table-cell>
          <table:table-cell table:style-name="ce37" office:value-type="string" calcext:value-type="string">
            <text:p>Validar que cuando se de clic en alguno de los botones de “CSV”, “EXCEL”, “PDF” y “IMPRIMIR” el sistema descargue o genere el correspondiente archivo</text:p>
          </table:table-cell>
          <table:table-cell table:style-name="ce38" office:value-type="string" calcext:value-type="string">
            <text:p>ok</text:p>
          </table:table-cell>
          <table:table-cell table:style-name="ce8" office:value-type="string" calcext:value-type="string">
            <text:p>1. Luego de realizar el proceso del item anterior, se da clic en las opciones de descarga CSV</text:p>
            <text:p>2. El sistema descarga el archivo con el nombre Listado préstamos de expedientes.csv</text:p>
            <text:p>3. Se da clic en las opciones de descarga EXCEL y el sistema descarga archivo Listado préstamos de expedientes.xlsx</text:p>
            <text:p>4. Se da clic en las opciones de descarga PDF y el sistema descarga archivo Listado préstamos de expedientes.pdf</text:p>
          </table:table-cell>
          <table:table-cell table:style-name="ce40"/>
          <table:table-cell table:style-name="ce10" table:number-columns-repeated="22"/>
          <table:table-cell table:number-columns-repeated="16357"/>
        </table:table-row>
        <table:table-row table:style-name="ro95">
          <table:table-cell table:style-name="ce6" office:value-type="string" calcext:value-type="string">
            <text:p>CP62-07</text:p>
          </table:table-cell>
          <table:table-cell table:style-name="ce64" office:value-type="string" calcext:value-type="string">
            <text:p>Validar que al seleccionar un expediente en estado "Solicirud de Préstamo" y se de clic en el botón dinámico de color naranja que se muestra en la parte inferior, se muestren las opciones "Historial", "Rechazar solicitud" y "Aprobar Solicitud"</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solicitar prestado un expediente</text:p>
            <text:p>2. Se ingresa al modulo de préstamos Documentales – Administrar préstamos de Expediente</text:p>
            <text:p>3. Se valida que se muestren los expedientes que fueron solicitados para ser prestados, los cuales se deben encontrar en estado “solicitud de Préstamo”</text:p>
            <text:p>4. Seleccionar uno de los expedientes que se muestran en este estado, en el botón dinámico se debe mostrar las opciones Historial Rechazar solicitud o Aprobar solicitud</text:p>
          </table:table-cell>
          <table:table-cell table:style-name="ce64"/>
          <table:table-cell table:style-name="ce4"/>
          <table:table-cell table:number-columns-repeated="16378"/>
        </table:table-row>
        <table:table-row table:style-name="ro96">
          <table:table-cell table:style-name="ce6" office:value-type="string" calcext:value-type="string">
            <text:p>CP62-08</text:p>
          </table:table-cell>
          <table:table-cell table:style-name="ce64" office:value-type="string" calcext:value-type="string">
            <text:p>Validar que al seleccionar un expediente en estado "Solicitud de préstamo" y se de clic en el botón dinámico de color naranja y luego dar clic en la opción de "Historial", el sistema despliegue un formulario donde se muestre el historial del préstamo que se ha realizado en el expediente seleccionado, este histórico debe mostrar la fecha, hora, usuario, dependencia y observación sobre la solicitud de préstamo realizado</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solicitar prestado un expediente</text:p>
            <text:p>2. Se ingresa al modulo de préstamos Documentales – Administrar préstamos de Expediente</text:p>
            <text:p>3. Se valida que se muestren los expedientes que fueron solicitados para ser prestados, los cuales se deben encontrar en estado “solicitud de Préstamo”</text:p>
            <text:p>4. Seleccionar uno de los expedientes que se muestran en este estado</text:p>
            <text:p>5. Se da clic en la opción de histórico al hacer este proceso se despliega una vista donde se observa cada uno de los registros asociados a cada préstamo</text:p>
          </table:table-cell>
          <table:table-cell table:style-name="ce64"/>
          <table:table-cell table:style-name="ce4"/>
          <table:table-cell table:number-columns-repeated="16378"/>
        </table:table-row>
        <table:table-row table:style-name="ro97">
          <table:table-cell table:style-name="ce6" office:value-type="string" calcext:value-type="string">
            <text:p>CP62-09</text:p>
          </table:table-cell>
          <table:table-cell table:style-name="ce64" office:value-type="string" calcext:value-type="string">
            <text:p>Validar que al seleccionar un expediente en estado "Solicitud de préstamo" y se de clic en el botón dinámico de color naranja y luego dar clic en la opción de "Aprobar Solicitud", el sistema despliegue un formulario donde se solicite fecha en la que se debe devolver el préstamo, una observación del préstamo y la contraseña del solicitante.</text:p>
          </table:table-cell>
          <table:table-cell table:style-name="ce6" office:value-type="string" calcext:value-type="string">
            <text:p>ok</text:p>
          </table:table-cell>
          <table:table-cell table:style-name="ce90" office:value-type="string" calcext:value-type="string" table:number-columns-spanned="1" table:number-rows-spanned="2">
            <text:p>1. Se ingresa con el usuario admin el cual es el usuario que va a realizar el proceso de solicitar prestado un expediente</text:p>
            <text:p>2. Se ingresa al modulo de préstamos Documentales – Administrar préstamos de Expediente</text:p>
            <text:p>3. Se valida que se muestren los expedientes que fueron solicitados para ser prestados, los cuales se deben encontrar en estado “solicitud de Préstamo”</text:p>
            <text:p>4. Seleccionar uno de los expedientes que se muestran en este estado</text:p>
            <text:p>5. Se da clic en la opción de Aprobar solicitud, y se valida que se despliega una nueva ventana donde se debe ingresar los datos de la aprobación</text:p>
            <text:p>6. Se debe diligenciar cada uno de los campos que se solicitan en el formulario, donde se pide ingresar fecha de devolución, justificación del préstamo y la contraseña del usuario que hizo la solicitud.</text:p>
          </table:table-cell>
          <table:table-cell table:style-name="ce64"/>
          <table:table-cell table:style-name="ce4"/>
          <table:table-cell table:number-columns-repeated="16378"/>
        </table:table-row>
        <table:table-row table:style-name="ro98">
          <table:table-cell table:style-name="ce6" office:value-type="string" calcext:value-type="string">
            <text:p>CP62-10</text:p>
          </table:table-cell>
          <table:table-cell table:style-name="ce64" office:value-type="string" calcext:value-type="string">
            <text:p>Validar que cuando se ingrese la contraseña del solicitante y esta se encuentre errada se muestre mensaje indicando el error para que asi se proceda a corregir la contraseña y se pueda guardar el registro del préstamos realizad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36">
          <table:table-cell table:style-name="ce6" office:value-type="string" calcext:value-type="string">
            <text:p>CP62-11</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solicitar prestado un expediente</text:p>
            <text:p>2. Se ingresa al modulo de préstamos Documentales – Administrar préstamos de Expediente</text:p>
            <text:p>3. Se valida que se muestren los expedientes que fueron solicitados para ser prestados, los cuales se deben encontrar en estado “solicitud de Préstamo”</text:p>
            <text:p>4. Seleccionar uno de los expedientes que se muestran en este estado</text:p>
            <text:p>5. Se da clic en el botón guardar sin diligenciar información para lo cual el sistema muestra el mensaje de error sobre los campos obligatorios</text:p>
          </table:table-cell>
          <table:table-cell table:style-name="ce64"/>
          <table:table-cell table:style-name="ce4"/>
          <table:table-cell table:number-columns-repeated="16378"/>
        </table:table-row>
        <table:table-row table:style-name="ro96">
          <table:table-cell table:style-name="ce6" office:value-type="string" calcext:value-type="string">
            <text:p>CP62-12</text:p>
          </table:table-cell>
          <table:table-cell table:style-name="ce64" office:value-type="string" calcext:value-type="string">
            <text:p>Validar que al diligenciar toda la información que se solicita y se de clic en guardar, se muestre un mensaje de confirmación indicando que se hizo el proceso correctamente y de forma adicional validar que se muestre en el histórico del préstamo asociado al expediente</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solicitar prestado un expediente</text:p>
            <text:p>2. Se ingresa al modulo de préstamos Documentales – Administrar préstamos de Expediente</text:p>
            <text:p>3. Se valida que se muestren los expedientes que fueron solicitados para ser prestados, los cuales se deben encontrar en estado “solicitud de Préstamo”</text:p>
            <text:p>4. Seleccionar uno de los expedientes que se muestran en este estado</text:p>
            <text:p>5. Se da clic en la opción de histórico al hacer este proceso se despliega una vista donde se observa cada uno de los registros asociados a cada préstamo</text:p>
          </table:table-cell>
          <table:table-cell table:style-name="ce64"/>
          <table:table-cell table:style-name="ce4"/>
          <table:table-cell table:number-columns-repeated="16378"/>
        </table:table-row>
        <table:table-row table:style-name="ro99">
          <table:table-cell table:style-name="ce6" office:value-type="string" calcext:value-type="string">
            <text:p>CP62-13</text:p>
          </table:table-cell>
          <table:table-cell table:style-name="ce64" office:value-type="string" calcext:value-type="string">
            <text:p>Validar que al seleccionar un expediente en estado "préstamo Aprobado" y se de clic en el botón dinámico de color naranja y luego dar clic en la opción de "Devolver Solicitud", el sistema despliegue un formulario donde se solicite ingresar una observación del estado en el que se devolvió el préstamo adicional de solicitar la contraseña del usuario solicitante.</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solicitar prestado un expediente</text:p>
            <text:p>2. Se ingresa al modulo de préstamos Documentales – Administrar préstamos de Expediente</text:p>
            <text:p>3. Se valida que se muestren los expedientes que fueron solicitados para ser prestados, los cuales se deben encontrar en estado “Préstamo Aprobado”</text:p>
            <text:p>4. Seleccionar uno de los expedientes que se muestran en este estado</text:p>
            <text:p>5. Se da clic en la opción de Devolver solicitud, y se valida que se despliega una nueva ventana donde se debe ingresar los datos de la devolución</text:p>
            <text:p>6. Se debe diligenciar cada uno de los campos que se solicitan en el formulario, donde se pide ingresar justificación del préstamo y la contraseña del usuario que hizo la solicitud.</text:p>
          </table:table-cell>
          <table:table-cell table:style-name="ce64"/>
          <table:table-cell table:style-name="ce4"/>
          <table:table-cell table:number-columns-repeated="16378"/>
        </table:table-row>
        <table:table-row table:style-name="ro100">
          <table:table-cell table:style-name="ce6" office:value-type="string" calcext:value-type="string">
            <text:p>CP62-14</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solicitar prestado un expediente</text:p>
            <text:p>2. Se ingresa al modulo de préstamos Documentales – Administrar préstamos de Expediente</text:p>
            <text:p>3. Se valida que se muestren los expedientes que fueron solicitados para ser prestados, los cuales se deben encontrar en estado “Préstamo Aprobado”</text:p>
            <text:p>4. Seleccionar uno de los expedientes que se muestran en este estado</text:p>
            <text:p>5. Se da clic en el botón guardar sin diligenciar información para lo cual el sistema muestra el mensaje de error sobre los campos obligatorios</text:p>
          </table:table-cell>
          <table:table-cell table:style-name="ce64"/>
          <table:table-cell table:style-name="ce4"/>
          <table:table-cell table:number-columns-repeated="16378"/>
        </table:table-row>
        <table:table-row table:style-name="ro101">
          <table:table-cell table:style-name="ce6" office:value-type="string" calcext:value-type="string">
            <text:p>CP62-15</text:p>
          </table:table-cell>
          <table:table-cell table:style-name="ce64" office:value-type="string" calcext:value-type="string">
            <text:p>Validar que cuando se ingrese la contraseña del solicitante y esta se encuentre errada se muestre mensaje indicando el error para que así se proceda a corregir la contraseña y se pueda guardar el registro del préstamos realizado</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solicitar prestado un expediente</text:p>
            <text:p>2. Se ingresa al modulo de préstamos Documentales – Administrar préstamos de Expediente</text:p>
            <text:p>3. Se valida que en cada una de las solicitudes de usuario y contraseña para confirmar préstamo o devolver préstamo, se ingresa información incorrecta se muestre el mensaje</text:p>
          </table:table-cell>
          <table:table-cell table:style-name="ce64"/>
          <table:table-cell table:style-name="ce4"/>
          <table:table-cell table:number-columns-repeated="16378"/>
        </table:table-row>
        <table:table-row table:style-name="ro100">
          <table:table-cell table:style-name="ce6" office:value-type="string" calcext:value-type="string">
            <text:p>CP62-16</text:p>
          </table:table-cell>
          <table:table-cell table:style-name="ce64" office:value-type="string" calcext:value-type="string">
            <text:p>Validar que al diligenciar toda la información que se solicita y se de clic en guardar, se muestre un mensaje de confirmación indicando que se hizo el proceso correctamente y de forma adicional validar que se muestre en el histórico del préstamo asociado al expediente</text:p>
          </table:table-cell>
          <table:table-cell table:style-name="ce6" office:value-type="string" calcext:value-type="string">
            <text:p>ok</text:p>
          </table:table-cell>
          <table:table-cell table:style-name="ce8" office:value-type="string" calcext:value-type="string">
            <text:p>1. Se ingresa con el usuario admin el cual es el usuario que va a realizar el proceso de solicitar prestado un expediente</text:p>
            <text:p>2. Se ingresa al modulo de préstamos Documentales – Administrar préstamos de Expediente</text:p>
            <text:p>3. Se valida que se muestren los expedientes que fueron solicitados para ser prestados, los cuales se deben encontrar en estado “solicitud de Préstamo”</text:p>
            <text:p>4. Seleccionar uno de los expedientes que se muestran en este estado</text:p>
            <text:p>5. Se da clic en la opción de histórico al hacer este proceso se despliega una vista donde se observa cada uno de los registros asociados a cada préstamo</text:p>
          </table:table-cell>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63 – Reportes - Reportes</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6" office:value-type="string" calcext:value-type="string">
            <text:p>CP63-01</text:p>
          </table:table-cell>
          <table:table-cell table:style-name="ce64" office:value-type="string" calcext:value-type="string">
            <text:p>Validar que si el usuario tiene el permiso de este modulo, se muestre en el menu lateral y al dar clic se liste todos los reportes que se pueden realizar en el sistema, permitiendo seleccionar alguno de estos y traera los correspondientes resultados</text:p>
          </table:table-cell>
          <table:table-cell table:style-name="ce6" office:value-type="string" calcext:value-type="string">
            <text:p>ok</text:p>
          </table:table-cell>
          <table:table-cell table:style-name="ce8" office:value-type="string" calcext:value-type="string">
            <text:p>1. Se ingresa con el usuarios admin el cual tiene el permiso de reportes</text:p>
            <text:p>2. Se valida que en el menú se muestra la opción de reportes</text:p>
          </table:table-cell>
          <table:table-cell table:style-name="ce64"/>
          <table:table-cell table:style-name="ce4"/>
          <table:table-cell table:number-columns-repeated="16378"/>
        </table:table-row>
        <table:table-row table:style-name="ro102">
          <table:table-cell table:style-name="ce6" office:value-type="string" calcext:value-type="string">
            <text:p>CP63-02</text:p>
          </table:table-cell>
          <table:table-cell table:style-name="ce64" office:value-type="string" calcext:value-type="string">
            <text:p>Validar que al seleccionar el reporte “Reporte de Productividad” y se de clic en el botón generar se muestre como resultado cada una de las actividades que se ha realizado en el radicado, permitiendo ver las columnas “Número de radicado”, ”Fecha radicado”, “Fecha vencimiento”, ”Remitente/Destinatario”, ”Dependencia tramitadora”, ”Usuario tramitador”, ”Dependencia creador”, ”Usuario creador”, ”Tipo radicado”, ”Tipo documental”, “Medio de recepción” y ”Estado”</text:p>
          </table:table-cell>
          <table:table-cell table:style-name="ce6" office:value-type="string" calcext:value-type="string">
            <text:p>ok</text:p>
          </table:table-cell>
          <table:table-cell table:style-name="ce8" office:value-type="string" calcext:value-type="string">
            <text:p>1. Se ingresa al modulo de reportes – reportes</text:p>
            <text:p>2. En el listado de reportes se selecciona el primer reporte el cual esta relacionado a reporte de productividad</text:p>
            <text:p>3. Se dio clic en el botón general y se sistema arrojo el reporte con los campos que se indican</text:p>
          </table:table-cell>
          <table:table-cell table:style-name="ce64"/>
          <table:table-cell table:style-name="ce4"/>
          <table:table-cell table:number-columns-repeated="16378"/>
        </table:table-row>
        <table:table-row table:style-name="ro7">
          <table:table-cell table:style-name="ce6" office:value-type="string" calcext:value-type="string">
            <text:p>CP63-03</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8" office:value-type="string" calcext:value-type="string">
            <text:p>1. Se evidencia que si se muestran las opciones del botón de filtro y la opción de descargar los diferentes extensiones</text:p>
          </table:table-cell>
          <table:table-cell table:style-name="ce64"/>
          <table:table-cell table:style-name="ce4"/>
          <table:table-cell table:number-columns-repeated="16378"/>
        </table:table-row>
        <table:table-row table:style-name="ro103">
          <table:table-cell table:style-name="ce6" office:value-type="string" calcext:value-type="string">
            <text:p>CP63-04</text:p>
          </table:table-cell>
          <table:table-cell table:style-name="ce64" office:value-type="string" calcext:value-type="string">
            <text:p>Validar que al dar clic en el botón “FILTROS” se despliegue una series de campos que pueden ser utilizados para filtrar la información que se esta mostrando, se debe validar que todos los filtros funcionen de forma correcta, importante probar los campos de fechas para poder filtrar por rango de fechas.</text:p>
          </table:table-cell>
          <table:table-cell table:style-name="ce6" office:value-type="string" calcext:value-type="string">
            <text:p>ok</text:p>
          </table:table-cell>
          <table:table-cell table:style-name="ce8" office:value-type="string" calcext:value-type="string">
            <text:p>1. Se ingresa con el usuarios admin el cual tiene el permiso de reportes</text:p>
            <text:p>2. Se valida que en el menú se muestra la opción de reportes</text:p>
            <text:p>3. Se da clic en el botón de Filtros, y se ingresa un rango de fechas desde el mes de julio al mes de agosto y se buscan sin limite de registros</text:p>
            <text:p>4. Se da clic en el botón azul de procesar</text:p>
            <text:p>5. Se obtuvo como resultados 842 registros pero el sistema limita la cantidad que se muestra es 20 registros pero al descargar sale la totalidad</text:p>
            <text:p>6. Se realiza filtro desde el mes de julio al mes de agosto, por tipo de radicado SAF</text:p>
            <text:p>7. Se obtuvo como resultado 103 registros en total, pero el sistema limita la cantidad que se muestra es 20 registros pero al descargar sale la totalidad</text:p>
          </table:table-cell>
          <table:table-cell table:style-name="ce64"/>
          <table:table-cell table:style-name="ce4"/>
          <table:table-cell table:number-columns-repeated="16378"/>
        </table:table-row>
        <table:table-row table:style-name="ro104">
          <table:table-cell table:style-name="ce6" office:value-type="string" calcext:value-type="string">
            <text:p>CP63-05</text:p>
          </table:table-cell>
          <table:table-cell table:style-name="ce64" office:value-type="string" calcext:value-type="string">
            <text:p>Validar que al dar clic en alguna de las opciones de descarga el sistema genere el correspondiente archivo en la extensión escogida, se debe validar cada una de las opciones, y ese archivo debe contener la misma información que se muestra en las columnas</text:p>
          </table:table-cell>
          <table:table-cell table:style-name="ce6" office:value-type="string" calcext:value-type="string">
            <text:p>ok</text:p>
          </table:table-cell>
          <table:table-cell table:style-name="ce8" office:value-type="string" calcext:value-type="string">
            <text:p>1. se da clic en la opción de EXCEL que se muestra en la parte inferior, al hacer este proceso se descarga un archivo con el nombre productividad.xlsx</text:p>
            <text:p>2. Se da clic en la opción de CSV que se muestra en la parte inferior, al hacer este proceso se descarga un archivo con el nombre productividad.csv</text:p>
            <text:p>3. Se da clic en la opción de PDF que se muestra en la parte inferior, al hacer este proceso se descarga un archivo con el nombre productividad.pdf</text:p>
            <text:p>4. se valida que se muestran las columnas Tipo radicado, Tipo documental, Medio de Recepción, Estado, Traslado Competencia, Permiso radicado</text:p>
          </table:table-cell>
          <table:table-cell table:style-name="ce64"/>
          <table:table-cell table:style-name="ce4"/>
          <table:table-cell table:number-columns-repeated="16378"/>
        </table:table-row>
        <table:table-row table:style-name="ro29">
          <table:table-cell table:style-name="ce6" office:value-type="string" calcext:value-type="string">
            <text:p>CP63-06</text:p>
          </table:table-cell>
          <table:table-cell table:style-name="ce64" office:value-type="string" calcext:value-type="string">
            <text:p>Validar que al seleccionar el reporte “Reporte de Distribución de Correspondencia” y se de clic en el botón generar se muestre como resultado todos los radicados que han sido enviados por el modulo de gestión de correspondencia, permitiendo ver las columnas "Tipo radicado", "Número de radicado", "Asunto", "Proveedor de envíos", "Fecha radicado", "Fecha envío", "Fecha de entrega", "Fecha devolución", "Número de guía", "Motivo de devolución", "Estado"</text:p>
          </table:table-cell>
          <table:table-cell table:style-name="ce6" office:value-type="string" calcext:value-type="string">
            <text:p>ok</text:p>
          </table:table-cell>
          <table:table-cell table:style-name="ce8" office:value-type="string" calcext:value-type="string">
            <text:p>1. Se ingreso al modulo de reportes – reportes</text:p>
            <text:p>2. En el listado de reportes se selecciona el reporte de distribución de correspondencia</text:p>
            <text:p>3. Se da clic en el botón generar</text:p>
            <text:p>4. Se obtuvo un listado de los envío físicos que se han realizado, mostrando las columnas indicadas</text:p>
          </table:table-cell>
          <table:table-cell table:style-name="ce64"/>
          <table:table-cell table:style-name="ce4"/>
          <table:table-cell table:number-columns-repeated="16378"/>
        </table:table-row>
        <table:table-row table:style-name="ro7">
          <table:table-cell table:style-name="ce6" office:value-type="string" calcext:value-type="string">
            <text:p>CP63-07</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8" office:value-type="string" calcext:value-type="string">
            <text:p>1. Se evidencia que si se muestran las opciones del botón de filtro y la opción de descargar los diferentes extensiones</text:p>
          </table:table-cell>
          <table:table-cell table:style-name="ce64"/>
          <table:table-cell table:style-name="ce4"/>
          <table:table-cell table:number-columns-repeated="16378"/>
        </table:table-row>
        <table:table-row table:style-name="ro105">
          <table:table-cell table:style-name="ce6" office:value-type="string" calcext:value-type="string">
            <text:p>CP63-08</text:p>
          </table:table-cell>
          <table:table-cell table:style-name="ce64" office:value-type="string" calcext:value-type="string">
            <text:p>Validar que al dar clic en el botón “FILTROS” se despliegue una series de campos que pueden ser utilizados para filtrar la información que se esta mostrando, se debe validar que todos los filtros funcionen de forma correcta, importante probar los campos de fechas para poder filtrar por rango de fechas.</text:p>
          </table:table-cell>
          <table:table-cell table:style-name="ce6" office:value-type="string" calcext:value-type="string">
            <text:p>ok</text:p>
          </table:table-cell>
          <table:table-cell table:style-name="ce8" office:value-type="string" calcext:value-type="string">
            <text:p>1. Se ingresa con el usuarios admin el cual tiene el permiso de reportes</text:p>
            <text:p>2. Se valida que en el menú se muestra la opción de reportes</text:p>
            <text:p>3. Se da clic en el botón de Filtros, y se ingresa un rango de fechas desde el mes de julio al mes de agosto y se buscan sin limite de registros</text:p>
            <text:p>4. Se da clic en el botón azul de procesar</text:p>
            <text:p>5. Se obtuvo como resultados 2 registros</text:p>
            <text:p>6. Se realiza filtro desde el mes de julio al mes de agosto, por tipo de radicado PQRS</text:p>
            <text:p>7. Se obtuvo como resultado 1 registros en total</text:p>
          </table:table-cell>
          <table:table-cell table:style-name="ce64"/>
          <table:table-cell table:style-name="ce4"/>
          <table:table-cell table:number-columns-repeated="16378"/>
        </table:table-row>
        <table:table-row table:style-name="ro106">
          <table:table-cell table:style-name="ce6" office:value-type="string" calcext:value-type="string">
            <text:p>CP63-09</text:p>
          </table:table-cell>
          <table:table-cell table:style-name="ce64" office:value-type="string" calcext:value-type="string">
            <text:p>Validar que al dar clic en alguna de las opciones de descarga el sistema genere el correspondiente archivo en la extensión escogida, se debe validar cada una de las opciones, y ese archivo debe contener la misma información que se muestra en las columnas</text:p>
          </table:table-cell>
          <table:table-cell table:style-name="ce6" office:value-type="string" calcext:value-type="string">
            <text:p>ok</text:p>
          </table:table-cell>
          <table:table-cell table:style-name="ce8" office:value-type="string" calcext:value-type="string">
            <text:p>1. se da clic en la opción de EXCEL que se muestra en la parte inferior, al hacer este proceso se descarga un archivo con el nombre distribucionCorrespondencia.xlsx</text:p>
            <text:p>2. Se da clic en la opción de CSV que se muestra en la parte inferior, al hacer este proceso se descarga un archivo con el nombre distribucionCorrespondencia.csv</text:p>
            <text:p>3. Se da clic en la opción de PDF que se muestra en la parte inferior, al hacer este proceso se descarga un archivo con el nombre distribucionCorrespondencia.pdf</text:p>
          </table:table-cell>
          <table:table-cell table:style-name="ce64" office:value-type="string" calcext:value-type="string">
            <text:p>No abre el archivo dice que esta dañado</text:p>
          </table:table-cell>
          <table:table-cell table:style-name="ce4"/>
          <table:table-cell table:number-columns-repeated="16378"/>
        </table:table-row>
        <table:table-row table:style-name="ro80">
          <table:table-cell table:style-name="ce6" office:value-type="string" calcext:value-type="string">
            <text:p>CP63-10</text:p>
          </table:table-cell>
          <table:table-cell table:style-name="ce64" office:value-type="string" calcext:value-type="string">
            <text:p>Validar que al seleccionar el reporte “Reporte de Radicados de PQRSD” y se de clic en el botón generar se muestre como resultado todos los radicados de pqrs que se ha registrado en el sistema orfeo tanto por pagina web o por orfeo, permitiendo ver las columnas "Número de radicado", "Fecha radicado", "Fecha vencimiento", "Asunto", "Remitente/Destinatario", "Dependencia tramitadora", "Usuario tramitador", "Tipo documental", "Transacción", "Días transcurridos"</text:p>
          </table:table-cell>
          <table:table-cell table:style-name="ce6" office:value-type="string" calcext:value-type="string">
            <text:p>ok</text:p>
          </table:table-cell>
          <table:table-cell table:style-name="ce8" office:value-type="string" calcext:value-type="string">
            <text:p>1. Se ingreso al modulo de reportes – reportes</text:p>
            <text:p>2. En el listado de reportes se selecciona el Reporte de Radicados de PQRSD</text:p>
            <text:p>3. Se da clic en el botón generar</text:p>
            <text:p>4. No hay resultados</text:p>
          </table:table-cell>
          <table:table-cell table:style-name="ce8" office:value-type="string" calcext:value-type="string">
            <text:p>"name": "PHP Warning",</text:p>
            <text:p>"message": "Attempt to read property \"idCgClasificacionPqrs\" on null",</text:p>
            <text:p>"code": 2,</text:p>
            <text:p>"type": "yii\\base\\ErrorException",</text:p>
            <text:p>"file": "/dk1/www/html/pruebas/ng_backend/api/modules/version1/controllers/ReportesController.php",</text:p>
            <text:p>"line": 1336,</text:p>
          </table:table-cell>
          <table:table-cell table:style-name="ce4"/>
          <table:table-cell table:number-columns-repeated="16378"/>
        </table:table-row>
        <table:table-row table:style-name="ro7">
          <table:table-cell table:style-name="ce6" office:value-type="string" calcext:value-type="string">
            <text:p>CP63-11</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8" office:value-type="string" calcext:value-type="string">
            <text:p>1. Se evidencia que si se muestran las opciones del botón de filtro y la opción de descargar los diferentes extensiones</text:p>
          </table:table-cell>
          <table:table-cell table:style-name="ce64"/>
          <table:table-cell table:style-name="ce4"/>
          <table:table-cell table:number-columns-repeated="16378"/>
        </table:table-row>
        <table:table-row table:style-name="ro56">
          <table:table-cell table:style-name="ce6" office:value-type="string" calcext:value-type="string">
            <text:p>CP63-12</text:p>
          </table:table-cell>
          <table:table-cell table:style-name="ce64" office:value-type="string" calcext:value-type="string">
            <text:p>Validar que al dar clic en el botón “FILTROS” se despliegue una series de campos que pueden ser utilizados para filtrar la información que se esta mostrando, se debe validar que todos los filtros funcionen de forma correcta, importante probar los campos de fechas para poder filtrar por rango de fechas.</text:p>
          </table:table-cell>
          <table:table-cell table:style-name="ce6" office:value-type="string" calcext:value-type="string">
            <text:p>ok</text:p>
          </table:table-cell>
          <table:table-cell table:style-name="ce8" office:value-type="string" calcext:value-type="string">
            <text:p>1. Se ingresa con el usuarios admin el cual tiene el permiso de reportes</text:p>
            <text:p>2. Se valida que en el menú se muestra la opción de reportes</text:p>
            <text:p>3. Se da clic en el botón de Filtros, y se ingresa un rango de fechas desde el mes de julio al mes de agosto y se buscan sin limite de registros</text:p>
            <text:p>4. Se da clic en el botón azul de procesar</text:p>
            <text:p>5. No hay registros</text:p>
          </table:table-cell>
          <table:table-cell table:style-name="ce64" office:value-type="string" calcext:value-type="string">
            <text:p>se repara el filtro para que a base de la dependencia se asigne los usuarios</text:p>
          </table:table-cell>
          <table:table-cell table:style-name="ce4"/>
          <table:table-cell table:number-columns-repeated="16378"/>
        </table:table-row>
        <table:table-row table:style-name="ro107">
          <table:table-cell table:style-name="ce6" office:value-type="string" calcext:value-type="string">
            <text:p>CP63-13</text:p>
          </table:table-cell>
          <table:table-cell table:style-name="ce64" office:value-type="string" calcext:value-type="string">
            <text:p>Validar que al dar clic en alguna de las opciones de descarga el sistema genere el correspondiente archivo en la extensión escogida, se debe validar cada una de las opciones, y ese archivo debe contener la misma información que se muestra en las columnas</text:p>
          </table:table-cell>
          <table:table-cell table:style-name="ce6" office:value-type="string" calcext:value-type="string">
            <text:p>ok</text:p>
          </table:table-cell>
          <table:table-cell table:style-name="ce8" office:value-type="string" calcext:value-type="string">
            <text:p>No hay registros no se habilita la descargar ningún registro</text:p>
          </table:table-cell>
          <table:table-cell table:style-name="ce64" office:value-type="string" calcext:value-type="string">
            <text:p>se realiza una validacion en los dtTitles y a descarga normalmente</text:p>
          </table:table-cell>
          <table:table-cell table:style-name="ce4"/>
          <table:table-cell table:number-columns-repeated="16378"/>
        </table:table-row>
        <table:table-row table:style-name="ro102">
          <table:table-cell table:style-name="ce6" office:value-type="string" calcext:value-type="string">
            <text:p>CP63-14</text:p>
          </table:table-cell>
          <table:table-cell table:style-name="ce64" office:value-type="string" calcext:value-type="string">
            <text:p>Validar que al seleccionar el reporte “Reporte de Expedientes Electrónicos” y se de clic en el botón generar se muestre como resultado todos los expedientes que se han creado en el sistema por dependencia, permitiendo ver las columnas "Nº Expediente", "Serie", "Subserie", "Fecha proceso", "Dependencia creador", "Usuario creador", "Número de radicado", "Tipo documental"</text:p>
          </table:table-cell>
          <table:table-cell table:style-name="ce6" office:value-type="string" calcext:value-type="string">
            <text:p>ok</text:p>
          </table:table-cell>
          <table:table-cell table:style-name="ce8" office:value-type="string" calcext:value-type="string">
            <text:p>1. Se ingresa al modulo de reportes – reportes</text:p>
            <text:p>2. En el listado de reportes se selecciona el Reporte de Expedientes Electrónicos</text:p>
            <text:p>3. Se dio clic en el botón general y se sistema arrojo el reporte con los campos que se indican</text:p>
          </table:table-cell>
          <table:table-cell table:style-name="ce64"/>
          <table:table-cell table:style-name="ce4"/>
          <table:table-cell table:number-columns-repeated="16378"/>
        </table:table-row>
        <table:table-row table:style-name="ro7">
          <table:table-cell table:style-name="ce6" office:value-type="string" calcext:value-type="string">
            <text:p>CP63-15</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8" office:value-type="string" calcext:value-type="string">
            <text:p>1. Se evidencia que si se muestran las opciones del botón de filtro y la opción de descargar los diferentes extensiones</text:p>
          </table:table-cell>
          <table:table-cell table:style-name="ce64"/>
          <table:table-cell table:style-name="ce4"/>
          <table:table-cell table:number-columns-repeated="16378"/>
        </table:table-row>
        <table:table-row table:style-name="ro108">
          <table:table-cell table:style-name="ce6" office:value-type="string" calcext:value-type="string">
            <text:p>CP63-16</text:p>
          </table:table-cell>
          <table:table-cell table:style-name="ce64" office:value-type="string" calcext:value-type="string">
            <text:p>Validar que al dar clic en el botón “FILTROS” se despliegue una series de campos que pueden ser utilizados para filtrar la información que se esta mostrando, se debe validar que todos los filtros funcionen de forma correcta, importante probar los campos de fechas para poder filtrar por rango de fechas.</text:p>
          </table:table-cell>
          <table:table-cell table:style-name="ce6" office:value-type="string" calcext:value-type="string">
            <text:p>ok</text:p>
          </table:table-cell>
          <table:table-cell table:style-name="ce8" office:value-type="string" calcext:value-type="string">
            <text:p>1. Se ingresa al modulo de reportes – reportes</text:p>
            <text:p>2. En el listado de reportes se selecciona el Reporte de Expedientes Electrónicos</text:p>
            <text:p>3. Se da clic en el botón de Filtros, y se ingresa un rango de fechas desde el mes de julio al mes de agosto y se buscan sin limite de registros</text:p>
            <text:p>4. Se da clic en el botón azul de procesar</text:p>
            <text:p>5. Se obtuvo como resultados 17 registros</text:p>
            <text:p>6. Se realiza filtro desde el mes de julio al mes de agosto, se selecciona serie documental circulares</text:p>
            <text:p>7. Se obtuvo como resultado 4 registros en total</text:p>
          </table:table-cell>
          <table:table-cell table:style-name="ce64"/>
          <table:table-cell table:style-name="ce4"/>
          <table:table-cell table:number-columns-repeated="16378"/>
        </table:table-row>
        <table:table-row table:style-name="ro109">
          <table:table-cell table:style-name="ce6" office:value-type="string" calcext:value-type="string">
            <text:p>CP63-17</text:p>
          </table:table-cell>
          <table:table-cell table:style-name="ce64" office:value-type="string" calcext:value-type="string">
            <text:p>Validar que al dar clic en alguna de las opciones de descarga el sistema genere el correspondiente archivo en la extensión escogida, se debe validar cada una de las opciones, y ese archivo debe contener la misma información que se muestra en las columnas</text:p>
          </table:table-cell>
          <table:table-cell table:style-name="ce6" office:value-type="string" calcext:value-type="string">
            <text:p>ok</text:p>
          </table:table-cell>
          <table:table-cell table:style-name="ce8" office:value-type="string" calcext:value-type="string">
            <text:p>1. se da clic en la opción de EXCEL que se muestra en la parte inferior, al hacer este proceso se descarga un archivo con el nombre expedientesElectronicos.xlsx</text:p>
            <text:p>2. Se da clic en la opción de CSV que se muestra en la parte inferior, al hacer este proceso se descarga un archivo con el nombre expedientesElectronicos.csv</text:p>
            <text:p>3. Se da clic en la opción de PDF que se muestra en la parte inferior, al hacer este proceso se descarga un archivo con el nombre expedientesElectronicos.pdf</text:p>
          </table:table-cell>
          <table:table-cell table:style-name="ce64" office:value-type="string" calcext:value-type="string">
            <text:p>No abre el archivo dice que esta dañado</text:p>
          </table:table-cell>
          <table:table-cell table:style-name="ce4"/>
          <table:table-cell table:number-columns-repeated="16378"/>
        </table:table-row>
        <table:table-row table:style-name="ro110">
          <table:table-cell table:style-name="ce6" office:value-type="string" calcext:value-type="string">
            <text:p>CP63-18</text:p>
          </table:table-cell>
          <table:table-cell table:style-name="ce64" office:value-type="string" calcext:value-type="string">
            <text:p>Validar que al seleccionar el reporte “Reporte de Préstamos Documentales” y se de clic en el botón generar se muestre como resultado todos los préstamos que se han realizado en el sistema, permitiendo ver las columnas "Número de radicado", "Asunto", "Tipo préstamo", "Fecha solicitud préstamo", "Fecha devolución préstamo", "Fecha aprobación préstamo", "Fecha cancelación préstamo", "Días transcurridos entre fechas", "Dependencia solicitada", "Usuario solicitante"</text:p>
          </table:table-cell>
          <table:table-cell table:style-name="ce6" office:value-type="string" calcext:value-type="string">
            <text:p>ok</text:p>
          </table:table-cell>
          <table:table-cell table:style-name="ce8" office:value-type="string" calcext:value-type="string">
            <text:p>1. Se ingreso al modulo de reportes – reportes</text:p>
            <text:p>2. En el listado de reportes se selecciona el Reporte de Préstamos Documentales</text:p>
            <text:p>3. Se da clic en el botón generar</text:p>
            <text:p>4. Se obtuvo un listado de los prestamos que se han realizado en el sistema asociados a radicados</text:p>
          </table:table-cell>
          <table:table-cell table:style-name="ce64"/>
          <table:table-cell table:style-name="ce4"/>
          <table:table-cell table:number-columns-repeated="16378"/>
        </table:table-row>
        <table:table-row table:style-name="ro111">
          <table:table-cell table:style-name="ce6" office:value-type="string" calcext:value-type="string">
            <text:p>CP63-19</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8" office:value-type="string" calcext:value-type="string">
            <text:p>1. Se evidencia que si se muestran las opciones del botón de filtro y la opción de descargar los diferentes extensiones</text:p>
          </table:table-cell>
          <table:table-cell table:style-name="ce64"/>
          <table:table-cell table:style-name="ce4"/>
          <table:table-cell table:number-columns-repeated="16378"/>
        </table:table-row>
        <table:table-row table:style-name="ro112">
          <table:table-cell table:style-name="ce6" office:value-type="string" calcext:value-type="string">
            <text:p>CP63-20</text:p>
          </table:table-cell>
          <table:table-cell table:style-name="ce64" office:value-type="string" calcext:value-type="string">
            <text:p>Validar que al dar clic en el botón “FILTROS” se despliegue una series de campos que pueden ser utilizados para filtrar la información que se esta mostrando, se debe validar que todos los filtros funcionen de forma correcta, importante probar los campos de fechas para poder filtrar por rango de fechas.</text:p>
          </table:table-cell>
          <table:table-cell table:style-name="ce6" office:value-type="string" calcext:value-type="string">
            <text:p>ok</text:p>
          </table:table-cell>
          <table:table-cell table:style-name="ce8" office:value-type="string" calcext:value-type="string">
            <text:p>1. Se ingresa al modulo de reportes – reportes</text:p>
            <text:p>2. En el listado de reportes se selecciona el Reporte de Expedientes Electrónicos</text:p>
            <text:p>3. Se da clic en el botón de Filtros, y se ingresa un rango de fechas desde el mes de julio al mes de agosto y se buscan sin limite de registros</text:p>
            <text:p>4. Se da clic en el botón azul de procesar</text:p>
            <text:p>5. No se obtuvo registros</text:p>
          </table:table-cell>
          <table:table-cell table:style-name="ce64"/>
          <table:table-cell table:style-name="ce4"/>
          <table:table-cell table:number-columns-repeated="16378"/>
        </table:table-row>
        <table:table-row table:style-name="ro113">
          <table:table-cell table:style-name="ce6" office:value-type="string" calcext:value-type="string">
            <text:p>CP63-21</text:p>
          </table:table-cell>
          <table:table-cell table:style-name="ce64" office:value-type="string" calcext:value-type="string">
            <text:p>Validar que al dar clic en alguna de las opciones de descarga el sistema genere el correspondiente archivo en la extensión escogida, se debe validar cada una de las opciones, y ese archivo debe contener la misma información que se muestra en las columnas</text:p>
          </table:table-cell>
          <table:table-cell table:style-name="ce6" office:value-type="string" calcext:value-type="string">
            <text:p>ok</text:p>
          </table:table-cell>
          <table:table-cell table:style-name="ce8" office:value-type="string" calcext:value-type="string">
            <text:p>No hay registros no se habilita la descargar ningún registro</text:p>
          </table:table-cell>
          <table:table-cell table:style-name="ce64"/>
          <table:table-cell table:style-name="ce4"/>
          <table:table-cell table:number-columns-repeated="16378"/>
        </table:table-row>
        <table:table-row table:style-name="ro114">
          <table:table-cell table:style-name="ce6" office:value-type="string" calcext:value-type="string">
            <text:p>CP63-22</text:p>
          </table:table-cell>
          <table:table-cell table:style-name="ce64" office:value-type="string" calcext:value-type="string">
            <text:p>Validar que al seleccionar el reporte “Reporte de Formulario de Caracterización” y se de clic en el botón generar se muestre como resultado todos los préstamos que se han realizado en el sistema, permitiendo ver las columnas “Cliente”, "Número de radicado", "Tipo radicado", "Fecha radicado", “Asunto”, "Tipo solicitud", "Medio de recepcion", "Dependencia tramitadora", "Usuario tramitador", "Numero de respuesta", "Fecha de respuesta", “Tiempo de respuesta”, “Dependencia responsable”, “Usuario responsable”, “Genero”, “Clasificacion de autoridad”, “Pertenece a grupos de aracterizacion e inclusion”, “Pertenece algun grupo poblacional”, “Rango de edad”, “¿Has sido victima de desplazamiento forzado?” y “¿Has sido victima del conflicto amado?” </text:p>
          </table:table-cell>
          <table:table-cell table:style-name="ce6"/>
          <table:table-cell table:style-name="ce8"/>
          <table:table-cell table:style-name="ce64"/>
          <table:table-cell table:style-name="ce4"/>
          <table:table-cell table:number-columns-repeated="16378"/>
        </table:table-row>
        <table:table-row table:style-name="ro111">
          <table:table-cell table:style-name="ce6" office:value-type="string" calcext:value-type="string">
            <text:p>CP63-23</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8" office:value-type="string" calcext:value-type="string">
            <text:p>1. Se evidencia que si se muestran las opciones del botón de filtro y la opción de descargar los diferentes extensiones</text:p>
          </table:table-cell>
          <table:table-cell table:style-name="ce64"/>
          <table:table-cell table:style-name="ce4"/>
          <table:table-cell table:number-columns-repeated="16378"/>
        </table:table-row>
        <table:table-row table:style-name="ro112">
          <table:table-cell table:style-name="ce6" office:value-type="string" calcext:value-type="string">
            <text:p>CP63-24</text:p>
          </table:table-cell>
          <table:table-cell table:style-name="ce64" office:value-type="string" calcext:value-type="string">
            <text:p>Validar que al dar clic en el botón “FILTROS” se despliegue una series de campos que pueden ser utilizados para filtrar la información que se esta mostrando, se debe validar que todos los filtros funcionen de forma correcta, importante probar los campos de fechas para poder filtrar por rango de fechas.</text:p>
          </table:table-cell>
          <table:table-cell table:style-name="ce6" office:value-type="string" calcext:value-type="string">
            <text:p>ok</text:p>
          </table:table-cell>
          <table:table-cell table:style-name="ce8" office:value-type="string" calcext:value-type="string">
            <text:p>1. Se ingresa al modulo de reportes – reportes</text:p>
            <text:p>2. En el listado de reportes se selecciona el Reporte de Expedientes Electrónicos</text:p>
            <text:p>3. Se da clic en el botón de Filtros, y se ingresa un rango de fechas desde el mes de julio al mes de agosto y se buscan sin limite de registros</text:p>
            <text:p>4. Se da clic en el botón azul de procesar</text:p>
            <text:p>5. No se obtuvo registros</text:p>
          </table:table-cell>
          <table:table-cell table:style-name="ce64"/>
          <table:table-cell table:style-name="ce4"/>
          <table:table-cell table:number-columns-repeated="16378"/>
        </table:table-row>
        <table:table-row table:style-name="ro113">
          <table:table-cell table:style-name="ce6" office:value-type="string" calcext:value-type="string">
            <text:p>CP63-25</text:p>
          </table:table-cell>
          <table:table-cell table:style-name="ce64" office:value-type="string" calcext:value-type="string">
            <text:p>Validar que al dar clic en alguna de las opciones de descarga el sistema genere el correspondiente archivo en la extensión escogida, se debe validar cada una de las opciones, y ese archivo debe contener la misma información que se muestra en las columnas</text:p>
          </table:table-cell>
          <table:table-cell table:style-name="ce6" office:value-type="string" calcext:value-type="string">
            <text:p>ok</text:p>
          </table:table-cell>
          <table:table-cell table:style-name="ce8" office:value-type="string" calcext:value-type="string">
            <text:p>No hay registros no se habilita la descargar ningún registro</text:p>
          </table:table-cell>
          <table:table-cell table:style-name="ce64"/>
          <table:table-cell table:style-name="ce4"/>
          <table:table-cell table:number-columns-repeated="16378"/>
        </table:table-row>
        <table:table-row table:style-name="ro115">
          <table:table-cell table:style-name="ce6" office:value-type="string" calcext:value-type="string">
            <text:p>CP63-26</text:p>
          </table:table-cell>
          <table:table-cell table:style-name="ce64" office:value-type="string" calcext:value-type="string">
            <text:p>Validar que al seleccionar el reporte “Reporte General” y se de clic en el botón generar se muestre como resultado todos los radicados que se han generado en el sistema sin importar el medio en el que se haya hecho, permitiendo ver las columnas "Número de radicado", "Tipo radicado", "Fecha radicado", "Fecha vencimiento", "Asunto", "Tipo documental", "Medio de recepción", "Remitente/Destinatario", "Regional", "Dependencia tramitadora", "Usuario tramitador", "Dependencia creador", "Usuario creador", "Dependencia de informados", "Usuarios informados", "Último estado radicado", "Fecha del Evento"</text:p>
          </table:table-cell>
          <table:table-cell table:style-name="ce6" office:value-type="string" calcext:value-type="string">
            <text:p>ok</text:p>
          </table:table-cell>
          <table:table-cell table:style-name="ce8" office:value-type="string" calcext:value-type="string">
            <text:p>1. Se ingreso al modulo de reportes – reportes</text:p>
            <text:p>2. En el listado de reportes se selecciona el Reporte General</text:p>
            <text:p>3. Se da clic en el botón generar</text:p>
            <text:p>4. Se obtuvo un listado de radicados existentes en el sistema</text:p>
          </table:table-cell>
          <table:table-cell table:style-name="ce64"/>
          <table:table-cell table:style-name="ce4"/>
          <table:table-cell table:number-columns-repeated="16378"/>
        </table:table-row>
        <table:table-row table:style-name="ro111">
          <table:table-cell table:style-name="ce6" office:value-type="string" calcext:value-type="string">
            <text:p>CP63-27</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8" office:value-type="string" calcext:value-type="string">
            <text:p>1. Se evidencia que si se muestran las opciones del botón de filtro y la opción de descargar los diferentes extensiones</text:p>
          </table:table-cell>
          <table:table-cell table:style-name="ce64"/>
          <table:table-cell table:style-name="ce4"/>
          <table:table-cell table:number-columns-repeated="16378"/>
        </table:table-row>
        <table:table-row table:style-name="ro116">
          <table:table-cell table:style-name="ce6" office:value-type="string" calcext:value-type="string">
            <text:p>CP63-28</text:p>
          </table:table-cell>
          <table:table-cell table:style-name="ce64" office:value-type="string" calcext:value-type="string">
            <text:p>Validar que al dar clic en el botón “FILTROS” se despliegue una series de campos que pueden ser utilizados para filtrar la información que se esta mostrando, se debe validar que todos los filtros funcionen de forma correcta, importante probar los campos de fechas para poder filtrar por rango de fechas.</text:p>
          </table:table-cell>
          <table:table-cell table:style-name="ce6" office:value-type="string" calcext:value-type="string">
            <text:p>ok</text:p>
          </table:table-cell>
          <table:table-cell table:style-name="ce8" office:value-type="string" calcext:value-type="string">
            <text:p>1. Se ingresa al modulo de reportes – reportes</text:p>
            <text:p>2. En el listado de reportes se selecciona el Reporte General</text:p>
            <text:p>3. Se da clic en el botón de Filtros, y se ingresa un rango de fechas desde el mes de julio al mes de agosto y se buscan sin limite de registros</text:p>
            <text:p>4. Se da clic en el botón azul de procesar</text:p>
            <text:p>5. Se obtuvo un total de 53 registros pero el sistema limita los registros a 20</text:p>
            <text:p>6. Se habilita botón para descargar los registros</text:p>
          </table:table-cell>
          <table:table-cell table:style-name="ce64"/>
          <table:table-cell table:style-name="ce4"/>
          <table:table-cell table:number-columns-repeated="16378"/>
        </table:table-row>
        <table:table-row table:style-name="ro117">
          <table:table-cell table:style-name="ce6" office:value-type="string" calcext:value-type="string">
            <text:p>CP63-29</text:p>
          </table:table-cell>
          <table:table-cell table:style-name="ce64" office:value-type="string" calcext:value-type="string">
            <text:p>Validar que al dar clic en alguna de las opciones de descarga el sistema genere el correspondiente archivo en la extensión escogida, se debe validar cada una de las opciones, y ese archivo debe contener la misma información que se muestra en las columnas</text:p>
          </table:table-cell>
          <table:table-cell table:style-name="ce6" office:value-type="string" calcext:value-type="string">
            <text:p>ok</text:p>
          </table:table-cell>
          <table:table-cell table:style-name="ce8" office:value-type="string" calcext:value-type="string">
            <text:p>1. se da clic en la opción de EXCEL que se muestra en la parte inferior, al hacer este proceso se descarga un archivo con el nombre general.xlsx</text:p>
            <text:p>2. Se da clic en la opción de CSV que se muestra en la parte inferior, al hacer este proceso se descarga un archivo con el nombre general.csv</text:p>
            <text:p>3. Se da clic en la opción de PDF que se muestra en la parte inferior, al hacer este proceso se descarga un archivo con el nombre general.pdf</text:p>
            <text:p>4. se valida que se muestran las columnas Número radicado, Número de Caso, Tipo radicado, Fecha radicado, Fecha vencimiento, Asunto, Tipo documental, Medio de Recepción, Remitente/Destinatario, Regional, Dependencia Tramitadora, Usuario tramitador, Dependencia creador, Usuario creador, Dependencia de informados, Usuarios informados, Último estado radicado, Traslado Competencia</text:p>
          </table:table-cell>
          <table:table-cell table:style-name="ce64"/>
          <table:table-cell table:style-name="ce4"/>
          <table:table-cell table:number-columns-repeated="16378"/>
        </table:table-row>
        <table:table-row table:style-name="ro102">
          <table:table-cell table:style-name="ce6" office:value-type="string" calcext:value-type="string">
            <text:p>CP63-30</text:p>
          </table:table-cell>
          <table:table-cell table:style-name="ce64" office:value-type="string" calcext:value-type="string">
            <text:p>Validar que al seleccionar el reporte “Reporte Trazabilidad del Radicado” y se de clic en el botón generar se muestre como resultado todas las transacciones que se han realizado con los radicados del sistema, permitiendo ver las columnas "Número de radicado", "Tipo radicado", "Fecha radicado", "Asunto", "Remitente/Destinatario", "Dependencia tramitadora", "Usuario tramitador", "Fecha transacción", "Observación", "Usuario responsable", "Estado transacción"</text:p>
          </table:table-cell>
          <table:table-cell table:style-name="ce6" office:value-type="string" calcext:value-type="string">
            <text:p>ok</text:p>
          </table:table-cell>
          <table:table-cell table:style-name="ce8" office:value-type="string" calcext:value-type="string">
            <text:p>1. Se ingreso al modulo de reportes – reportes</text:p>
            <text:p>2. En el listado de reportes se selecciona el Reporte Trazabilidad del Radicado</text:p>
            <text:p>3. Se da clic en el botón generar</text:p>
            <text:p>4. Se obtuvo un listado de radicados existentes en el sistema</text:p>
          </table:table-cell>
          <table:table-cell table:style-name="ce64" office:value-type="string" calcext:value-type="string">
            <text:p>correcion del modelo mediante la propiedad CgTrasladoCompetencia::idCgEntidadesTrasladoRadicado</text:p>
          </table:table-cell>
          <table:table-cell table:style-name="ce4"/>
          <table:table-cell table:number-columns-repeated="16378"/>
        </table:table-row>
        <table:table-row table:style-name="ro7">
          <table:table-cell table:style-name="ce6" office:value-type="string" calcext:value-type="string">
            <text:p>CP63-31</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8" office:value-type="string" calcext:value-type="string">
            <text:p>1. Se evidencia que si se muestran las opciones del botón de filtro y la opción de descargar los diferentes extensiones</text:p>
          </table:table-cell>
          <table:table-cell table:style-name="ce64"/>
          <table:table-cell table:style-name="ce4"/>
          <table:table-cell table:number-columns-repeated="16378"/>
        </table:table-row>
        <table:table-row table:style-name="ro118">
          <table:table-cell table:style-name="ce6" office:value-type="string" calcext:value-type="string">
            <text:p>CP63-32</text:p>
          </table:table-cell>
          <table:table-cell table:style-name="ce64" office:value-type="string" calcext:value-type="string">
            <text:p>Validar que al dar clic en el botón “FILTROS” se despliegue una series de campos que pueden ser utilizados para filtrar la información que se esta mostrando, se debe validar que todos los filtros funcionen de forma correcta, importante probar los campos de fechas para poder filtrar por rango de fechas.</text:p>
          </table:table-cell>
          <table:table-cell table:style-name="ce6" office:value-type="string" calcext:value-type="string">
            <text:p>ok</text:p>
          </table:table-cell>
          <table:table-cell table:style-name="ce8" office:value-type="string" calcext:value-type="string">
            <text:p>1. Se ingresa al modulo de reportes – reportes</text:p>
            <text:p>2. En el listado de reportes se selecciona el Reporte Trazabilidad del Radicado</text:p>
            <text:p>3. Se da clic en el botón de Filtros, y se ingresa un rango de fechas desde el mes de julio al mes de agosto y se buscan sin limite de registros</text:p>
            <text:p>4. Se da clic en el botón azul de procesar</text:p>
            <text:p>5. Se obtuvo un total de 331 registros pero el sistema limita los registros a 20</text:p>
            <text:p>6. Se realiza otro filtro seleccionando el rango de fechas desde el mes de julio al mes de agosto, se selecciona solo el tipo de radicado Entrada, sin limite de registros …… hay un total de 159 registros con estos filtros</text:p>
            <text:p>6. Se habilita botón para descargar los registros</text:p>
          </table:table-cell>
          <table:table-cell table:style-name="ce64"/>
          <table:table-cell table:style-name="ce4"/>
          <table:table-cell table:number-columns-repeated="16378"/>
        </table:table-row>
        <table:table-row table:style-name="ro119">
          <table:table-cell table:style-name="ce6" office:value-type="string" calcext:value-type="string">
            <text:p>CP63-33</text:p>
          </table:table-cell>
          <table:table-cell table:style-name="ce64" office:value-type="string" calcext:value-type="string">
            <text:p>Validar que al dar clic en alguna de las opciones de descarga el sistema genere el correspondiente archivo en la extensión escogida, se debe validar cada una de las opciones, y ese archivo debe contener la misma información que se muestra en las columnas</text:p>
          </table:table-cell>
          <table:table-cell table:style-name="ce6" office:value-type="string" calcext:value-type="string">
            <text:p>ok</text:p>
          </table:table-cell>
          <table:table-cell table:style-name="ce8" office:value-type="string" calcext:value-type="string">
            <text:p>1. se da clic en la opción de EXCEL que se muestra en la parte inferior, al hacer este proceso se descarga un archivo con el nombre trazabilidadRadicado.xlsx</text:p>
            <text:p>2. Se da clic en la opción de CSV que se muestra en la parte inferior, al hacer este proceso se descarga un archivo con el nombre trazabilidadRadicado.csv</text:p>
            <text:p>3. Se da clic en la opción de PDF que se muestra en la parte inferior, al hacer este proceso se descarga un archivo con el nombre trazabilidadRadicado.pdf</text:p>
            <text:p>4. se valida que se muestran las columnas Número radicado, Número de Caso, Tipo radicado, Fecha radicado, Asunto, Remitente/Destinatario, Dependencia Tramitadora, Usuario tramitador, Fecha transacción, Observación, Usuario Responsable, Estado transacción,Traslado Competencia</text:p>
          </table:table-cell>
          <table:table-cell table:style-name="ce64"/>
          <table:table-cell table:style-name="ce4"/>
          <table:table-cell table:number-columns-repeated="16378"/>
        </table:table-row>
        <table:table-row table:style-name="ro102">
          <table:table-cell table:style-name="ce6" office:value-type="string" calcext:value-type="string">
            <text:p>CP63-34</text:p>
          </table:table-cell>
          <table:table-cell table:style-name="ce64" office:value-type="string" calcext:value-type="string">
            <text:p>Validar que al seleccionar el reporte “Reporte Usuarios” y se de clic en el botón generar se muestre como resultado tdos los radicados que tiene un usuario por dependencia y por tipo de radicado, adicional mostrando cuantos radicados nuevos, con respuesta y vencidos, permitiendo ver las columnas "Dependencia tramitadora", "Usuario tramitador", "Total documentos", "Total por tipo salida", "Total por tipo entrada", "Total por tipo PQRSD", "Total por tipo comunicación interna", "Radicados nuevos", "Radicados con respuesta", "Radicados vencidos"</text:p>
          </table:table-cell>
          <table:table-cell table:style-name="ce6" office:value-type="string" calcext:value-type="string">
            <text:p>ok</text:p>
          </table:table-cell>
          <table:table-cell table:style-name="ce8" office:value-type="string" calcext:value-type="string">
            <text:p>1. Se ingreso al modulo de reportes – reportes</text:p>
            <text:p>2. En el listado de reportes se selecciona el Reporte Usuarios</text:p>
            <text:p>3. Se da clic en el botón generar</text:p>
            <text:p>4. Se obtuvo un listado usuarios del sistema</text:p>
          </table:table-cell>
          <table:table-cell table:style-name="ce64"/>
          <table:table-cell table:style-name="ce4"/>
          <table:table-cell table:number-columns-repeated="16378"/>
        </table:table-row>
        <table:table-row table:style-name="ro48">
          <table:table-cell table:style-name="ce6" office:value-type="string" calcext:value-type="string">
            <text:p>CP63-35</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8" office:value-type="string" calcext:value-type="string">
            <text:p>1. Se evidencia que si se muestran las opciones del botón de filtro y la opción de descargar los diferentes extensiones</text:p>
          </table:table-cell>
          <table:table-cell table:style-name="ce64"/>
          <table:table-cell table:style-name="ce4"/>
          <table:table-cell table:number-columns-repeated="16378"/>
        </table:table-row>
        <table:table-row table:style-name="ro15">
          <table:table-cell table:style-name="ce6" office:value-type="string" calcext:value-type="string">
            <text:p>CP63-36</text:p>
          </table:table-cell>
          <table:table-cell table:style-name="ce64" office:value-type="string" calcext:value-type="string">
            <text:p>Validar que al dar clic en el botón “FILTROS” se despliegue una series de campos que pueden ser utilizados para filtrar la información que se esta mostrando, se debe validar que todos los filtros funcionen de forma correcta, importante probar los campos de fechas para poder filtrar por rango de fechas.</text:p>
          </table:table-cell>
          <table:table-cell table:style-name="ce6" office:value-type="string" calcext:value-type="string">
            <text:p>ok</text:p>
          </table:table-cell>
          <table:table-cell table:style-name="ce8" office:value-type="string" calcext:value-type="string">
            <text:p>1. Se ingresa al modulo de reportes – reportes</text:p>
            <text:p>2. En el listado de reportes se selecciona el Reporte Usuarios activos</text:p>
            <text:p>3. Se da clic en el botón de Filtros, y se ingresa como criterio de búsqueda la dependencia “DEPENDENCIA PRUEBAS SKINATECH” de la cual se quieren ver los usuarios</text:p>
            <text:p>4. Se da clic en el botón azul de procesar</text:p>
            <text:p>5. Se obtuvo un total de 7 registros</text:p>
            <text:p>6. Se habilita botón para descargar los registros</text:p>
          </table:table-cell>
          <table:table-cell table:style-name="ce64"/>
          <table:table-cell table:style-name="ce4"/>
          <table:table-cell table:number-columns-repeated="16378"/>
        </table:table-row>
        <table:table-row table:style-name="ro120">
          <table:table-cell table:style-name="ce6" office:value-type="string" calcext:value-type="string">
            <text:p>CP63-37</text:p>
          </table:table-cell>
          <table:table-cell table:style-name="ce64" office:value-type="string" calcext:value-type="string">
            <text:p>Validar que al dar clic en alguna de las opciones de descarga el sistema genere el correspondiente archivo en la extensión escogida, se debe validar cada una de las opciones, y ese archivo debe contener la misma información que se muestra en las columnas</text:p>
          </table:table-cell>
          <table:table-cell table:style-name="ce6" office:value-type="string" calcext:value-type="string">
            <text:p>ok</text:p>
          </table:table-cell>
          <table:table-cell table:style-name="ce8" office:value-type="string" calcext:value-type="string">
            <text:p>1. se da clic en la opción de EXCEL que se muestra en la parte inferior, al hacer este proceso se descarga un archivo con el nombre usuariosActivos.xlsx</text:p>
            <text:p>2. Se da clic en la opción de CSV que se muestra en la parte inferior, al hacer este proceso se descarga un archivo con el nombre usuariosActivos.csv</text:p>
            <text:p>3. Se da clic en la opción de PDF que se muestra en la parte inferior, al hacer este proceso se descarga un archivo con el nombre usuariosActivos.pdf</text:p>
            <text:p><text:span text:style-name="T3">4. se valida que se muestran las columnas Dependencia,</text:span> <text:span text:style-name="T3">Usuario, Cargo y Perfil</text:span></text:p>
          </table:table-cell>
          <table:table-cell table:style-name="ce64"/>
          <table:table-cell table:style-name="ce4"/>
          <table:table-cell table:number-columns-repeated="16378"/>
        </table:table-row>
        <table:table-row table:style-name="ro121">
          <table:table-cell table:style-name="ce6" office:value-type="string" calcext:value-type="string">
            <text:p>CP63-38</text:p>
          </table:table-cell>
          <table:table-cell table:style-name="ce64" office:value-type="string" calcext:value-type="string">
            <text:p>Validar que al seleccionar el reporte “Reporte de Respuesta de Tiempos de Contestación” y se de clic en el botón generar se muestre como resultado los radicados que existen en el sistema con o sin respuesta y mostrando tiempo promedio, permitiendo ver las columnas "Número de radicado", "Tipo radicado", "Fecha radicado", "Asunto", "Tipo Solicitud", "Clasificación Solicitud", "Remitente/Destinatario", "Medio de recepción", "Dependencia tramitadora", "Usuario tramitador", "Número de respuesta", "Fecha de respuesta", "Tiempo de respuesta", "Dependencia responsable", "Usuario responsable", "Estado Radicado"</text:p>
          </table:table-cell>
          <table:table-cell table:style-name="ce6" office:value-type="string" calcext:value-type="string">
            <text:p>ok</text:p>
          </table:table-cell>
          <table:table-cell table:style-name="ce8" office:value-type="string" calcext:value-type="string">
            <text:p>1. Se ingreso al modulo de reportes – reportes</text:p>
            <text:p>2. En el listado de reportes se selecciona el Reporte de Respuesta de Tiempos de Contestación</text:p>
            <text:p>3. Se da clic en el botón generar</text:p>
            <text:p>4. Se obtuvo un listado de radicados existentes en el sistema</text:p>
          </table:table-cell>
          <table:table-cell table:style-name="ce64" office:value-type="string" calcext:value-type="string">
            <text:p>implementacion de validaciones para variables nulas</text:p>
          </table:table-cell>
          <table:table-cell table:style-name="ce4"/>
          <table:table-cell table:number-columns-repeated="16378"/>
        </table:table-row>
        <table:table-row table:style-name="ro7">
          <table:table-cell table:style-name="ce6" office:value-type="string" calcext:value-type="string">
            <text:p>CP63-39</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8" office:value-type="string" calcext:value-type="string">
            <text:p>1. Se evidencia que si se muestran las opciones del botón de filtro y la opción de descargar los diferentes extensiones</text:p>
          </table:table-cell>
          <table:table-cell table:style-name="ce64"/>
          <table:table-cell table:style-name="ce4"/>
          <table:table-cell table:number-columns-repeated="16378"/>
        </table:table-row>
        <table:table-row table:style-name="ro122">
          <table:table-cell table:style-name="ce6" office:value-type="string" calcext:value-type="string">
            <text:p>CP63-40</text:p>
          </table:table-cell>
          <table:table-cell table:style-name="ce64" office:value-type="string" calcext:value-type="string">
            <text:p>Validar que al dar clic en el botón “FILTROS” se despliegue una series de campos que pueden ser utilizados para filtrar la información que se esta mostrando, se debe validar que todos los filtros funcionen de forma correcta, importante probar los campos de fechas para poder filtrar por rango de fechas.</text:p>
          </table:table-cell>
          <table:table-cell table:style-name="ce6" office:value-type="string" calcext:value-type="string">
            <text:p>ok</text:p>
          </table:table-cell>
          <table:table-cell table:style-name="ce8" office:value-type="string" calcext:value-type="string">
            <text:p>1. Se ingresa al modulo de reportes – reportes</text:p>
            <text:p>2. En el listado de reportes se selecciona el Reporte de Respuesta de Tiempos de Contestación</text:p>
            <text:p>3. Se da clic en el botón de Filtros, y se ingresa un rango de fechas desde el mes de julio al mes de agosto y se buscan sin limite de registros</text:p>
            <text:p>4. Se da clic en el botón azul de procesar</text:p>
            <text:p>5. Se obtuvo un total de 19 registros</text:p>
            <text:p>6. Se realiza otro filtro seleccionando el rango de fechas desde el mes de julio al mes de agosto, se selecciona solo el tipo de radicado PQRS, sin limite de registros …… hay un total de 12 registros con estos filtros</text:p>
            <text:p>6. Se habilita botón para descargar los registros</text:p>
          </table:table-cell>
          <table:table-cell table:style-name="ce64"/>
          <table:table-cell table:style-name="ce4"/>
          <table:table-cell table:number-columns-repeated="16378"/>
        </table:table-row>
        <table:table-row table:style-name="ro123">
          <table:table-cell table:style-name="ce6" office:value-type="string" calcext:value-type="string">
            <text:p>CP63-41</text:p>
          </table:table-cell>
          <table:table-cell table:style-name="ce64" office:value-type="string" calcext:value-type="string">
            <text:p>Validar que al dar clic en alguna de las opciones de descarga el sistema genere el correspondiente archivo en la extensión escogida, se debe validar cada una de las opciones, y ese archivo debe contener la misma información que se muestra en las columnas</text:p>
          </table:table-cell>
          <table:table-cell table:style-name="ce6" office:value-type="string" calcext:value-type="string">
            <text:p>ok</text:p>
          </table:table-cell>
          <table:table-cell table:style-name="ce8" office:value-type="string" calcext:value-type="string">
            <text:p>1. se da clic en la opción de EXCEL que se muestra en la parte inferior, al hacer este proceso se descarga un archivo con el nombre resTiempoContestacion.xlsx</text:p>
            <text:p>2. Se da clic en la opción de CSV que se muestra en la parte inferior, al hacer este proceso se descarga un archivo con el nombre resTiempoContestacion.csv</text:p>
            <text:p>3. Se da clic en la opción de PDF que se muestra en la parte inferior, al hacer este proceso se descarga un archivo con el nombre resTiempoContestacion.pdf</text:p>
            <text:p>4. se valida que se muestran las columnas Número radicado, Tipo radicado, Fecha radicado, Asunto, Tipo Solicitud, Clasificación Solicitud, Remitente/Destinatario, Medio de Recepción, Dependencia Tramitadora, Usuario tramitador, Número de respuesta, Fecha de respuesta, Tiempo de respuesta, Fecha de vencimiento, Dependencia Responsable, Usuario Responsable, Estado Radicado, Traslado Competencia</text:p>
          </table:table-cell>
          <table:table-cell table:style-name="ce64"/>
          <table:table-cell table:style-name="ce4"/>
          <table:table-cell table:number-columns-repeated="16378"/>
        </table:table-row>
        <table:table-row table:style-name="ro115">
          <table:table-cell table:style-name="ce6" office:value-type="string" calcext:value-type="string">
            <text:p>CP63-42</text:p>
          </table:table-cell>
          <table:table-cell table:style-name="ce64" office:value-type="string" calcext:value-type="string">
            <text:p>Validar que al seleccionar el reporte “Reporte de Documentos Pendientes” y se de clic en el botón generar se muestre como resultado los radicados con documentos pendientes, permitiendo ver las columnas “Número de radicado”, “Tipo radicado”, “Fecha radicado”, ”Fecha vencimiento”, “Asunto”, “Remitente/Destinatario”, “Dependencia tramitadora”, “Usuario tramitador”, “Días transcurridos”</text:p>
          </table:table-cell>
          <table:table-cell table:style-name="ce6" office:value-type="string" calcext:value-type="string">
            <text:p>ok</text:p>
          </table:table-cell>
          <table:table-cell table:style-name="ce8" office:value-type="string" calcext:value-type="string">
            <text:p>1. Se ingreso al modulo de reportes – reportes</text:p>
            <text:p>2. En el listado de reportes se selecciona el Reporte Radicados Trasladado por competencia</text:p>
            <text:p>3. Se da clic en el botón generar</text:p>
            <text:p>4. Se obtuvo un listado de radicados existentes en el sistema</text:p>
          </table:table-cell>
          <table:table-cell table:style-name="ce64" office:value-type="string" calcext:value-type="string">
            <text:p>se valida el codigo con codigo extraño referente a este reporte y queda funcional</text:p>
          </table:table-cell>
          <table:table-cell table:style-name="ce4"/>
          <table:table-cell table:number-columns-repeated="16378"/>
        </table:table-row>
        <table:table-row table:style-name="ro7">
          <table:table-cell table:style-name="ce6" office:value-type="string" calcext:value-type="string">
            <text:p>CP63-43</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8" office:value-type="string" calcext:value-type="string">
            <text:p>1. Se evidencia que si se muestran las opciones del botón de filtro y la opción de descargar los diferentes extensiones</text:p>
          </table:table-cell>
          <table:table-cell table:style-name="ce64"/>
          <table:table-cell table:style-name="ce4"/>
          <table:table-cell table:number-columns-repeated="16378"/>
        </table:table-row>
        <table:table-row table:style-name="ro124">
          <table:table-cell table:style-name="ce6" office:value-type="string" calcext:value-type="string">
            <text:p>CP63-44</text:p>
          </table:table-cell>
          <table:table-cell table:style-name="ce64" office:value-type="string" calcext:value-type="string">
            <text:p>Validar que al dar clic en el botón “FILTROS” se despliegue una series de campos que pueden ser utilizados para filtrar la información que se esta mostrando, se debe validar que todos los filtros funcionen de forma correcta, importante probar los campos de fechas para poder filtrar por rango de fechas.</text:p>
          </table:table-cell>
          <table:table-cell table:style-name="ce6" office:value-type="string" calcext:value-type="string">
            <text:p>ok</text:p>
          </table:table-cell>
          <table:table-cell table:style-name="ce8" office:value-type="string" calcext:value-type="string">
            <text:p>1. Se ingresa al modulo de reportes – reportes</text:p>
            <text:p>2. En el listado de reportes se selecciona el Reporte Radicados Trasladado por competencia</text:p>
            <text:p>3. Se da clic en el botón de Filtros, y se ingresa un rango de fechas desde el mes de julio al mes de agosto y se buscan sin limite de registros</text:p>
            <text:p>4. Se da clic en el botón azul de procesar</text:p>
            <text:p>5. No hay registros</text:p>
          </table:table-cell>
          <table:table-cell table:style-name="ce64"/>
          <table:table-cell table:style-name="ce4"/>
          <table:table-cell table:number-columns-repeated="16378"/>
        </table:table-row>
        <table:table-row table:style-name="ro27">
          <table:table-cell table:style-name="ce6" office:value-type="string" calcext:value-type="string">
            <text:p>CP63-45</text:p>
          </table:table-cell>
          <table:table-cell table:style-name="ce64" office:value-type="string" calcext:value-type="string">
            <text:p>Validar que al dar clic en alguna de las opciones de descarga el sistema genere el correspondiente archivo en la extensión escogida, se debe validar cada una de las opciones, y ese archivo debe contener la misma información que se muestra en las columnas</text:p>
          </table:table-cell>
          <table:table-cell table:style-name="ce6" office:value-type="string" calcext:value-type="string">
            <text:p>ok</text:p>
          </table:table-cell>
          <table:table-cell table:style-name="ce8" office:value-type="string" calcext:value-type="string">
            <text:p>No hay registros no se habilita la descargar ningún registro</text:p>
          </table:table-cell>
          <table:table-cell table:style-name="ce64"/>
          <table:table-cell table:style-name="ce4"/>
          <table:table-cell table:number-columns-repeated="16378"/>
        </table:table-row>
        <table:table-row table:style-name="ro115">
          <table:table-cell table:style-name="ce6" office:value-type="string" calcext:value-type="string">
            <text:p>CP63-46</text:p>
          </table:table-cell>
          <table:table-cell table:style-name="ce64" office:value-type="string" calcext:value-type="string">
            <text:p>Validar que al seleccionar el reporte “Reporte Usuarios Activos” y se de clic en el botón generar se muestre como resultado los perfiles con usuarios activos permitiendo ver las columnas “Dependencia”, “Usuario”, “Cargo”, “Perfil”</text:p>
          </table:table-cell>
          <table:table-cell table:style-name="ce6" office:value-type="string" calcext:value-type="string">
            <text:p>ok</text:p>
          </table:table-cell>
          <table:table-cell table:style-name="ce8" office:value-type="string" calcext:value-type="string">
            <text:p>1. Se ingreso al modulo de reportes – reportes</text:p>
            <text:p>2. En el listado de reportes se selecciona el Reporte Radicados Trasladado por competencia</text:p>
            <text:p>3. Se da clic en el botón generar</text:p>
            <text:p>4. Se obtuvo un listado de radicados existentes en el sistema</text:p>
          </table:table-cell>
          <table:table-cell table:style-name="ce64" office:value-type="string" calcext:value-type="string">
            <text:p>se valida el codigo con codigo extraño referente a este reporte y queda funcional</text:p>
          </table:table-cell>
          <table:table-cell table:style-name="ce4"/>
          <table:table-cell table:number-columns-repeated="16378"/>
        </table:table-row>
        <table:table-row table:style-name="ro7">
          <table:table-cell table:style-name="ce6" office:value-type="string" calcext:value-type="string">
            <text:p>CP63-47</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8" office:value-type="string" calcext:value-type="string">
            <text:p>1. Se evidencia que si se muestran las opciones del botón de filtro y la opción de descargar los diferentes extensiones</text:p>
          </table:table-cell>
          <table:table-cell table:style-name="ce64"/>
          <table:table-cell table:style-name="ce4"/>
          <table:table-cell table:number-columns-repeated="16378"/>
        </table:table-row>
        <table:table-row table:style-name="ro124">
          <table:table-cell table:style-name="ce6" office:value-type="string" calcext:value-type="string">
            <text:p>CP63-48</text:p>
          </table:table-cell>
          <table:table-cell table:style-name="ce64" office:value-type="string" calcext:value-type="string">
            <text:p>Validar que al dar clic en el botón “FILTROS” se despliegue una series de campos que pueden ser utilizados para filtrar la información que se esta mostrando, se debe validar que todos los filtros funcionen de forma correcta, importante probar los campos de fechas para poder filtrar por rango de fechas.</text:p>
          </table:table-cell>
          <table:table-cell table:style-name="ce6" office:value-type="string" calcext:value-type="string">
            <text:p>ok</text:p>
          </table:table-cell>
          <table:table-cell table:style-name="ce8" office:value-type="string" calcext:value-type="string">
            <text:p>1. Se ingresa al modulo de reportes – reportes</text:p>
            <text:p>2. En el listado de reportes se selecciona el Reporte Radicados Trasladado por competencia</text:p>
            <text:p>3. Se da clic en el botón de Filtros, y se ingresa un rango de fechas desde el mes de julio al mes de agosto y se buscan sin limite de registros</text:p>
            <text:p>4. Se da clic en el botón azul de procesar</text:p>
            <text:p>5. No hay registros</text:p>
          </table:table-cell>
          <table:table-cell table:style-name="ce64"/>
          <table:table-cell table:style-name="ce4"/>
          <table:table-cell table:number-columns-repeated="16378"/>
        </table:table-row>
        <table:table-row table:style-name="ro27">
          <table:table-cell table:style-name="ce6" office:value-type="string" calcext:value-type="string">
            <text:p>CP63-49</text:p>
          </table:table-cell>
          <table:table-cell table:style-name="ce64" office:value-type="string" calcext:value-type="string">
            <text:p>Validar que al dar clic en alguna de las opciones de descarga el sistema genere el correspondiente archivo en la extensión escogida, se debe validar cada una de las opciones, y ese archivo debe contener la misma información que se muestra en las columnas</text:p>
          </table:table-cell>
          <table:table-cell table:style-name="ce6" office:value-type="string" calcext:value-type="string">
            <text:p>ok</text:p>
          </table:table-cell>
          <table:table-cell table:style-name="ce8" office:value-type="string" calcext:value-type="string">
            <text:p>No hay registros no se habilita la descargar ningún registro</text:p>
          </table:table-cell>
          <table:table-cell table:style-name="ce64"/>
          <table:table-cell table:style-name="ce4"/>
          <table:table-cell table:number-columns-repeated="16378"/>
        </table:table-row>
        <table:table-row table:style-name="ro115">
          <table:table-cell table:style-name="ce6" office:value-type="string" calcext:value-type="string">
            <text:p>CP63-50</text:p>
          </table:table-cell>
          <table:table-cell table:style-name="ce64" office:value-type="string" calcext:value-type="string">
            <text:p>Validar que al seleccionar el reporte “Reporte Usuarios con Permiso de Firma” y se de clic en el botón generar se muestre como resultado los usuarios con permisos para firmar permitiendo ver las columnas “Dependencia”, “Usuario”, “Documento identificación”</text:p>
          </table:table-cell>
          <table:table-cell table:style-name="ce6" office:value-type="string" calcext:value-type="string">
            <text:p>ok</text:p>
          </table:table-cell>
          <table:table-cell table:style-name="ce8" office:value-type="string" calcext:value-type="string">
            <text:p>1. Se ingreso al modulo de reportes – reportes</text:p>
            <text:p>2. En el listado de reportes se selecciona el Reporte Radicados Trasladado por competencia</text:p>
            <text:p>3. Se da clic en el botón generar</text:p>
            <text:p>4. Se obtuvo un listado de radicados existentes en el sistema</text:p>
          </table:table-cell>
          <table:table-cell table:style-name="ce64" office:value-type="string" calcext:value-type="string">
            <text:p>se valida el codigo con codigo extraño referente a este reporte y queda funcional</text:p>
          </table:table-cell>
          <table:table-cell table:style-name="ce4"/>
          <table:table-cell table:number-columns-repeated="16378"/>
        </table:table-row>
        <table:table-row table:style-name="ro7">
          <table:table-cell table:style-name="ce6" office:value-type="string" calcext:value-type="string">
            <text:p>CP63-51</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8" office:value-type="string" calcext:value-type="string">
            <text:p>1. Se evidencia que si se muestran las opciones del botón de filtro y la opción de descargar los diferentes extensiones</text:p>
          </table:table-cell>
          <table:table-cell table:style-name="ce64"/>
          <table:table-cell table:style-name="ce4"/>
          <table:table-cell table:number-columns-repeated="16378"/>
        </table:table-row>
        <table:table-row table:style-name="ro124">
          <table:table-cell table:style-name="ce6" office:value-type="string" calcext:value-type="string">
            <text:p>CP63-52</text:p>
          </table:table-cell>
          <table:table-cell table:style-name="ce64" office:value-type="string" calcext:value-type="string">
            <text:p>Validar que al dar clic en el botón “FILTROS” se despliegue una series de campos que pueden ser utilizados para filtrar la información que se esta mostrando, se debe validar que todos los filtros funcionen de forma correcta, importante probar los campos de fechas para poder filtrar por rango de fechas.</text:p>
          </table:table-cell>
          <table:table-cell table:style-name="ce6" office:value-type="string" calcext:value-type="string">
            <text:p>ok</text:p>
          </table:table-cell>
          <table:table-cell table:style-name="ce8" office:value-type="string" calcext:value-type="string">
            <text:p>1. Se ingresa al modulo de reportes – reportes</text:p>
            <text:p>2. En el listado de reportes se selecciona el Reporte Radicados Trasladado por competencia</text:p>
            <text:p>3. Se da clic en el botón de Filtros, y se ingresa un rango de fechas desde el mes de julio al mes de agosto y se buscan sin limite de registros</text:p>
            <text:p>4. Se da clic en el botón azul de procesar</text:p>
            <text:p>5. No hay registros</text:p>
          </table:table-cell>
          <table:table-cell table:style-name="ce64"/>
          <table:table-cell table:style-name="ce4"/>
          <table:table-cell table:number-columns-repeated="16378"/>
        </table:table-row>
        <table:table-row table:style-name="ro27">
          <table:table-cell table:style-name="ce6" office:value-type="string" calcext:value-type="string">
            <text:p>CP63-53</text:p>
          </table:table-cell>
          <table:table-cell table:style-name="ce64" office:value-type="string" calcext:value-type="string">
            <text:p>Validar que al dar clic en alguna de las opciones de descarga el sistema genere el correspondiente archivo en la extensión escogida, se debe validar cada una de las opciones, y ese archivo debe contener la misma información que se muestra en las columnas</text:p>
          </table:table-cell>
          <table:table-cell table:style-name="ce6" office:value-type="string" calcext:value-type="string">
            <text:p>ok</text:p>
          </table:table-cell>
          <table:table-cell table:style-name="ce8" office:value-type="string" calcext:value-type="string">
            <text:p>No hay registros no se habilita la descargar ningún registro</text:p>
          </table:table-cell>
          <table:table-cell table:style-name="ce64"/>
          <table:table-cell table:style-name="ce4"/>
          <table:table-cell table:number-columns-repeated="16378"/>
        </table:table-row>
        <table:table-row table:style-name="ro115">
          <table:table-cell table:style-name="ce6" office:value-type="string" calcext:value-type="string">
            <text:p>CP63-54</text:p>
          </table:table-cell>
          <table:table-cell table:style-name="ce64" office:value-type="string" calcext:value-type="string">
            <text:p>Validar que al seleccionar el reporte “Reporte de Devolución” y se de clic en el botón generar se muestre como resultado los radicados que han sido devueltos permitiendo ver las columnas “Número de radicado”, “Fecha radicado”, “Tipo radicado”, “Asunto”, “Dependencia creador”, “Usuario creador”, “Dependencia tramitadora”, “Usuario tramitador”, “Dependencia que devuelve”, “Usuario que devuelve”, ”Observación”, “Estado”</text:p>
          </table:table-cell>
          <table:table-cell table:style-name="ce6" office:value-type="string" calcext:value-type="string">
            <text:p>ok</text:p>
          </table:table-cell>
          <table:table-cell table:style-name="ce8" office:value-type="string" calcext:value-type="string">
            <text:p>1. Se ingreso al modulo de reportes – reportes</text:p>
            <text:p>2. En el listado de reportes se selecciona el Reporte Radicados Trasladado por competencia</text:p>
            <text:p>3. Se da clic en el botón generar</text:p>
            <text:p>4. Se obtuvo un listado de radicados existentes en el sistema</text:p>
          </table:table-cell>
          <table:table-cell table:style-name="ce64" office:value-type="string" calcext:value-type="string">
            <text:p>se valida el codigo con codigo extraño referente a este reporte y queda funcional</text:p>
          </table:table-cell>
          <table:table-cell table:style-name="ce4"/>
          <table:table-cell table:number-columns-repeated="16378"/>
        </table:table-row>
        <table:table-row table:style-name="ro7">
          <table:table-cell table:style-name="ce6" office:value-type="string" calcext:value-type="string">
            <text:p>CP63-55</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8" office:value-type="string" calcext:value-type="string">
            <text:p>1. Se evidencia que si se muestran las opciones del botón de filtro y la opción de descargar los diferentes extensiones</text:p>
          </table:table-cell>
          <table:table-cell table:style-name="ce64"/>
          <table:table-cell table:style-name="ce4"/>
          <table:table-cell table:number-columns-repeated="16378"/>
        </table:table-row>
        <table:table-row table:style-name="ro124">
          <table:table-cell table:style-name="ce6" office:value-type="string" calcext:value-type="string">
            <text:p>CP63-56</text:p>
          </table:table-cell>
          <table:table-cell table:style-name="ce64" office:value-type="string" calcext:value-type="string">
            <text:p>Validar que al dar clic en el botón “FILTROS” se despliegue una series de campos que pueden ser utilizados para filtrar la información que se esta mostrando, se debe validar que todos los filtros funcionen de forma correcta, importante probar los campos de fechas para poder filtrar por rango de fechas.</text:p>
          </table:table-cell>
          <table:table-cell table:style-name="ce6" office:value-type="string" calcext:value-type="string">
            <text:p>ok</text:p>
          </table:table-cell>
          <table:table-cell table:style-name="ce8" office:value-type="string" calcext:value-type="string">
            <text:p>1. Se ingresa al modulo de reportes – reportes</text:p>
            <text:p>2. En el listado de reportes se selecciona el Reporte Radicados Trasladado por competencia</text:p>
            <text:p>3. Se da clic en el botón de Filtros, y se ingresa un rango de fechas desde el mes de julio al mes de agosto y se buscan sin limite de registros</text:p>
            <text:p>4. Se da clic en el botón azul de procesar</text:p>
            <text:p>5. No hay registros</text:p>
          </table:table-cell>
          <table:table-cell table:style-name="ce64"/>
          <table:table-cell table:style-name="ce4"/>
          <table:table-cell table:number-columns-repeated="16378"/>
        </table:table-row>
        <table:table-row table:style-name="ro27">
          <table:table-cell table:style-name="ce6" office:value-type="string" calcext:value-type="string">
            <text:p>CP63-57</text:p>
          </table:table-cell>
          <table:table-cell table:style-name="ce64" office:value-type="string" calcext:value-type="string">
            <text:p>Validar que al dar clic en alguna de las opciones de descarga el sistema genere el correspondiente archivo en la extensión escogida, se debe validar cada una de las opciones, y ese archivo debe contener la misma información que se muestra en las columnas</text:p>
          </table:table-cell>
          <table:table-cell table:style-name="ce6" office:value-type="string" calcext:value-type="string">
            <text:p>ok</text:p>
          </table:table-cell>
          <table:table-cell table:style-name="ce8" office:value-type="string" calcext:value-type="string">
            <text:p>No hay registros no se habilita la descargar ningún registro</text:p>
          </table:table-cell>
          <table:table-cell table:style-name="ce64"/>
          <table:table-cell table:style-name="ce4"/>
          <table:table-cell table:number-columns-repeated="16378"/>
        </table:table-row>
        <table:table-row table:style-name="ro115">
          <table:table-cell table:style-name="ce6" office:value-type="string" calcext:value-type="string">
            <text:p>CP63-58</text:p>
          </table:table-cell>
          <table:table-cell table:style-name="ce64" office:value-type="string" calcext:value-type="string">
            <text:p>Validar que al seleccionar el reporte “Reporte Remitentes/Destinatarios” y se de clic en el botón generar se muestre como resultado los usuarios como remitentes o destinatarios permitiendo ver las columnas “Documento identificación”, “Remitente”, “Correo electrónico” “Dirección”</text:p>
          </table:table-cell>
          <table:table-cell table:style-name="ce6" office:value-type="string" calcext:value-type="string">
            <text:p>ok</text:p>
          </table:table-cell>
          <table:table-cell table:style-name="ce8" office:value-type="string" calcext:value-type="string">
            <text:p>1. Se ingreso al modulo de reportes – reportes</text:p>
            <text:p>2. En el listado de reportes se selecciona el Reporte Radicados Trasladado por competencia</text:p>
            <text:p>3. Se da clic en el botón generar</text:p>
            <text:p>4. Se obtuvo un listado de radicados existentes en el sistema</text:p>
          </table:table-cell>
          <table:table-cell table:style-name="ce64" office:value-type="string" calcext:value-type="string">
            <text:p>se valida el codigo con codigo extraño referente a este reporte y queda funcional</text:p>
          </table:table-cell>
          <table:table-cell table:style-name="ce4"/>
          <table:table-cell table:number-columns-repeated="16378"/>
        </table:table-row>
        <table:table-row table:style-name="ro7">
          <table:table-cell table:style-name="ce6" office:value-type="string" calcext:value-type="string">
            <text:p>CP63-59</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8" office:value-type="string" calcext:value-type="string">
            <text:p>1. Se evidencia que si se muestran las opciones del botón de filtro y la opción de descargar los diferentes extensiones</text:p>
          </table:table-cell>
          <table:table-cell table:style-name="ce64"/>
          <table:table-cell table:style-name="ce4"/>
          <table:table-cell table:number-columns-repeated="16378"/>
        </table:table-row>
        <table:table-row table:style-name="ro124">
          <table:table-cell table:style-name="ce6" office:value-type="string" calcext:value-type="string">
            <text:p>CP63-60</text:p>
          </table:table-cell>
          <table:table-cell table:style-name="ce64" office:value-type="string" calcext:value-type="string">
            <text:p>Validar que al dar clic en el botón “FILTROS” se despliegue una series de campos que pueden ser utilizados para filtrar la información que se esta mostrando, se debe validar que todos los filtros funcionen de forma correcta, importante probar los campos de fechas para poder filtrar por rango de fechas.</text:p>
          </table:table-cell>
          <table:table-cell table:style-name="ce6" office:value-type="string" calcext:value-type="string">
            <text:p>ok</text:p>
          </table:table-cell>
          <table:table-cell table:style-name="ce8" office:value-type="string" calcext:value-type="string">
            <text:p>1. Se ingresa al modulo de reportes – reportes</text:p>
            <text:p>2. En el listado de reportes se selecciona el Reporte Radicados Trasladado por competencia</text:p>
            <text:p>3. Se da clic en el botón de Filtros, y se ingresa un rango de fechas desde el mes de julio al mes de agosto y se buscan sin limite de registros</text:p>
            <text:p>4. Se da clic en el botón azul de procesar</text:p>
            <text:p>5. No hay registros</text:p>
          </table:table-cell>
          <table:table-cell table:style-name="ce64"/>
          <table:table-cell table:style-name="ce4"/>
          <table:table-cell table:number-columns-repeated="16378"/>
        </table:table-row>
        <table:table-row table:style-name="ro27">
          <table:table-cell table:style-name="ce6" office:value-type="string" calcext:value-type="string">
            <text:p>CP63-61</text:p>
          </table:table-cell>
          <table:table-cell table:style-name="ce64" office:value-type="string" calcext:value-type="string">
            <text:p>Validar que al dar clic en alguna de las opciones de descarga el sistema genere el correspondiente archivo en la extensión escogida, se debe validar cada una de las opciones, y ese archivo debe contener la misma información que se muestra en las columnas</text:p>
          </table:table-cell>
          <table:table-cell table:style-name="ce6" office:value-type="string" calcext:value-type="string">
            <text:p>ok</text:p>
          </table:table-cell>
          <table:table-cell table:style-name="ce8" office:value-type="string" calcext:value-type="string">
            <text:p>No hay registros no se habilita la descargar ningún registro</text:p>
          </table:table-cell>
          <table:table-cell table:style-name="ce64"/>
          <table:table-cell table:style-name="ce4"/>
          <table:table-cell table:number-columns-repeated="16378"/>
        </table:table-row>
        <table:table-row table:style-name="ro115">
          <table:table-cell table:style-name="ce6" office:value-type="string" calcext:value-type="string">
            <text:p>CP63-62</text:p>
          </table:table-cell>
          <table:table-cell table:style-name="ce64" office:value-type="string" calcext:value-type="string">
            <text:p>Validar que al seleccionar el reporte “Reporte Permisos por Rol” y se de clic en el botón generar se muestre como resultado los usuarios como remitentes o destinatarios permitiendo ver las columnas “Rol”, “Módulo”, “Submódulo”, “Permiso”</text:p>
          </table:table-cell>
          <table:table-cell table:style-name="ce6" office:value-type="string" calcext:value-type="string">
            <text:p>ok</text:p>
          </table:table-cell>
          <table:table-cell table:style-name="ce8" office:value-type="string" calcext:value-type="string">
            <text:p>1. Se ingreso al modulo de reportes – reportes</text:p>
            <text:p>2. En el listado de reportes se selecciona el Reporte Radicados Trasladado por competencia</text:p>
            <text:p>3. Se da clic en el botón generar</text:p>
            <text:p>4. Se obtuvo un listado de radicados existentes en el sistema</text:p>
          </table:table-cell>
          <table:table-cell table:style-name="ce64" office:value-type="string" calcext:value-type="string">
            <text:p>se valida el codigo con codigo extraño referente a este reporte y queda funcional</text:p>
          </table:table-cell>
          <table:table-cell table:style-name="ce4"/>
          <table:table-cell table:number-columns-repeated="16378"/>
        </table:table-row>
        <table:table-row table:style-name="ro7">
          <table:table-cell table:style-name="ce6" office:value-type="string" calcext:value-type="string">
            <text:p>CP63-63</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8" office:value-type="string" calcext:value-type="string">
            <text:p>1. Se evidencia que si se muestran las opciones del botón de filtro y la opción de descargar los diferentes extensiones</text:p>
          </table:table-cell>
          <table:table-cell table:style-name="ce64"/>
          <table:table-cell table:style-name="ce4"/>
          <table:table-cell table:number-columns-repeated="16378"/>
        </table:table-row>
        <table:table-row table:style-name="ro124">
          <table:table-cell table:style-name="ce6" office:value-type="string" calcext:value-type="string">
            <text:p>CP63-64</text:p>
          </table:table-cell>
          <table:table-cell table:style-name="ce64" office:value-type="string" calcext:value-type="string">
            <text:p>Validar que al dar clic en el botón “FILTROS” se despliegue una series de campos que pueden ser utilizados para filtrar la información que se esta mostrando, se debe validar que todos los filtros funcionen de forma correcta, importante probar los campos de fechas para poder filtrar por rango de fechas.</text:p>
          </table:table-cell>
          <table:table-cell table:style-name="ce6" office:value-type="string" calcext:value-type="string">
            <text:p>ok</text:p>
          </table:table-cell>
          <table:table-cell table:style-name="ce8" office:value-type="string" calcext:value-type="string">
            <text:p>1. Se ingresa al modulo de reportes – reportes</text:p>
            <text:p>2. En el listado de reportes se selecciona el Reporte Radicados Trasladado por competencia</text:p>
            <text:p>3. Se da clic en el botón de Filtros, y se ingresa un rango de fechas desde el mes de julio al mes de agosto y se buscan sin limite de registros</text:p>
            <text:p>4. Se da clic en el botón azul de procesar</text:p>
            <text:p>5. No hay registros</text:p>
          </table:table-cell>
          <table:table-cell table:style-name="ce64"/>
          <table:table-cell table:style-name="ce4"/>
          <table:table-cell table:number-columns-repeated="16378"/>
        </table:table-row>
        <table:table-row table:style-name="ro27">
          <table:table-cell table:style-name="ce6" office:value-type="string" calcext:value-type="string">
            <text:p>CP63-65</text:p>
          </table:table-cell>
          <table:table-cell table:style-name="ce64" office:value-type="string" calcext:value-type="string">
            <text:p>Validar que al dar clic en alguna de las opciones de descarga el sistema genere el correspondiente archivo en la extensión escogida, se debe validar cada una de las opciones, y ese archivo debe contener la misma información que se muestra en las columnas</text:p>
          </table:table-cell>
          <table:table-cell table:style-name="ce6" office:value-type="string" calcext:value-type="string">
            <text:p>ok</text:p>
          </table:table-cell>
          <table:table-cell table:style-name="ce8" office:value-type="string" calcext:value-type="string">
            <text:p>No hay registros no se habilita la descargar ningún registro</text:p>
          </table:table-cell>
          <table:table-cell table:style-name="ce64"/>
          <table:table-cell table:style-name="ce4"/>
          <table:table-cell table:number-columns-repeated="16378"/>
        </table:table-row>
        <table:table-row table:style-name="ro115">
          <table:table-cell table:style-name="ce6" office:value-type="string" calcext:value-type="string">
            <text:p>CP63-66</text:p>
          </table:table-cell>
          <table:table-cell table:style-name="ce64" office:value-type="string" calcext:value-type="string">
            <text:p>Validar que al seleccionar el reporte “Radicados por tiempos de respuestas en cada dependencia” y se de clic en el botón generar se muestre como resultado los radicados por tiempo de respuesta por dependencia permitiendo ver las columnas “Dependencia”, “Día respuesta 0”, ”Día respuesta 1”, “Día respuesta 2”, “Día respuesta 3”, “Día respuesta 4”, “Día respuesta 5”, “Día respuesta 6”, “Día respuesta 7”, “Día respuesta 8”, “Día respuesta 9”, “Día respuesta 10”, “Día respuesta 11”, “Día respuesta 12”, “Día respuesta 13”, “Día respuesta 14”, “Día respuesta 15”, “Día respuesta +15”, “Pte Rta”, “Total Resultado”</text:p>
          </table:table-cell>
          <table:table-cell table:style-name="ce6" office:value-type="string" calcext:value-type="string">
            <text:p>ok</text:p>
          </table:table-cell>
          <table:table-cell table:style-name="ce8" office:value-type="string" calcext:value-type="string">
            <text:p>1. Se ingreso al modulo de reportes – reportes</text:p>
            <text:p>2. En el listado de reportes se selecciona el Reporte Radicados Trasladado por competencia</text:p>
            <text:p>3. Se da clic en el botón generar</text:p>
            <text:p>4. Se obtuvo un listado de radicados existentes en el sistema</text:p>
          </table:table-cell>
          <table:table-cell table:style-name="ce64" office:value-type="string" calcext:value-type="string">
            <text:p>se valida el codigo con codigo extraño referente a este reporte y queda funcional</text:p>
          </table:table-cell>
          <table:table-cell table:style-name="ce4"/>
          <table:table-cell table:number-columns-repeated="16378"/>
        </table:table-row>
        <table:table-row table:style-name="ro7">
          <table:table-cell table:style-name="ce6" office:value-type="string" calcext:value-type="string">
            <text:p>CP63-67</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8" office:value-type="string" calcext:value-type="string">
            <text:p>1. Se evidencia que si se muestran las opciones del botón de filtro y la opción de descargar los diferentes extensiones</text:p>
          </table:table-cell>
          <table:table-cell table:style-name="ce64"/>
          <table:table-cell table:style-name="ce4"/>
          <table:table-cell table:number-columns-repeated="16378"/>
        </table:table-row>
        <table:table-row table:style-name="ro124">
          <table:table-cell table:style-name="ce6" office:value-type="string" calcext:value-type="string">
            <text:p>CP63-68</text:p>
          </table:table-cell>
          <table:table-cell table:style-name="ce64" office:value-type="string" calcext:value-type="string">
            <text:p>Validar que al dar clic en el botón “FILTROS” se despliegue una series de campos que pueden ser utilizados para filtrar la información que se esta mostrando, se debe validar que todos los filtros funcionen de forma correcta, importante probar los campos de fechas para poder filtrar por rango de fechas.</text:p>
          </table:table-cell>
          <table:table-cell table:style-name="ce6" office:value-type="string" calcext:value-type="string">
            <text:p>ok</text:p>
          </table:table-cell>
          <table:table-cell table:style-name="ce8" office:value-type="string" calcext:value-type="string">
            <text:p>1. Se ingresa al modulo de reportes – reportes</text:p>
            <text:p>2. En el listado de reportes se selecciona el Reporte Radicados Trasladado por competencia</text:p>
            <text:p>3. Se da clic en el botón de Filtros, y se ingresa un rango de fechas desde el mes de julio al mes de agosto y se buscan sin limite de registros</text:p>
            <text:p>4. Se da clic en el botón azul de procesar</text:p>
            <text:p>5. No hay registros</text:p>
          </table:table-cell>
          <table:table-cell table:style-name="ce64"/>
          <table:table-cell table:style-name="ce4"/>
          <table:table-cell table:number-columns-repeated="16378"/>
        </table:table-row>
        <table:table-row table:style-name="ro27">
          <table:table-cell table:style-name="ce6" office:value-type="string" calcext:value-type="string">
            <text:p>CP63-69</text:p>
          </table:table-cell>
          <table:table-cell table:style-name="ce64" office:value-type="string" calcext:value-type="string">
            <text:p>Validar que al dar clic en alguna de las opciones de descarga el sistema genere el correspondiente archivo en la extensión escogida, se debe validar cada una de las opciones, y ese archivo debe contener la misma información que se muestra en las columnas</text:p>
          </table:table-cell>
          <table:table-cell table:style-name="ce6" office:value-type="string" calcext:value-type="string">
            <text:p>ok</text:p>
          </table:table-cell>
          <table:table-cell table:style-name="ce8" office:value-type="string" calcext:value-type="string">
            <text:p>No hay registros no se habilita la descargar ningún registro</text:p>
          </table:table-cell>
          <table:table-cell table:style-name="ce64"/>
          <table:table-cell table:style-name="ce4"/>
          <table:table-cell table:number-columns-repeated="16378"/>
        </table:table-row>
        <table:table-row table:style-name="ro115">
          <table:table-cell table:style-name="ce6" office:value-type="string" calcext:value-type="string">
            <text:p>CP63-70</text:p>
          </table:table-cell>
          <table:table-cell table:style-name="ce64" office:value-type="string" calcext:value-type="string">
            <text:p>Validar que al seleccionar el reporte “Reporte de Respuesta Parcial” y se de clic en el botón generar se muestre como resultado los radicados con respuesta parcial permitiendo ver las columnas “Número de radicado”, “Tipo radicado”, “Fecha radicado”, “Asunto”, “Tipo Solicitud Remitente/Destinatario”, “Medio de recepción”, “Dependencia tramitadora”, “Usuario tramitador”, “Número de respuesta”, “Fecha de respuesta”, “Tiempo de respuesta”, “Dependencia responsable”, “Usuario responsable”, “Estado Radicado”, “Permiso radicado”, “Número de segunda respuesta”, “Fecha de segunda respuesta”, “Tiempo de segunda respuesta”</text:p>
          </table:table-cell>
          <table:table-cell table:style-name="ce6" office:value-type="string" calcext:value-type="string">
            <text:p>ok</text:p>
          </table:table-cell>
          <table:table-cell table:style-name="ce8" office:value-type="string" calcext:value-type="string">
            <text:p>1. Se ingreso al modulo de reportes – reportes</text:p>
            <text:p>2. En el listado de reportes se selecciona el Reporte Radicados Trasladado por competencia</text:p>
            <text:p>3. Se da clic en el botón generar</text:p>
            <text:p>4. Se obtuvo un listado de radicados existentes en el sistema</text:p>
          </table:table-cell>
          <table:table-cell table:style-name="ce64" office:value-type="string" calcext:value-type="string">
            <text:p>se valida el codigo con codigo extraño referente a este reporte y queda funcional</text:p>
          </table:table-cell>
          <table:table-cell table:style-name="ce4"/>
          <table:table-cell table:number-columns-repeated="16378"/>
        </table:table-row>
        <table:table-row table:style-name="ro7">
          <table:table-cell table:style-name="ce6" office:value-type="string" calcext:value-type="string">
            <text:p>CP63-71</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8" office:value-type="string" calcext:value-type="string">
            <text:p>1. Se evidencia que si se muestran las opciones del botón de filtro y la opción de descargar los diferentes extensiones</text:p>
          </table:table-cell>
          <table:table-cell table:style-name="ce64"/>
          <table:table-cell table:style-name="ce4"/>
          <table:table-cell table:number-columns-repeated="16378"/>
        </table:table-row>
        <table:table-row table:style-name="ro124">
          <table:table-cell table:style-name="ce6" office:value-type="string" calcext:value-type="string">
            <text:p>CP63-72</text:p>
          </table:table-cell>
          <table:table-cell table:style-name="ce64" office:value-type="string" calcext:value-type="string">
            <text:p>Validar que al dar clic en el botón “FILTROS” se despliegue una series de campos que pueden ser utilizados para filtrar la información que se esta mostrando, se debe validar que todos los filtros funcionen de forma correcta, importante probar los campos de fechas para poder filtrar por rango de fechas.</text:p>
          </table:table-cell>
          <table:table-cell table:style-name="ce6" office:value-type="string" calcext:value-type="string">
            <text:p>ok</text:p>
          </table:table-cell>
          <table:table-cell table:style-name="ce8" office:value-type="string" calcext:value-type="string">
            <text:p>1. Se ingresa al modulo de reportes – reportes</text:p>
            <text:p>2. En el listado de reportes se selecciona el Reporte Radicados Trasladado por competencia</text:p>
            <text:p>3. Se da clic en el botón de Filtros, y se ingresa un rango de fechas desde el mes de julio al mes de agosto y se buscan sin limite de registros</text:p>
            <text:p>4. Se da clic en el botón azul de procesar</text:p>
            <text:p>5. No hay registros</text:p>
          </table:table-cell>
          <table:table-cell table:style-name="ce64"/>
          <table:table-cell table:style-name="ce4"/>
          <table:table-cell table:number-columns-repeated="16378"/>
        </table:table-row>
        <table:table-row table:style-name="ro27">
          <table:table-cell table:style-name="ce6" office:value-type="string" calcext:value-type="string">
            <text:p>CP63-73</text:p>
          </table:table-cell>
          <table:table-cell table:style-name="ce64" office:value-type="string" calcext:value-type="string">
            <text:p>Validar que al dar clic en alguna de las opciones de descarga el sistema genere el correspondiente archivo en la extensión escogida, se debe validar cada una de las opciones, y ese archivo debe contener la misma información que se muestra en las columnas</text:p>
          </table:table-cell>
          <table:table-cell table:style-name="ce6" office:value-type="string" calcext:value-type="string">
            <text:p>ok</text:p>
          </table:table-cell>
          <table:table-cell table:style-name="ce8" office:value-type="string" calcext:value-type="string">
            <text:p>No hay registros no se habilita la descargar ningún registro</text:p>
          </table:table-cell>
          <table:table-cell table:style-name="ce64"/>
          <table:table-cell table:style-name="ce4"/>
          <table:table-cell table:number-columns-repeated="16378"/>
        </table:table-row>
        <table:table-row table:style-name="ro115">
          <table:table-cell table:style-name="ce6" office:value-type="string" calcext:value-type="string">
            <text:p>CP63-74</text:p>
          </table:table-cell>
          <table:table-cell table:style-name="ce64" office:value-type="string" calcext:value-type="string">
            <text:p>Validar que al seleccionar el reporte “Reporte Radicados Trasladado por competencia” y se de clic en el botón generar se muestre como resultado los radicados que se han marcado como trasladado por competencia, permitiendo ver las columnas "Regional", "Dependencia",”CICR”, “Comisaria”, “Comisión Nacional”, “Consejo Superior”, “DANE”, “Fiscalia General de la Nación”, “Hospital/Clinica”, “Juzgado”, “Ministerio de Salud”, “Policia Nacional”, “Secretaria de Transito”, “Transito”, “Total por dependencia”</text:p>
          </table:table-cell>
          <table:table-cell table:style-name="ce6" office:value-type="string" calcext:value-type="string">
            <text:p>ok</text:p>
          </table:table-cell>
          <table:table-cell table:style-name="ce8" office:value-type="string" calcext:value-type="string">
            <text:p>1. Se ingreso al modulo de reportes – reportes</text:p>
            <text:p>2. En el listado de reportes se selecciona el Reporte Radicados Trasladado por competencia</text:p>
            <text:p>3. Se da clic en el botón generar</text:p>
            <text:p>4. Se obtuvo un listado de radicados existentes en el sistema</text:p>
          </table:table-cell>
          <table:table-cell table:style-name="ce64" office:value-type="string" calcext:value-type="string">
            <text:p>se valida el codigo con codigo extraño referente a este reporte y queda funcional</text:p>
          </table:table-cell>
          <table:table-cell table:style-name="ce4"/>
          <table:table-cell table:number-columns-repeated="16378"/>
        </table:table-row>
        <table:table-row table:style-name="ro7">
          <table:table-cell table:style-name="ce6" office:value-type="string" calcext:value-type="string">
            <text:p>CP63-75</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8" office:value-type="string" calcext:value-type="string">
            <text:p>1. Se evidencia que si se muestran las opciones del botón de filtro y la opción de descargar los diferentes extensiones</text:p>
          </table:table-cell>
          <table:table-cell table:style-name="ce64"/>
          <table:table-cell table:style-name="ce4"/>
          <table:table-cell table:number-columns-repeated="16378"/>
        </table:table-row>
        <table:table-row table:style-name="ro124">
          <table:table-cell table:style-name="ce6" office:value-type="string" calcext:value-type="string">
            <text:p>CP63-76</text:p>
          </table:table-cell>
          <table:table-cell table:style-name="ce64" office:value-type="string" calcext:value-type="string">
            <text:p>Validar que al dar clic en el botón “FILTROS” se despliegue una series de campos que pueden ser utilizados para filtrar la información que se esta mostrando, se debe validar que todos los filtros funcionen de forma correcta, importante probar los campos de fechas para poder filtrar por rango de fechas.</text:p>
          </table:table-cell>
          <table:table-cell table:style-name="ce6" office:value-type="string" calcext:value-type="string">
            <text:p>ok</text:p>
          </table:table-cell>
          <table:table-cell table:style-name="ce8" office:value-type="string" calcext:value-type="string">
            <text:p>1. Se ingresa al modulo de reportes – reportes</text:p>
            <text:p>2. En el listado de reportes se selecciona el Reporte Radicados Trasladado por competencia</text:p>
            <text:p>3. Se da clic en el botón de Filtros, y se ingresa un rango de fechas desde el mes de julio al mes de agosto y se buscan sin limite de registros</text:p>
            <text:p>4. Se da clic en el botón azul de procesar</text:p>
            <text:p>5. No hay registros</text:p>
          </table:table-cell>
          <table:table-cell table:style-name="ce64"/>
          <table:table-cell table:style-name="ce4"/>
          <table:table-cell table:number-columns-repeated="16378"/>
        </table:table-row>
        <table:table-row table:style-name="ro27">
          <table:table-cell table:style-name="ce6" office:value-type="string" calcext:value-type="string">
            <text:p>CP63-77</text:p>
          </table:table-cell>
          <table:table-cell table:style-name="ce64" office:value-type="string" calcext:value-type="string">
            <text:p>Validar que al dar clic en alguna de las opciones de descarga el sistema genere el correspondiente archivo en la extensión escogida, se debe validar cada una de las opciones, y ese archivo debe contener la misma información que se muestra en las columnas</text:p>
          </table:table-cell>
          <table:table-cell table:style-name="ce6" office:value-type="string" calcext:value-type="string">
            <text:p>ok</text:p>
          </table:table-cell>
          <table:table-cell table:style-name="ce8" office:value-type="string" calcext:value-type="string">
            <text:p>No hay registros no se habilita la descargar ningún registro</text:p>
          </table:table-cell>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64 – Reportes - Reportes personalizados</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125">
          <table:table-cell table:style-name="ce6" office:value-type="string" calcext:value-type="string">
            <text:p>CP64-01</text:p>
          </table:table-cell>
          <table:table-cell table:style-name="ce64" office:value-type="string" calcext:value-type="string">
            <text:p>Validar que cuando se de clic en el modulo de Reportes - Reportes Personalizados, se muestre un formulario donde se observe una sección que se llama "Selección de campos o columnas para el reporte", alli se debe poder seleccionar todos los campos asociados al radicado, asociados al remitente/destinatario, asociados a las transacciones del radicado, asociados a los expedientes, a la ubicación fisica (archivo) y asociado a los préstamos</text:p>
          </table:table-cell>
          <table:table-cell table:style-name="ce6" office:value-type="string" calcext:value-type="string">
            <text:p>ok</text:p>
          </table:table-cell>
          <table:table-cell table:style-name="ce8" office:value-type="string" calcext:value-type="string">
            <text:p>1. Se ingresa con el usuario admin el cual es el usuario</text:p>
            <text:p>2. Se ingresa al modulo de Reportes – Reportes personalizados</text:p>
            <text:p>3. Se valida que se muestra una sección donde se permite chequear que campos se agregan al reporte personalizado</text:p>
          </table:table-cell>
          <table:table-cell table:style-name="ce64"/>
          <table:table-cell table:style-name="ce4"/>
          <table:table-cell table:number-columns-repeated="16378"/>
        </table:table-row>
        <table:table-row table:style-name="ro126">
          <table:table-cell table:style-name="ce6" office:value-type="string" calcext:value-type="string">
            <text:p>CP64-02</text:p>
          </table:table-cell>
          <table:table-cell table:style-name="ce64" office:value-type="string" calcext:value-type="string">
            <text:p>Validar que se pueda seleccionar todas las casillas que se muestran o solo por ciertos campos, es importante que con base a lo que se seleccione y se chequee el sistema genere el reporte asociado, lo cual debe mostrar una columna asociada a cada uno de los campos seleccionados</text:p>
          </table:table-cell>
          <table:table-cell table:style-name="ce6" office:value-type="string" calcext:value-type="string">
            <text:p>ok</text:p>
          </table:table-cell>
          <table:table-cell table:style-name="ce90" office:value-type="string" calcext:value-type="string" table:number-columns-spanned="1" table:number-rows-spanned="2">
            <text:p>1. Se ingresa con el usuario admin el cual es el usuario</text:p>
            <text:p>2. Se ingresa al modulo de Reportes – Reportes personalizados</text:p>
            <text:p>3. Se valida que se muestra una sección donde se permite chequear que campos se agregan al reporte personalizado</text:p>
            <text:p>4. Se chequean los campos Número radicado, Asunto radicado, Tipo documental, Estado, Creación radicado, Usuario tramitador, Remitentes/Destinatarios del radicado-Nombre, Dirección</text:p>
            <text:p>5. Se da clic en el boton generar reporte</text:p>
            <text:p>6. Se valida que se muestran resultados</text:p>
          </table:table-cell>
          <table:table-cell table:style-name="ce64"/>
          <table:table-cell table:style-name="ce4"/>
          <table:table-cell table:number-columns-repeated="16378"/>
        </table:table-row>
        <table:table-row table:style-name="ro7">
          <table:table-cell table:style-name="ce6" office:value-type="string" calcext:value-type="string">
            <text:p>CP64-03</text:p>
          </table:table-cell>
          <table:table-cell table:style-name="ce64" office:value-type="string" calcext:value-type="string">
            <text:p>Validar que al realizar el proceso anterior y habiendo dado clic <text:s/>en el botón dinámico de color naranja, se muestren la opción de "generar Reporte", y al dar clic en la parte inferior se muestre los correspondientes resultados</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127">
          <table:table-cell table:style-name="ce6" office:value-type="string" calcext:value-type="string">
            <text:p>CP64-04</text:p>
          </table:table-cell>
          <table:table-cell table:style-name="ce64" office:value-type="string" calcext:value-type="string">
            <text:p>Validar que cuando se haga el proceso anterior se muestre una tabla con los resultados y las columnas que se muestren sean asociadas a los campos que se seleccionaron o chequeron adicional estos campos son los mismos que se deben mostrar en la opción de "FILTROS"</text:p>
          </table:table-cell>
          <table:table-cell table:style-name="ce6" office:value-type="string" calcext:value-type="string">
            <text:p>ok</text:p>
          </table:table-cell>
          <table:table-cell table:style-name="ce8" office:value-type="string" calcext:value-type="string">
            <text:p>1. Se ingresa con el usuario admin el cual es el usuario</text:p>
            <text:p>2. Se ingresa al modulo de Reportes – Reportes personalizados</text:p>
            <text:p>3. Se valida que se muestra una sección donde se permite chequear que campos se agregan al reporte personalizado</text:p>
            <text:p>4. Se chequean los campos Número radicado, Asunto radicado, Tipo documental, Estado, Creación radicado, Usuario tramitador, Remitentes/Destinatarios del radicado-Nombre, Dirección</text:p>
            <text:p>5. Se da clic en el botón generar reporte</text:p>
            <text:p>6. Se valida que se muestran resultados</text:p>
            <text:p>7. Se valida que en la opción de filtros se muestran los mismos campos seleccionados desde un principio</text:p>
          </table:table-cell>
          <table:table-cell table:style-name="ce124"/>
          <table:table-cell table:style-name="ce4"/>
          <table:table-cell table:number-columns-repeated="16378"/>
        </table:table-row>
        <table:table-row table:style-name="ro78">
          <table:table-cell table:style-name="ce6" office:value-type="string" calcext:value-type="string">
            <text:p>CP64-05</text:p>
          </table:table-cell>
          <table:table-cell table:style-name="ce64" office:value-type="string" calcext:value-type="string">
            <text:p>Validar que cuando se haga el proceso anterior en los resultados optenidos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63"/>
          <table:table-cell table:style-name="ce64"/>
          <table:table-cell table:style-name="ce4"/>
          <table:table-cell table:number-columns-repeated="16378"/>
        </table:table-row>
        <table:table-row table:style-name="ro127">
          <table:table-cell table:style-name="ce6" office:value-type="string" calcext:value-type="string">
            <text:p>CP64-06</text:p>
          </table:table-cell>
          <table:table-cell table:style-name="ce64" office:value-type="string" calcext:value-type="string">
            <text:p>Validar que cuando se de clic en alguno de los botones de "CSV", "EXCEL", "PDF" e "IMPRIMIR" se genere el correspondiente archivo con los resultados asociados</text:p>
          </table:table-cell>
          <table:table-cell table:style-name="ce6" office:value-type="string" calcext:value-type="string">
            <text:p>ok</text:p>
          </table:table-cell>
          <table:table-cell table:style-name="ce8" office:value-type="string" calcext:value-type="string">
            <text:p>1. se da clic en la opción de EXCEL que se muestra en la parte inferior, al hacer este proceso se descarga un archivo con el nombre personalizado.xlsx</text:p>
            <text:p>2. Se da clic en la opción de CSV que se muestra en la parte inferior, al hacer este proceso se descarga un archivo con el nombre personalizado.csv</text:p>
            <text:p>3. Se da clic en la opción de PDF que se muestra en la parte inferior, al hacer este proceso se descarga un archivo con el nombre personalizado.pdf</text:p>
            <text:p>4. se valida que se muestran las columnas con base a los campos que fueron chequeados</text:p>
          </table:table-cell>
          <table:table-cell table:style-name="ce64"/>
          <table:table-cell table:style-name="ce4"/>
          <table:table-cell table:number-columns-repeated="16378"/>
        </table:table-row>
        <table:table-row table:style-name="ro53">
          <table:table-cell table:style-name="ce6" office:value-type="string" calcext:value-type="string">
            <text:p>CP64-07</text:p>
          </table:table-cell>
          <table:table-cell table:style-name="ce64" office:value-type="string" calcext:value-type="string">
            <text:p>Validar que al dar clic en el botón “FILTROS” se despliegue una series de campos que pueden ser utilizados para filtrar la información que se esta mostrando, se debe validar que todos los filtros funcionen de forma correcta, importante probar los campos de fechas para poder filtrar por rango de fechas.</text:p>
          </table:table-cell>
          <table:table-cell table:style-name="ce6" office:value-type="string" calcext:value-type="string">
            <text:p>ok</text:p>
          </table:table-cell>
          <table:table-cell table:style-name="ce90" office:value-type="string" calcext:value-type="string" table:number-columns-spanned="1" table:number-rows-spanned="2">
            <text:p>1. Se ingresa con el usuario admin el cual es el usuario</text:p>
            <text:p>2. Se ingresa al modulo de Reportes – Reportes personalizados</text:p>
            <text:p>3. Se valida que se muestra una sección donde se permite chequear que campos se agregan al reporte personalizado</text:p>
            <text:p>4. Se chequean los campos Número radicado, Asunto radicado, Tipo documental, Estado, Creación radicado, Usuario tramitador, Remitentes/Destinatarios del radicado-Nombre, Dirección</text:p>
            <text:p>5. Se da clic en el botón generar reporte</text:p>
            <text:p>6. Se valida que se muestran resultados</text:p>
            <text:p>7. Se aplica en la opción de filtros por el criterio de Tipo de radicado SALIDA y por rangos de fechas del mes de julio al mes de agosto</text:p>
            <text:p>8. Se obtuvo una totalidad de 24 registros asociados a los radicados</text:p>
          </table:table-cell>
          <table:table-cell table:style-name="ce64"/>
          <table:table-cell table:style-name="ce4"/>
          <table:table-cell table:number-columns-repeated="16378"/>
        </table:table-row>
        <table:table-row table:style-name="ro7">
          <table:table-cell table:style-name="ce6" office:value-type="string" calcext:value-type="string">
            <text:p>CP64-08</text:p>
          </table:table-cell>
          <table:table-cell table:style-name="ce64" office:value-type="string" calcext:value-type="string">
            <text:p>Validar que con todos los criterios que se ingresen el sistema muestre los correspondientes resultados, ya sea que se seleccione solamente lo asociado al radicado, o solamente lo asociado al cliente, o solo asociado al expedientes</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128">
          <table:table-cell table:style-name="ce6" office:value-type="string" calcext:value-type="string">
            <text:p>CP64-09</text:p>
          </table:table-cell>
          <table:table-cell table:style-name="ce64" office:value-type="string" calcext:value-type="string">
            <text:p>Validar que una vez generado el reporte este se pueda guardar para ser utilizado posteriormente, lo cual se puede validar cuando se da clic en el botón dinámico de color naranja, se muestren la opción "guardar reporte", y al dar clic se despliegue una nueva ventana donde se pida una observación y un nombre a dicho reporte</text:p>
          </table:table-cell>
          <table:table-cell table:style-name="ce6" office:value-type="string" calcext:value-type="string">
            <text:p>ok</text:p>
          </table:table-cell>
          <table:table-cell table:style-name="ce8" office:value-type="string" calcext:value-type="string">
            <text:p>1. Se ingresa con el usuario admin el cual es el usuario</text:p>
            <text:p>2. Se ingresa al modulo de Reportes – Reportes personalizados</text:p>
            <text:p>3. Se valida que se muestra una sección donde se permite chequear que campos se agregan al reporte personalizado</text:p>
            <text:p>4. Se chequean los campos Número radicado, Asunto radicado, Tipo documental, Estado, Creación radicado, Usuario tramitador, Remitentes/Destinatarios del radicado-Nombre, Dirección</text:p>
            <text:p>5. Se da clic en el botón generar reporte</text:p>
            <text:p>6. Se valida que se muestran resultados</text:p>
            <text:p>7. Se aplica en la opción de filtros por el criterio de Tipo de radicado SALIDA y por rangos de fechas del mes de julio al mes de agosto</text:p>
            <text:p>8. Se obtuvo una totalidad de 24 registros asociados a los radicados</text:p>
            <text:p>9. Se da clic en la opción de guardar reporte</text:p>
            <text:p>10. se procesa correctamente la información</text:p>
          </table:table-cell>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65 – Reporte – Reportes graficos</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6" office:value-type="string" calcext:value-type="string">
            <text:p>CP65-01</text:p>
          </table:table-cell>
          <table:table-cell table:style-name="ce64" office:value-type="string" calcext:value-type="string">
            <text:p>Validar que si el usuario tiene el permiso de este modulo, se muestre en el menu lateral y al dar clic se liste todos los reportes que se pueden realizar en el sistema, permitiendo seleccionar alguno de estos y traera los correspondientes resultados</text:p>
          </table:table-cell>
          <table:table-cell table:style-name="ce6" office:value-type="string" calcext:value-type="string">
            <text:p>ok</text:p>
          </table:table-cell>
          <table:table-cell table:style-name="ce8" office:value-type="string" calcext:value-type="string">
            <text:p>1. Se ingresa con el usuarios admin el cual tiene el permiso de reportes</text:p>
            <text:p>2. Se valida que en el menú se muestra la opción de reportes</text:p>
          </table:table-cell>
          <table:table-cell table:style-name="ce64"/>
          <table:table-cell table:style-name="ce4"/>
          <table:table-cell table:number-columns-repeated="16378"/>
        </table:table-row>
        <table:table-row table:style-name="ro102">
          <table:table-cell table:style-name="ce6" office:value-type="string" calcext:value-type="string">
            <text:p>CP65-02</text:p>
          </table:table-cell>
          <table:table-cell table:style-name="ce64" office:value-type="string" calcext:value-type="string">
            <text:p>Validar que al seleccionar el reporte “Reporte de Radicados de PQRSD” y se de clic en el botón generar se muestre como resultado los graficos del reporte, permitiendo ver el apartado de “Clasificación de requerimientos”</text:p>
          </table:table-cell>
          <table:table-cell table:style-name="ce6" office:value-type="string" calcext:value-type="string">
            <text:p>ok</text:p>
          </table:table-cell>
          <table:table-cell table:style-name="ce8" office:value-type="string" calcext:value-type="string">
            <text:p>1. Se ingresa al modulo de reportes – reportes</text:p>
            <text:p>2. En el listado de reportes se selecciona el primer reporte el cual esta relacionado a reporte de productividad</text:p>
            <text:p>3. Se dio clic en el botón general y se sistema arrojo el reporte con los campos que se indican</text:p>
          </table:table-cell>
          <table:table-cell table:style-name="ce64"/>
          <table:table-cell table:style-name="ce4"/>
          <table:table-cell table:number-columns-repeated="16378"/>
        </table:table-row>
        <table:table-row table:style-name="ro7">
          <table:table-cell table:style-name="ce6" office:value-type="string" calcext:value-type="string">
            <text:p>CP65-03</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8" office:value-type="string" calcext:value-type="string">
            <text:p>1. Se evidencia que si se muestran las opciones del botón de filtro y la opción de descargar los diferentes extensiones</text:p>
          </table:table-cell>
          <table:table-cell table:style-name="ce64"/>
          <table:table-cell table:style-name="ce4"/>
          <table:table-cell table:number-columns-repeated="16378"/>
        </table:table-row>
        <table:table-row table:style-name="ro103">
          <table:table-cell table:style-name="ce6" office:value-type="string" calcext:value-type="string">
            <text:p>CP65-04</text:p>
          </table:table-cell>
          <table:table-cell table:style-name="ce64" office:value-type="string" calcext:value-type="string">
            <text:p>Validar que al dar clic en el botón “FILTROS” se despliegue una series de campos que pueden ser utilizados para filtrar la información que se esta mostrando, se debe validar que todos los filtros funcionen de forma correcta, importante probar los campos de fechas para poder filtrar por rango de fechas.</text:p>
          </table:table-cell>
          <table:table-cell table:style-name="ce6" office:value-type="string" calcext:value-type="string">
            <text:p>ok</text:p>
          </table:table-cell>
          <table:table-cell table:style-name="ce8" office:value-type="string" calcext:value-type="string">
            <text:p>1. Se ingresa con el usuarios admin el cual tiene el permiso de reportes</text:p>
            <text:p>2. Se valida que en el menú se muestra la opción de reportes</text:p>
            <text:p>3. Se da clic en el botón de Filtros, y se ingresa un rango de fechas desde el mes de julio al mes de agosto y se buscan sin limite de registros</text:p>
            <text:p>4. Se da clic en el botón azul de procesar</text:p>
            <text:p>5. Se obtuvo como resultados 842 registros pero el sistema limita la cantidad que se muestra es 20 registros pero al descargar sale la totalidad</text:p>
            <text:p>6. Se realiza filtro desde el mes de julio al mes de agosto, por tipo de radicado SAF</text:p>
            <text:p>7. Se obtuvo como resultado 103 registros en total, pero el sistema limita la cantidad que se muestra es 20 registros pero al descargar sale la totalidad</text:p>
          </table:table-cell>
          <table:table-cell table:style-name="ce64"/>
          <table:table-cell table:style-name="ce4"/>
          <table:table-cell table:number-columns-repeated="16378"/>
        </table:table-row>
        <table:table-row table:style-name="ro102">
          <table:table-cell table:style-name="ce6" office:value-type="string" calcext:value-type="string">
            <text:p>CP65-05</text:p>
          </table:table-cell>
          <table:table-cell table:style-name="ce64" office:value-type="string" calcext:value-type="string">
            <text:p>Validar que al seleccionar el reporte “Reporte generales de Radicados” y se de clic en el botón generar se muestre como resultado los graficos del reporte, permitiendo ver el apartado de “Reportes generales de radicados”</text:p>
          </table:table-cell>
          <table:table-cell table:style-name="ce6" office:value-type="string" calcext:value-type="string">
            <text:p>ok</text:p>
          </table:table-cell>
          <table:table-cell table:style-name="ce8" office:value-type="string" calcext:value-type="string">
            <text:p>1. Se ingresa al modulo de reportes – reportes</text:p>
            <text:p>2. En el listado de reportes se selecciona el primer reporte el cual esta relacionado a reporte de productividad</text:p>
            <text:p>3. Se dio clic en el botón general y se sistema arrojo el reporte con los campos que se indican</text:p>
          </table:table-cell>
          <table:table-cell table:style-name="ce64"/>
          <table:table-cell table:style-name="ce4"/>
          <table:table-cell table:number-columns-repeated="16378"/>
        </table:table-row>
        <table:table-row table:style-name="ro7">
          <table:table-cell table:style-name="ce6" office:value-type="string" calcext:value-type="string">
            <text:p>CP65-06</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8" office:value-type="string" calcext:value-type="string">
            <text:p>1. Se evidencia que si se muestran las opciones del botón de filtro y la opción de descargar los diferentes extensiones</text:p>
          </table:table-cell>
          <table:table-cell table:style-name="ce64"/>
          <table:table-cell table:style-name="ce4"/>
          <table:table-cell table:number-columns-repeated="16378"/>
        </table:table-row>
        <table:table-row table:style-name="ro103">
          <table:table-cell table:style-name="ce6" office:value-type="string" calcext:value-type="string">
            <text:p>CP65-07</text:p>
          </table:table-cell>
          <table:table-cell table:style-name="ce64" office:value-type="string" calcext:value-type="string">
            <text:p>Validar que al dar clic en el botón “FILTROS” se despliegue una series de campos que pueden ser utilizados para filtrar la información que se esta mostrando, se debe validar que todos los filtros funcionen de forma correcta, importante probar los campos de fechas para poder filtrar por rango de fechas.</text:p>
          </table:table-cell>
          <table:table-cell table:style-name="ce6" office:value-type="string" calcext:value-type="string">
            <text:p>ok</text:p>
          </table:table-cell>
          <table:table-cell table:style-name="ce8" office:value-type="string" calcext:value-type="string">
            <text:p>1. Se ingresa con el usuarios admin el cual tiene el permiso de reportes</text:p>
            <text:p>2. Se valida que en el menú se muestra la opción de reportes</text:p>
            <text:p>3. Se da clic en el botón de Filtros, y se ingresa un rango de fechas desde el mes de julio al mes de agosto y se buscan sin limite de registros</text:p>
            <text:p>4. Se da clic en el botón azul de procesar</text:p>
            <text:p>5. Se obtuvo como resultados 842 registros pero el sistema limita la cantidad que se muestra es 20 registros pero al descargar sale la totalidad</text:p>
            <text:p>6. Se realiza filtro desde el mes de julio al mes de agosto, por tipo de radicado SAF</text:p>
            <text:p>7. Se obtuvo como resultado 103 registros en total, pero el sistema limita la cantidad que se muestra es 20 registros pero al descargar sale la totalidad</text:p>
          </table:table-cell>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66 – Consulta - Consulta avanzada</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129">
          <table:table-cell table:style-name="ce6" office:value-type="string" calcext:value-type="string">
            <text:p>CP66-01</text:p>
          </table:table-cell>
          <table:table-cell table:style-name="ce64" office:value-type="string" calcext:value-type="string">
            <text:p>Validar que cuando se de clic en el modulo de Consulta - Consulta avanzada, se muestre el listado de todos los documentos a los que se les ha corrido un proceso de extracción de contenido del documento, esto se ejecuta con el OCR o con la extracción del texto</text:p>
          </table:table-cell>
          <table:table-cell table:style-name="ce6" office:value-type="string" calcext:value-type="string">
            <text:p>ok</text:p>
          </table:table-cell>
          <table:table-cell table:style-name="ce8" office:value-type="string" calcext:value-type="string">
            <text:p>1. Se ingresa con el usuario admin y se valida que se tiene el permiso al módulo</text:p>
            <text:p>2. Se da clic en el módulo Consulta – Consulta Avanzada</text:p>
          </table:table-cell>
          <table:table-cell table:style-name="ce64" office:value-type="string" calcext:value-type="string">
            <text:p>se modifica la query de la tabla radiResponsables para que me muestre todos los radicados</text:p>
          </table:table-cell>
          <table:table-cell table:style-name="ce4"/>
          <table:table-cell table:number-columns-repeated="16378"/>
        </table:table-row>
        <table:table-row table:style-name="ro130">
          <table:table-cell table:style-name="ce6" office:value-type="string" calcext:value-type="string">
            <text:p>CP66-02</text:p>
          </table:table-cell>
          <table:table-cell table:style-name="ce64" office:value-type="string" calcext:value-type="string">
            <text:p>Validar que cuando se ingrese al modulo se muestren las columnas ”Tipo documental”, ”Fecha carga”, ”Nombre documento”, ”Extensión”, ”Número de radicado”, ”Asunto”, ”Dependencia”,”Usuario tramitador” y que esta información se muestre de forma correcta</text:p>
          </table:table-cell>
          <table:table-cell table:style-name="ce6" office:value-type="string" calcext:value-type="string">
            <text:p>ok</text:p>
          </table:table-cell>
          <table:table-cell table:style-name="ce8" office:value-type="string" calcext:value-type="string">
            <text:p>1. Se ingresa con el usuario admin y se valida que se tiene el permiso al módulo</text:p>
            <text:p>2. Se da clic en el módulo Consulta – Consulta Avanzada</text:p>
            <text:p>3. Se valida que efectivamente se muestran las columnas que se mencionan en el item evaluado</text:p>
          </table:table-cell>
          <table:table-cell table:style-name="ce124"/>
          <table:table-cell table:style-name="ce4"/>
          <table:table-cell table:number-columns-repeated="16378"/>
        </table:table-row>
        <table:table-row table:style-name="ro7">
          <table:table-cell table:style-name="ce6" office:value-type="string" calcext:value-type="string">
            <text:p>CP66-03</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8" office:value-type="string" calcext:value-type="string">
            <text:p>1. Se evidencia que si se muestran las opciones del botón de filtro y la opción de descargar los diferentes extensiones</text:p>
          </table:table-cell>
          <table:table-cell table:style-name="ce64"/>
          <table:table-cell table:style-name="ce4"/>
          <table:table-cell table:number-columns-repeated="16378"/>
        </table:table-row>
        <table:table-row table:style-name="ro131">
          <table:table-cell table:style-name="ce6" office:value-type="string" calcext:value-type="string">
            <text:p>CP66-04</text:p>
          </table:table-cell>
          <table:table-cell table:style-name="ce64" office:value-type="string" calcext:value-type="string">
            <text:p>Validar que al dar clic en el botón “FILTROS” se despliegue una series de campos que pueden ser utilizados para filtrar la información que se esta mostrando, se debe validar que todos los filtros funcionen de forma correcta, importante probar los campos de fechas para poder filtrar por rango de fechas.</text:p>
          </table:table-cell>
          <table:table-cell table:style-name="ce6" office:value-type="string" calcext:value-type="string">
            <text:p>ok</text:p>
          </table:table-cell>
          <table:table-cell table:style-name="ce8" office:value-type="string" calcext:value-type="string">
            <text:p>1. Se ingresa al modulo Consulta – Consulta avanzada</text:p>
            <text:p>2. Se da clic en el botón de Filtros, y se ingresa un rango de fechas desde el mes de julio al mes de agosto y se buscan sin limite de registros</text:p>
            <text:p>3. Se da clic en el botón azul de procesar</text:p>
            <text:p>4. Se obtuvo un total de 3 registros</text:p>
            <text:p>5. Se realiza otro filtro seleccionando el rango de fechas desde el mes de julio al mes de agosto, se selecciona solo el tipo de radicado Entrada, sin limite de registros …… hay un total de 3 registros</text:p>
            <text:p>6. Se realiza otro filtro por numero de radicado TMP-2024-000000001 y rango de fecha del mes de julio al mes de agosto</text:p>
            <text:p>6. Se habilita botón para descargar los registros</text:p>
          </table:table-cell>
          <table:table-cell table:style-name="ce64"/>
          <table:table-cell table:style-name="ce4"/>
          <table:table-cell table:number-columns-repeated="16378"/>
        </table:table-row>
        <table:table-row table:style-name="ro132">
          <table:table-cell table:style-name="ce6" office:value-type="string" calcext:value-type="string">
            <text:p>CP66-05</text:p>
          </table:table-cell>
          <table:table-cell table:style-name="ce64" office:value-type="string" calcext:value-type="string">
            <text:p>Validar que al dar clic en alguna de las opciones de descarga el sistema genere el correspondiente archivo en la extensión escogida, se debe validar cada una de las opciones, y ese archivo debe contener la misma información que se muestra en las columnas</text:p>
          </table:table-cell>
          <table:table-cell table:style-name="ce6" office:value-type="string" calcext:value-type="string">
            <text:p>ok</text:p>
          </table:table-cell>
          <table:table-cell table:style-name="ce8" office:value-type="string" calcext:value-type="string">
            <text:p>1. se da clic en la opción de EXCEL que se muestra en la parte inferior, al hacer este proceso se descarga un archivo con el nombre Listado de documentos.xlsx</text:p>
            <text:p>2. Se da clic en la opción de CSV que se muestra en la parte inferior, al hacer este proceso se descarga un archivo con el nombre Listado de documentos.csv</text:p>
            <text:p>3. Se da clic en la opción de PDF que se muestra en la parte inferior, al hacer este proceso se descarga un archivo con el nombre Listado de documentos.pdf</text:p>
            <text:p>4. se valida que se muestran las columnas Tipo documental, Fecha carga, Nombre documento, Extensión, Número de radicado, Asunto, Dependencia y Usuario tramitador</text:p>
          </table:table-cell>
          <table:table-cell table:style-name="ce64"/>
          <table:table-cell table:style-name="ce4"/>
          <table:table-cell table:number-columns-repeated="16378"/>
        </table:table-row>
        <table:table-row table:style-name="ro133">
          <table:table-cell table:style-name="ce6" office:value-type="string" calcext:value-type="string">
            <text:p>CP66-06</text:p>
          </table:table-cell>
          <table:table-cell table:style-name="ce12" office:value-type="string" calcext:value-type="string">
            <text:p>Validar que cuando se seleccione alguno de los registros, en el botón dinámico de color naranja ubicado en la parte inferior, se muestren las opciones de “ver” se vea ya el detalle del texto extraido del documento</text:p>
          </table:table-cell>
          <table:table-cell table:style-name="ce11" office:value-type="string" calcext:value-type="string">
            <text:p>ok</text:p>
          </table:table-cell>
          <table:table-cell table:style-name="ce13" office:value-type="string" calcext:value-type="string">
            <text:p>1. se selecciona el registro que se desea coonsultar</text:p>
            <text:p>2. Se da clic en el boton dinámico en la opción Ver</text:p>
            <text:p>3. Cuando se de clic en dicha opción se debe desplegar una ventana con una vista previa del documento cargado</text:p>
          </table:table-cell>
          <table:table-cell table:style-name="ce12"/>
          <table:table-cell table:style-name="ce29"/>
          <table:table-cell table:style-name="ce30" table:number-columns-repeated="21"/>
          <table:table-cell table:number-columns-repeated="16357"/>
        </table:table-row>
        <table:table-row table:style-name="ro127">
          <table:table-cell table:style-name="ce6" office:value-type="string" calcext:value-type="string">
            <text:p>CP66-07</text:p>
          </table:table-cell>
          <table:table-cell table:style-name="ce64" office:value-type="string" calcext:value-type="string">
            <text:p>Validar que cuando se de clic en alguno de los botones de "CSV", "EXCEL", "PDF" e "IMPRIMIR" se genere el correspondiente archivo con los resultados asociados</text:p>
          </table:table-cell>
          <table:table-cell table:style-name="ce6" office:value-type="string" calcext:value-type="string">
            <text:p>ok</text:p>
          </table:table-cell>
          <table:table-cell table:style-name="ce8" office:value-type="string" calcext:value-type="string">
            <text:p>1. se da clic en la opción de EXCEL que se muestra en la parte inferior, al hacer este proceso se descarga un archivo con el nombre personalizado.xlsx</text:p>
            <text:p>2. Se da clic en la opción de CSV que se muestra en la parte inferior, al hacer este proceso se descarga un archivo con el nombre personalizado.csv</text:p>
            <text:p>3. Se da clic en la opción de PDF que se muestra en la parte inferior, al hacer este proceso se descarga un archivo con el nombre personalizado.pdf</text:p>
            <text:p>4. se valida que se muestran las columnas con base a los campos que fueron chequeados</text:p>
          </table:table-cell>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67 – Flujos de Trabajo</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45">
          <table:table-cell table:style-name="ce6" office:value-type="string" calcext:value-type="string">
            <text:p>CP67-01</text:p>
          </table:table-cell>
          <table:table-cell table:style-name="ce64" office:value-type="string" calcext:value-type="string">
            <text:p>Validar que en el menú de módulos se muestre una que se llama “Flujo de Trabajo” este se debe mostrar siempre y cuando se active el permiso al rol del usuario que inicio sesión.</text:p>
          </table:table-cell>
          <table:table-cell table:style-name="ce6" office:value-type="string" calcext:value-type="string">
            <text:p>ok</text:p>
          </table:table-cell>
          <table:table-cell table:style-name="ce8" office:value-type="string" calcext:value-type="string">
            <text:p>1. Se ingresa al sistema con el usuario admin, y se valida que se tiene el permiso para flujos</text:p>
            <text:p>2. Se da clic en la opción de Flujos de trabajo y se despliega correctamente</text:p>
          </table:table-cell>
          <table:table-cell table:style-name="ce64"/>
          <table:table-cell table:style-name="ce4"/>
          <table:table-cell table:number-columns-repeated="16378"/>
        </table:table-row>
        <table:table-row table:style-name="ro134">
          <table:table-cell table:style-name="ce6" office:value-type="string" calcext:value-type="string">
            <text:p>CP67-02</text:p>
          </table:table-cell>
          <table:table-cell table:style-name="ce64" office:value-type="string" calcext:value-type="string">
            <text:p>Validar que cuando se ingrese al modulo se muestre una tabla con el listado de todos los flujos documentales que se han creado en el sistema, esta tabla debe mostrar las columnas “Etiqueta del flujo de trabajo”, ”Descripción del flujo de trabajo”, ”Días de termino”, ”Fecha Creación”, ”Estado”</text:p>
          </table:table-cell>
          <table:table-cell table:style-name="ce6" office:value-type="string" calcext:value-type="string">
            <text:p>ok</text:p>
          </table:table-cell>
          <table:table-cell table:style-name="ce8" office:value-type="string" calcext:value-type="string">
            <text:p>1. Se ingresa al sistema con el usuario admin, y se valida que se tiene el permiso para flujos</text:p>
            <text:p>2. Se da clic en la opción de Flujos de trabajo y se despliega correctamente</text:p>
            <text:p>3. Se valida que se muestran los flujos que se han creado en pruebas Flujo de pruebas 2.0 post actualizacion, Flujo de pruebas validación, SERVICIOS PUBLICOS O IMPUESTO PREDIAL etc</text:p>
          </table:table-cell>
          <table:table-cell table:style-name="ce64"/>
          <table:table-cell table:style-name="ce4"/>
          <table:table-cell table:number-columns-repeated="16378"/>
        </table:table-row>
        <table:table-row table:style-name="ro135">
          <table:table-cell table:style-name="ce6" office:value-type="string" calcext:value-type="string">
            <text:p>CP67-03</text:p>
          </table:table-cell>
          <table:table-cell table:style-name="ce64"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8" office:value-type="string" calcext:value-type="string">
            <text:p>1. Se evidencia que si se muestran las opciones del botón de filtro y la opción de descargar los diferentes extensiones</text:p>
          </table:table-cell>
          <table:table-cell table:style-name="ce64"/>
          <table:table-cell table:style-name="ce4"/>
          <table:table-cell table:number-columns-repeated="16378"/>
        </table:table-row>
        <table:table-row table:style-name="ro136">
          <table:table-cell table:style-name="ce6" office:value-type="string" calcext:value-type="string">
            <text:p>CP67-04</text:p>
          </table:table-cell>
          <table:table-cell table:style-name="ce64" office:value-type="string" calcext:value-type="string">
            <text:p>Validar que cuando se debe clic en el botón dinámico de color naranja en la parte inferior, se muestre una opción de “Agregar” y cuando se de clic en dicha opción se debe desplegar un formulario donde se pueda ingresar del flujo que se desea crear</text:p>
          </table:table-cell>
          <table:table-cell table:style-name="ce6" office:value-type="string" calcext:value-type="string">
            <text:p>ok</text:p>
          </table:table-cell>
          <table:table-cell table:style-name="ce90" office:value-type="string" calcext:value-type="string" table:number-columns-spanned="1" table:number-rows-spanned="2">
            <text:p>1. Se ingresa al sistema con el usuario admin, y se valida que se tiene el permiso para flujos</text:p>
            <text:p>2. Se da clic en la opción de Flujos de trabajo y se despliega correctamente</text:p>
            <text:p>3. Se da clic en el botón de agregar y se despliega el correspondiente formulario a diligenciar</text:p>
            <text:p>4. Se diligencia los datos que se piden se agrega nombre del flujo, días de termino, para que tipos de radicados se debe activar ese flujo documental</text:p>
          </table:table-cell>
          <table:table-cell table:style-name="ce125"/>
          <table:table-cell table:style-name="ce4"/>
          <table:table-cell table:number-columns-repeated="16378"/>
        </table:table-row>
        <table:table-row table:style-name="ro7">
          <table:table-cell table:style-name="ce6" office:value-type="string" calcext:value-type="string">
            <text:p>CP67-05</text:p>
          </table:table-cell>
          <table:table-cell table:style-name="ce64" office:value-type="string" calcext:value-type="string">
            <text:p>Validar que cuando se diligencie todo el formulario y se de clic en la opción “Guardar” se muestre una alerta en la parte superior de confirmación indicando “Registro almacenado correctamente”</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79">
          <table:table-cell table:style-name="ce6" office:value-type="string" calcext:value-type="string">
            <text:p>CP67-06</text:p>
          </table:table-cell>
          <table:table-cell table:style-name="ce64" office:value-type="string" calcext:value-type="string">
            <text:p>Validar que cuando se haga clic en el botón de guardar y los campos que tiene * <text:s/>están vacíos, el sistema debe pintar los campos de color rojo y mostrar mensaje de “algo esta mal”</text:p>
          </table:table-cell>
          <table:table-cell table:style-name="ce6" office:value-type="string" calcext:value-type="string">
            <text:p>ok</text:p>
          </table:table-cell>
          <table:table-cell table:style-name="ce8" office:value-type="string" calcext:value-type="string">
            <text:p>1. Se ingresa al sistema con el usuario admin, y se valida que se tiene el permiso para flujos</text:p>
            <text:p>2. Se da clic en la opción de Flujos de trabajo y se despliega correctamente</text:p>
            <text:p>3. Se da clic en el botón de agregar y se despliega el correspondiente formulario a diligenciar</text:p>
            <text:p>4. Se da clic al botón de guardar sin diligenciar ningún valor y efectivamente el sistema muestra el error de los campos que son obligatorios</text:p>
          </table:table-cell>
          <table:table-cell table:style-name="ce64"/>
          <table:table-cell table:style-name="ce4"/>
          <table:table-cell table:number-columns-repeated="16378"/>
        </table:table-row>
        <table:table-row table:style-name="ro137">
          <table:table-cell table:style-name="ce6" office:value-type="string" calcext:value-type="string">
            <text:p>CP67-07</text:p>
          </table:table-cell>
          <table:table-cell table:style-name="ce64" office:value-type="string" calcext:value-type="string">
            <text:p>Validar que cuando se seleccione alguno de estos registros, en el botón dinámico de color naranja en la parte inferior se muestren las opciones “Editar”, “ Visualizar flujo”, “Copiar Flujo”, “Cambiar estado”</text:p>
          </table:table-cell>
          <table:table-cell table:style-name="ce6" office:value-type="string" calcext:value-type="string">
            <text:p>ok</text:p>
          </table:table-cell>
          <table:table-cell table:style-name="ce8" office:value-type="string" calcext:value-type="string">
            <text:p>1. Se ingresa al sistema con el usuario admin, y se valida que se tiene el permiso para flujos</text:p>
            <text:p>2. Se da clic en la opción de Flujos de trabajo y se despliega correctamente</text:p>
            <text:p>3. Se selecciona la el flujo “Flujo de pruebas 2.0 post actualizacion” y se da clic en el botón dinámico y se muestra la información de forma correcta</text:p>
          </table:table-cell>
          <table:table-cell table:style-name="ce64"/>
          <table:table-cell table:style-name="ce4"/>
          <table:table-cell table:number-columns-repeated="16378"/>
        </table:table-row>
        <table:table-row table:style-name="ro97">
          <table:table-cell table:style-name="ce6" office:value-type="string" calcext:value-type="string">
            <text:p>CP67-08</text:p>
          </table:table-cell>
          <table:table-cell table:style-name="ce64" office:value-type="string" calcext:value-type="string">
            <text:p>Validar que cuando se de clic en la opción “Visualizar flujo”, se despliegue una vista donde se muestre una sección que se llame “Listado nodos del flujo de trabajo”, en esta sección se debe mostrar cada uno de los nodos (pasos) por los que debe pasar el flujo que se creo y otra sección que se llame “Diagrama flujo de trabajo: XXXXXX”</text:p>
          </table:table-cell>
          <table:table-cell table:style-name="ce6" office:value-type="string" calcext:value-type="string">
            <text:p>ok</text:p>
          </table:table-cell>
          <table:table-cell table:style-name="ce90" office:value-type="string" calcext:value-type="string" table:number-columns-spanned="1" table:number-rows-spanned="2">
            <text:p>1. Se ingresa al sistema con el usuario admin, y se valida que se tiene el permiso para flujos</text:p>
            <text:p>2. Se da clic en la opción de Flujos de trabajo y se despliega correctamente</text:p>
            <text:p>3. Se selecciona la el flujo “Flujo de pruebas 2.0 post actualizacion” y se da clic en el botón dinámico y se muestra la información de forma correcta</text:p>
            <text:p>4. Se da clic en la opción de visualizar flujo y se despliega el detalle correspondiente</text:p>
            <text:p>5. Se observa el listado de nodos que se han creado para el flujo “Flujo de pruebas 2.0 post actualizacion”</text:p>
            <text:p>6. Se el diseño grafico del flujo creado donde se ve el grafico de cada uno de los pasos por donde debe pasar el documento o radicado</text:p>
          </table:table-cell>
          <table:table-cell table:style-name="ce64"/>
          <table:table-cell table:style-name="ce4"/>
          <table:table-cell table:number-columns-repeated="16378"/>
        </table:table-row>
        <table:table-row table:style-name="ro138">
          <table:table-cell table:style-name="ce6" office:value-type="string" calcext:value-type="string">
            <text:p>CP67-09</text:p>
          </table:table-cell>
          <table:table-cell table:style-name="ce64" office:value-type="string" calcext:value-type="string">
            <text:p>Validar que en la sección “Listado nodos del flujo de trabajo” se muestre un listado de todos los nodos (pasos) que se encuentran registrados en el flujo seleccionado, por defecto se debe mostrar un registro asociado al inicio y otro asociado al fin. En la sección de “Diagrama flujo de trabajo: XXXXX“ se muestre el grafico del flujo que se va construyend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106">
          <table:table-cell table:style-name="ce6" office:value-type="string" calcext:value-type="string">
            <text:p>CP67-10</text:p>
          </table:table-cell>
          <table:table-cell table:style-name="ce64" office:value-type="string" calcext:value-type="string">
            <text:p>Validar que cuando se haya ingresado a la opción “Visualizar flujo” en el botón dinámico de color naranja se muestre la opción de “Agregar”, la cual al dar clic debe desplegar un nuevo formulario donde se permita ir construyendo el flujo graficamente, adicional por defecto el botón de “GUARDAR” debe estar inhabilitado</text:p>
          </table:table-cell>
          <table:table-cell table:style-name="ce6" office:value-type="string" calcext:value-type="string">
            <text:p>ok</text:p>
          </table:table-cell>
          <table:table-cell table:style-name="ce90" office:value-type="string" calcext:value-type="string" table:number-columns-spanned="1" table:number-rows-spanned="2">
            <text:p>1. Se ingresa al sistema con el usuario admin, y se valida que se tiene el permiso para flujos</text:p>
            <text:p>2. Se da clic en la opción de Flujos de trabajo y se despliega correctamente</text:p>
            <text:p>3. Se selecciona la el flujo “Flujo de pruebas 2.0 post actualizacion” y se da clic en el botón dinámico y se muestra la información de forma correcta</text:p>
            <text:p>4. Se da clic nuevamente en el boton dinámico y se despliega la opción de Agregar</text:p>
            <text:p>5. Se despliega el formulario para ir agregando los diferentes pasos por los que pasa el flujo</text:p>
            <text:p>6. Se realiza cada uno de los pasos que se mencionan en el items evaluado y se obtiene el mismo resultado que se menciona</text:p>
          </table:table-cell>
          <table:table-cell table:style-name="ce64"/>
          <table:table-cell table:style-name="ce4"/>
          <table:table-cell table:number-columns-repeated="16378"/>
        </table:table-row>
        <table:table-row table:style-name="ro7">
          <table:table-cell table:style-name="ce6" office:value-type="string" calcext:value-type="string">
            <text:p>CP67-11</text:p>
          </table:table-cell>
          <table:table-cell table:style-name="ce64" office:value-type="string" calcext:value-type="string">
            <text:p>Validar que en la lista desplegable “Nodo de transición anterior” se muestren todos los nodos (pasos) que se han creado, sino se ha creado nada todavía, debe mostrar solamente inicio y fin, adicional de estar chequeada la opción de “inici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33">
          <table:table-cell table:style-name="ce6" office:value-type="string" calcext:value-type="string">
            <text:p>CP67-12</text:p>
          </table:table-cell>
          <table:table-cell table:style-name="ce64" office:value-type="string" calcext:value-type="string">
            <text:p>Validar que en la lista desplegable “Transacciones del radicado” se muestren todas las transacciones que se pueden ejecutar en con un radicado recibido o tramitado en el sistema, adicional validar que en caso de seleccionar las transacciones de “Crear Radicado”, “Reasignar Radicado” se muestren 2 listas desplegables de forma automatica, asociados a “Dependencia destino” y “Usuario destino”</text:p>
          </table:table-cell>
          <table:table-cell table:style-name="ce6" office:value-type="string" calcext:value-type="string">
            <text:p>ok</text:p>
          </table:table-cell>
          <table:table-cell table:style-name="ce90" office:value-type="string" calcext:value-type="string" table:number-columns-spanned="1" table:number-rows-spanned="4">
            <text:p>1. Se ingresa al sistema con el usuario admin, y se valida que se tiene el permiso para flujos</text:p>
            <text:p>2. Se da clic en la opción de Flujos de trabajo y se despliega correctamente</text:p>
            <text:p>3. Se selecciona la el flujo “Flujo de pruebas 2.0 post actualizacion” y se da clic en el botón dinámico y se muestra la información de forma correcta</text:p>
            <text:p>4. Se da clic nuevamente en el boton dinámico y se despliega la opción de Agregar</text:p>
            <text:p>5. Se despliega el formulario para ir agregando los diferentes pasos por los que pasa el flujo</text:p>
            <text:p>6. Se realiza cada uno de los pasos que se mencionan en el items evaluado y se obtiene el mismo resultado que se menciona</text:p>
          </table:table-cell>
          <table:table-cell table:style-name="ce64"/>
          <table:table-cell table:style-name="ce4"/>
          <table:table-cell table:number-columns-repeated="16378"/>
        </table:table-row>
        <table:table-row table:style-name="ro7">
          <table:table-cell table:style-name="ce6" office:value-type="string" calcext:value-type="string">
            <text:p>CP67-13</text:p>
          </table:table-cell>
          <table:table-cell table:style-name="ce64" office:value-type="string" calcext:value-type="string">
            <text:p>Validar que cuando se ingrese la información y se de clic en el botón de guardar el sistema muestre un mensaje de confirmación “Registro almacenado correctamente” y en la sección “Diagrama flujo de trabajo: XXXXX” se debe mostrar el nodo que se acabo de crear, mostrando la orientación de la flecha</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39">
          <table:table-cell table:style-name="ce6" office:value-type="string" calcext:value-type="string">
            <text:p>CP67-14</text:p>
          </table:table-cell>
          <table:table-cell table:style-name="ce64" office:value-type="string" calcext:value-type="string">
            <text:p>Validar que en el listado de “Nodo de transición anterior” se muestre la transacción que en el item anterior se creo y en caso de no querer utilizar esa transacción validar que se pueda seleccionar cualquier otra en caso de que exista</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7">
          <table:table-cell table:style-name="ce6" office:value-type="string" calcext:value-type="string">
            <text:p>CP67-15</text:p>
          </table:table-cell>
          <table:table-cell table:style-name="ce64" office:value-type="string" calcext:value-type="string">
            <text:p>Validar que si el flujo que se esta diagramando no se ha terminado, es decir si no se ha indicado que el flujo a llegado a su fin, el sistema muestre un mensaje “El flujo de trabajo se encuentra incompleto” y no permita movernos de modulo sin finalizarlo …. esto quiere decir que si en el diagrama de flujo que se esta construyendo no ha utilizado el nodo de fin</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139">
          <table:table-cell table:style-name="ce6" office:value-type="string" calcext:value-type="string">
            <text:p>CP67-16</text:p>
          </table:table-cell>
          <table:table-cell table:style-name="ce64" office:value-type="string" calcext:value-type="string">
            <text:p>Validar que cuando se cheque la opción de ¿Nodo es de decisión? Se habiliten 3 campos nuevos; el primero debe ser “Etiqueta del condicional”.</text:p>
            <text:p/>
            <text:p>El segundo debe solicitar “Nodo anterior de transición” esto para el caso del SI y al lado de este campo se debe mostrar una opción que se llame “¿El nodo ya ha sido creado?” el cual permite indicar si la transacción a ejecutar en el SI es alguna que ya exista o es una nueva.</text:p>
            <text:p/>
            <text:p>El tercer debe solicitar “Nodo anterior de transición” esto para el caso del NO y al lado de este campo se debe mostrar una opción que se llame “¿El nodo ya ha sido creado?” el cual permite indicar si la transacción a ejecutar en el SI es alguna que ya exista o es una nueva.</text:p>
          </table:table-cell>
          <table:table-cell table:style-name="ce6" office:value-type="string" calcext:value-type="string">
            <text:p>ok</text:p>
          </table:table-cell>
          <table:table-cell table:style-name="ce8" office:value-type="string" calcext:value-type="string">
            <text:p>1. Se ingresa al sistema con el usuario admin, y se valida que se tiene el permiso para flujos</text:p>
            <text:p>2. Se da clic en la opción de Flujos de trabajo y se despliega correctamente</text:p>
            <text:p>3. Se selecciona la el flujo “Flujo de pruebas 2.0 post actualizacion” y se da clic en el botón dinámico y se muestra la información de forma correcta</text:p>
            <text:p>4. Se da clic nuevamente en el botón dinámico y se despliega la opción de Agregar</text:p>
            <text:p>5. Se despliega el formulario para ir agregando los diferentes pasos por los que pasa el flujo</text:p>
            <text:p>6. Se realiza cada uno de los pasos que se mencionan en el items evaluado y se obtiene el mismo resultado que se menciona</text:p>
          </table:table-cell>
          <table:table-cell table:style-name="ce64"/>
          <table:table-cell table:style-name="ce4"/>
          <table:table-cell table:number-columns-repeated="16378"/>
        </table:table-row>
        <table:table-row table:style-name="ro140">
          <table:table-cell table:style-name="ce6" office:value-type="string" calcext:value-type="string">
            <text:p>CP67-17</text:p>
          </table:table-cell>
          <table:table-cell table:style-name="ce64" office:value-type="string" calcext:value-type="string">
            <text:p>Validar que se pueda construir el siguiente flujo: Primer nodo “Crear Radicado”, segundo nodo “Imprimir Stickers”, tercer nodo “Cargar imagen principal”, cuarto nodo “Reasignar”, quinto nodo “Visualizar Radicado”, sexto nodo debe ser una condición (todo esta bien),</text:p>
            <text:p/>
            <text:p>septimo nodo en caso de SI “Solicitud de Visto bueno”, el octavo nodo “Aprobar visto bueno”, el noveno nodo “Reasignar”, el decimo nodo “Cargar Anexos”, el onceavo nodo “Incluir en Expediente”, el doceavo nodo “Finalizar” y el ultimo “fin”</text:p>
            <text:p/>
            <text:p>para el caso del NO el octavo nodo “Devolver”, el noveno nodo “Incluir en Expediente”, el doceavo nodo “Finalizar” y el ultimo “fin”</text:p>
          </table:table-cell>
          <table:table-cell table:style-name="ce6" office:value-type="string" calcext:value-type="string">
            <text:p>ok</text:p>
          </table:table-cell>
          <table:table-cell table:style-name="ce8" office:value-type="string" calcext:value-type="string">
            <text:p>1. Se ingresa al sistema con el usuario admin, y se valida que se tiene el permiso para flujos</text:p>
            <text:p>2. Se da clic en la opción de Flujos de trabajo y se despliega correctamente</text:p>
            <text:p>3. Se selecciona la el flujo “Flujo de pruebas 2.0 post actualizacion” y se da clic en el botón dinámico y se muestra la información de forma correcta</text:p>
            <text:p>4. Se da clic nuevamente en el botón dinámico y se despliega la opción de Agregar</text:p>
            <text:p>5. Se despliega el formulario para ir agregando los diferentes pasos por los que pasa el flujo</text:p>
            <text:p>6. Se realiza cada uno de los pasos que se mencionan en el items evaluado y se obtiene el mismo resultado que se menciona</text:p>
          </table:table-cell>
          <table:table-cell table:style-name="ce64"/>
          <table:table-cell table:style-name="ce4"/>
          <table:table-cell table:number-columns-repeated="16378"/>
        </table:table-row>
        <table:table-row table:style-name="ro141">
          <table:table-cell table:style-name="ce6" office:value-type="string" calcext:value-type="string">
            <text:p>CP67-18</text:p>
          </table:table-cell>
          <table:table-cell table:style-name="ce8" office:value-type="string" calcext:value-type="string">
            <text:p>Validar que se pueda construir el siguiente flujo: Primer nodo “Crear Radicado”, segundo nodo “Imprimir Stickers”, tercer nodo “Cargar imagen principal”, cuarto nodo “Reasignar”, quinto nodo “Visualizar Radicado”, sexto nodo debe ser una condición (todo esta bien),</text:p>
            <text:p/>
            <text:p>septimo nodo en caso de SI “Asociar plantilla”, el octavo nodo “Solicitud de Visto bueno”, el noveno nodo “Visualizar radicado”, el decimo nodo debe ser una condición (documento listo?),</text:p>
            <text:p/>
            <text:p>El onceavo nodo en caso de SI “Aprobar Visto Bueno”, el doceavo nodo “Combinar correspondencia”, el treceavo nodo “Firma”, el catorceavo nodo “Incluir en Expediente”, el quinceavo “Finalizar” y el ultimo nodo “Fin”</text:p>
            <text:p/>
            <text:p>El onceavo nodo en caso de NO “Asociar Plantilla” (nodo configurado en la septima posición)</text:p>
            <text:p/>
            <text:p>Septimo nodo en caso de NO “Reasignar” (nodo configurado en la cuarta posición)</text:p>
          </table:table-cell>
          <table:table-cell table:style-name="ce6" office:value-type="string" calcext:value-type="string">
            <text:p>ok</text:p>
          </table:table-cell>
          <table:table-cell table:style-name="ce8" office:value-type="string" calcext:value-type="string">
            <text:p>1. Se ingresa al sistema con el usuario admin, y se valida que se tiene el permiso para flujos</text:p>
            <text:p>2. Se da clic en la opción de Flujos de trabajo y se despliega correctamente</text:p>
            <text:p>3. Se selecciona la el flujo “Flujo de pruebas 2.0 post actualizacion” y se da clic en el botón dinámico y se muestra la información de forma correcta</text:p>
            <text:p>4. Se da clic nuevamente en el botón dinámico y se despliega la opción de Agregar</text:p>
            <text:p>5. Se despliega el formulario para ir agregando los diferentes pasos por los que pasa el flujo</text:p>
            <text:p>6. Se realiza cada uno de los pasos que se mencionan en el items evaluado y se obtiene el mismo resultado que se menciona</text:p>
          </table:table-cell>
          <table:table-cell table:style-name="ce64"/>
          <table:table-cell table:style-name="ce4"/>
          <table:table-cell table:number-columns-repeated="16378"/>
        </table:table-row>
        <table:table-row table:style-name="ro41">
          <table:table-cell table:style-name="ce6" office:value-type="string" calcext:value-type="string">
            <text:p>CP67-19</text:p>
          </table:table-cell>
          <table:table-cell table:style-name="ce64" office:value-type="string" calcext:value-type="string">
            <text:p>Validar que cuando se seleccione alguno de estos registros, en el botón dinámico de color naranja en la parte inferior se muestren las opciones “Copiar Flujo” y que al dar clic en la opción “Copiar Flujo” el sistema me muestre un mensaje de confirmación “Registro almacenado correctamente” y que adicional me clone el flujo que se habia seleccionado</text:p>
          </table:table-cell>
          <table:table-cell table:style-name="ce6" office:value-type="string" calcext:value-type="string">
            <text:p>ok</text:p>
          </table:table-cell>
          <table:table-cell table:style-name="ce90" office:value-type="string" calcext:value-type="string" table:number-columns-spanned="1" table:number-rows-spanned="2">
            <text:p>1. Se ingresa al sistema con el usuario admin, y se valida que se tiene el permiso para flujos</text:p>
            <text:p>2. Se da clic en la opción de Flujos de trabajo y se despliega correctamente</text:p>
            <text:p>3. Se selecciona el flujo que se desea copiar y luego se da clic en Copiar flujo</text:p>
            <text:p>4. Se verifica que efectivamente si se muestra el flujo que se copio con un número al lado del nombre</text:p>
          </table:table-cell>
          <table:table-cell table:style-name="ce64"/>
          <table:table-cell table:style-name="ce4"/>
          <table:table-cell table:number-columns-repeated="16378"/>
        </table:table-row>
        <table:table-row table:style-name="ro7">
          <table:table-cell table:style-name="ce6" office:value-type="string" calcext:value-type="string">
            <text:p>CP67-20</text:p>
          </table:table-cell>
          <table:table-cell table:style-name="ce64" office:value-type="string" calcext:value-type="string">
            <text:p>Validar que al seleccionar el flujo que se copio (el cual tiene en el nombre [x]) este pueda ser modificado como se desea, es decir intentar cambiar el nombre, la descripción y los dias de termino asignados, al realizar este proceso el sistema debe mostrar mensaje de confirmación “Registro almacenado correctamente”</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142">
          <table:table-cell table:style-name="ce6" office:value-type="string" calcext:value-type="string">
            <text:p>CP67-21</text:p>
          </table:table-cell>
          <table:table-cell table:style-name="ce64" office:value-type="string" calcext:value-type="string">
            <text:p>Validar que cuando se seleccione alguno de estos registros, en el botón dinámico de color naranja en la parte inferior se muestren las opciones “Cambiar Estado” y que al dar clic en la opción “Cambiar Estado” el sistema inactive el flujo siempre y cuando este no se este utilizando para algún radicado.</text:p>
          </table:table-cell>
          <table:table-cell table:style-name="ce6" office:value-type="string" calcext:value-type="string">
            <text:p>ok</text:p>
          </table:table-cell>
          <table:table-cell table:style-name="ce8" office:value-type="string" calcext:value-type="string">
            <text:p>1. Se ingresa al sistema con el usuario admin, y se valida que se tiene el permiso para flujos</text:p>
            <text:p>2. Se da clic en la opción de Flujos de trabajo y se despliega correctamente</text:p>
            <text:p>3. Se selecciona la el flujo “Pruebas 4 [1]” y se da clic en el botón dinámico</text:p>
            <text:p>4. Se da clic en la opción de Cambiar estado y muestra mensaje de confirmación</text:p>
          </table:table-cell>
          <table:table-cell table:style-name="ce64"/>
          <table:table-cell table:style-name="ce4"/>
          <table:table-cell table:number-columns-repeated="16378"/>
        </table:table-row>
        <table:table-row table:style-name="ro143">
          <table:table-cell table:style-name="ce6" office:value-type="string" calcext:value-type="string">
            <text:p>CP67-22</text:p>
          </table:table-cell>
          <table:table-cell table:style-name="ce64" office:value-type="string" calcext:value-type="string">
            <text:p>Validar que cuando se ingrese al modulo de Radicación a la opción de Radicación estándar y se ingrese al formulario de radicación y se seleccione un tipo de radicado cualquiera, se despliegue una opción que se llama “flujo de trabajo” y en caso de activar dicha opción se muestre un listado de todos los flujos que se han creado y que se encuentren activos</text:p>
          </table:table-cell>
          <table:table-cell table:style-name="ce6" office:value-type="string" calcext:value-type="string">
            <text:p>ok</text:p>
          </table:table-cell>
          <table:table-cell table:style-name="ce90" office:value-type="string" calcext:value-type="string" table:number-columns-spanned="1" table:number-rows-spanned="3">
            <text:p>1. Se ingresa con el usuario admin</text:p>
            <text:p>2. Se ingresa al módulo de radicación estandar y se procede a crear un radicado</text:p>
            <text:p>3. Se da clic en la opción del botón dinámico y luego a la opción Agregar</text:p>
            <text:p>4. Se observa que en el formulario que se solicita un check para indicar si aplica flujo de trabajo</text:p>
            <text:p>5. Se activa dicha opción y el sistema despliega los flujos de trabajo que se configuraron para el tipo de radicado Entrada</text:p>
            <text:p>6. Se selecciona el flujo que se llama Flujo de pruebas validación</text:p>
            <text:p>7. Se observa que se precarga lo configurado en el flujo, es decir se muestra la dependencia, los días de termino</text:p>
            <text:p>8. Se diligencia todo el formulario de radicación y el sistema asigno el radicado 2024-00998-000035-2</text:p>
          </table:table-cell>
          <table:table-cell table:style-name="ce64"/>
          <table:table-cell table:style-name="ce4"/>
          <table:table-cell table:number-columns-repeated="16378"/>
        </table:table-row>
        <table:table-row table:style-name="ro102">
          <table:table-cell table:style-name="ce6" office:value-type="string" calcext:value-type="string">
            <text:p>CP67-23</text:p>
          </table:table-cell>
          <table:table-cell table:style-name="ce64" office:value-type="string" calcext:value-type="string">
            <text:p>Validar que cuando se seleccione un flujo documental, el radicado va operar de semiautomatico, es decir al seleccionar un flujo se debe cargar la dependencia y usuario que se configuro en el primer nodo del flujo, y lo mismo debe pasar con los dias de termino que se asocio al flujo seleccionad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7">
          <table:table-cell table:style-name="ce6" office:value-type="string" calcext:value-type="string">
            <text:p>CP67-24</text:p>
          </table:table-cell>
          <table:table-cell table:style-name="ce64" office:value-type="string" calcext:value-type="string">
            <text:p>Validar que cuando se diligencie todo el formulario y se de clic en la opción “Guardar” se muestre una alerta en la parte superior de confirmación indicando el radicado que se asigno “Registro almacenado correctamente Número de radicado: xxxxxxx,”</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31">
          <table:table-cell table:style-name="ce6" office:value-type="string" calcext:value-type="string">
            <text:p>CP67-25</text:p>
          </table:table-cell>
          <table:table-cell table:style-name="ce64" office:value-type="string" calcext:value-type="string">
            <text:p>Validar que cuando se trate de realizar alguna otra acción diferente a la siguiente acción configurada en el flujo documental, el sistema muestre un mensaje indicando que no se puede realizar dicho proceso, “La transacción “XXXX” No se encuentra registrada. En el Flujo Solicitud de Entrada”</text:p>
          </table:table-cell>
          <table:table-cell table:style-name="ce16" office:value-type="string" calcext:value-type="string">
            <text:p>ok</text:p>
          </table:table-cell>
          <table:table-cell table:style-name="ce90" office:value-type="string" calcext:value-type="string" table:number-columns-spanned="1" table:number-rows-spanned="3">
            <text:p>1. Se ingresa con el usuario admin</text:p>
            <text:p>2. Se ingresa al módulo de radicación estándar y se procede a crear un radicado</text:p>
            <text:p>3. Se ingresa al radicado 2024-00998-000035-2 y se da clic en el botón dinámico</text:p>
            <text:p>4. Se da clic a la opción de imprimir stiker</text:p>
            <text:p>5. El sistema muestra mensaje indicando “La transacción Imprimir stickers No es la siguiente transacción en el flujo En el Flujo Flujo de pruebas validación"</text:p>
            <text:p>6. Se valida cual es al transacción que se debe realizar con el radicado según el flujo</text:p>
            <text:p>7. Se da clic a la transacción cargar imagen principal y el sistema confirma que el proceso se hizo correctamente</text:p>
          </table:table-cell>
          <table:table-cell table:style-name="ce64" office:value-type="string" calcext:value-type="string">
            <text:p>Se determina un cambio en el codigo que generaba conflicto a la hora de asociar un flujo de trabajo a un radicado</text:p>
          </table:table-cell>
          <table:table-cell table:style-name="ce4"/>
          <table:table-cell table:number-columns-repeated="16378"/>
        </table:table-row>
        <table:table-row table:style-name="ro7">
          <table:table-cell table:style-name="ce6" office:value-type="string" calcext:value-type="string">
            <text:p>CP67-26</text:p>
          </table:table-cell>
          <table:table-cell table:style-name="ce64" office:value-type="string" calcext:value-type="string">
            <text:p>Validar que cuando se ejecuta la acción correspondiente en el flujo, se recargue el listado principal, es decir que se muestre el estado y transacción que se ejecut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7">
          <table:table-cell table:style-name="ce6" office:value-type="string" calcext:value-type="string">
            <text:p>CP67-27</text:p>
          </table:table-cell>
          <table:table-cell table:style-name="ce64" office:value-type="string" calcext:value-type="string">
            <text:p>Validar que cuando se seleccione un radicado del listado de radicados, el sistema muestre una notificación indicando el siguiente paso del flujo a ejecutar por el usuario.</text:p>
          </table:table-cell>
          <table:table-cell table:style-name="ce16" office:value-type="string" calcext:value-type="string">
            <text:p>ok</text:p>
          </table:table-cell>
          <table:covered-table-cell/>
          <table:table-cell table:style-name="ce64"/>
          <table:table-cell table:style-name="ce4"/>
          <table:table-cell table:number-columns-repeated="16378"/>
        </table:table-row>
        <table:table-row table:style-name="ro7">
          <table:table-cell table:style-name="ce6" office:value-type="string" calcext:value-type="string">
            <text:p>CP67-28</text:p>
          </table:table-cell>
          <table:table-cell table:style-name="ce64" office:value-type="string" calcext:value-type="string">
            <text:p>Validar que al seleccionar un radicado del listado de radicados y este tiene un flujo asignado, en el botón dinámico de color naranja ubicado en la parte inferior de la pantalla se debe mostrar la opción de “Flujo de Trabajo” y al dar clic en esa opción se despliegue una vista nueva donde se vea el grafico del diagrama y la trazabilidad del mismo</text:p>
          </table:table-cell>
          <table:table-cell table:style-name="ce6" office:value-type="string" calcext:value-type="string">
            <text:p>ok</text:p>
          </table:table-cell>
          <table:table-cell table:style-name="ce90" office:value-type="string" calcext:value-type="string" table:number-columns-spanned="1" table:number-rows-spanned="3">
            <text:p>1. Se ingresa con el usuario admin</text:p>
            <text:p>2. Se ingresa al módulo de radicación estándar y se procede a crear un radicado</text:p>
            <text:p>3. Se ingresa al radicado 2024-00998-000035-2 y se da clic en el botón dinámico</text:p>
            <text:p>4. Se da clic en la opción Flujo de Trabajo</text:p>
            <text:p>5. El sistema despliega el flujo que se esta aplicando y se observa que se va pintando de color cada uno de las acciones por la que va pasando el radicado</text:p>
          </table:table-cell>
          <table:table-cell table:style-name="ce64"/>
          <table:table-cell table:style-name="ce4"/>
          <table:table-cell table:number-columns-repeated="16378"/>
        </table:table-row>
        <table:table-row table:style-name="ro111">
          <table:table-cell table:style-name="ce6" office:value-type="string" calcext:value-type="string">
            <text:p>CP67-29</text:p>
          </table:table-cell>
          <table:table-cell table:style-name="ce64" office:value-type="string" calcext:value-type="string">
            <text:p>Validar que cuando se ejecuten las acciones o transacciones de reasignar y devolver se muestre por defecto lo que se configuro en el flujo, adicional de hacer lo forma automatica</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7">
          <table:table-cell table:style-name="ce6" office:value-type="string" calcext:value-type="string">
            <text:p>CP67-30</text:p>
          </table:table-cell>
          <table:table-cell table:style-name="ce64" office:value-type="string" calcext:value-type="string">
            <text:p>Validar que cuando se seleccione un radicado del listado de radicados, el sistema evalue si el radicado tiene o no un flujo aplicado, en caso de no tener flujo aplicado no deberia mostrar ninguna alerta de flujos, o de flujo no configurado, o de no se encontro una siguiente transacción</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127">
          <table:table-cell table:style-name="ce6" office:value-type="string" calcext:value-type="string">
            <text:p>CP67-31</text:p>
          </table:table-cell>
          <table:table-cell table:style-name="ce64" office:value-type="string" calcext:value-type="string">
            <text:p>Validar que cuando se de clic en alguno de los botones de "CSV", "EXCEL", "PDF" e "IMPRIMIR" se genere el correspondiente archivo con los resultados asociados</text:p>
          </table:table-cell>
          <table:table-cell table:style-name="ce6" office:value-type="string" calcext:value-type="string">
            <text:p>ok</text:p>
          </table:table-cell>
          <table:table-cell table:style-name="ce8" office:value-type="string" calcext:value-type="string">
            <text:p>1. se da clic en la opción de EXCEL que se muestra en la parte inferior, al hacer este proceso se descarga un archivo con el nombre personalizado.xlsx</text:p>
            <text:p>2. Se da clic en la opción de CSV que se muestra en la parte inferior, al hacer este proceso se descarga un archivo con el nombre personalizado.csv</text:p>
            <text:p>3. Se da clic en la opción de PDF que se muestra en la parte inferior, al hacer este proceso se descarga un archivo con el nombre personalizado.pdf</text:p>
            <text:p>4. se valida que se muestran las columnas con base a los campos que fueron chequeados</text:p>
          </table:table-cell>
          <table:table-cell table:style-name="ce64"/>
          <table:table-cell table:style-name="ce4"/>
          <table:table-cell table:number-columns-repeated="16378"/>
        </table:table-row>
        <table:table-row table:style-name="ro1">
          <table:table-cell table:style-name="ce49" office:value-type="string" calcext:value-type="string" table:number-columns-spanned="2" table:number-rows-spanned="1">
            <text:p>CP68 – Auditoria</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7">
          <table:table-cell table:style-name="ce6" office:value-type="string" calcext:value-type="string">
            <text:p>CP68-01</text:p>
          </table:table-cell>
          <table:table-cell table:style-name="ce64" office:value-type="string" calcext:value-type="string">
            <text:p>Validar que cuando se de clic en el modulo de Auditoria – registro de auditoria, se despliegue el listado de todas las acciones que se han realizado en el sistema de todos los usuarios existentes</text:p>
          </table:table-cell>
          <table:table-cell table:style-name="ce6" office:value-type="string" calcext:value-type="string">
            <text:p>ok</text:p>
          </table:table-cell>
          <table:table-cell table:style-name="ce8" office:value-type="string" calcext:value-type="string">
            <text:p>1. Se ingresa con el usuario admin y se valida que se tiene el permiso al módulo</text:p>
            <text:p>2. Se da clic en el módulo Auditoria – Auditoria</text:p>
          </table:table-cell>
          <table:table-cell table:style-name="ce64"/>
          <table:table-cell table:style-name="ce4"/>
          <table:table-cell table:number-columns-repeated="16378"/>
        </table:table-row>
        <table:table-row table:style-name="ro143">
          <table:table-cell table:style-name="ce6" office:value-type="string" calcext:value-type="string">
            <text:p>CP68-02</text:p>
          </table:table-cell>
          <table:table-cell table:style-name="ce64" office:value-type="string" calcext:value-type="string">
            <text:p>Validar que cuando se ingrese al modulo se muestren las columnas "Usuario", <text:s/>"Fecha", "Módulo", "Evento", "Estado" y que esta información se muestre de forma correcta</text:p>
          </table:table-cell>
          <table:table-cell table:style-name="ce6" office:value-type="string" calcext:value-type="string">
            <text:p>ok</text:p>
          </table:table-cell>
          <table:table-cell table:style-name="ce8" office:value-type="string" calcext:value-type="string">
            <text:p>1. Se ingresa con el usuario admin y se valida que se tiene el permiso al módulo</text:p>
            <text:p>2. Se da clic en el módulo Auditoria – Auditoria</text:p>
            <text:p>3. Se valida que efectivamente se muestran las columas que se mencionan</text:p>
          </table:table-cell>
          <table:table-cell table:style-name="ce64"/>
          <table:table-cell table:style-name="ce4"/>
          <table:table-cell table:number-columns-repeated="16378"/>
        </table:table-row>
        <table:table-row table:style-name="ro7">
          <table:table-cell table:style-name="ce6" office:value-type="string" calcext:value-type="string">
            <text:p>CP68-03</text:p>
          </table:table-cell>
          <table:table-cell table:style-name="ce12" office:value-type="string" calcext:value-type="string">
            <text:p>Validar que cuando se ingrese al modulo se muestre un botón de “FILTROS” en la parte superior y en la parte inferior se muestren los botón “CSV”, “EXCEL”, “PDF” y “IMPRIMIR”</text:p>
          </table:table-cell>
          <table:table-cell table:style-name="ce11" office:value-type="string" calcext:value-type="string">
            <text:p>ok</text:p>
          </table:table-cell>
          <table:table-cell table:style-name="ce8" office:value-type="string" calcext:value-type="string">
            <text:p>1. Se evidencia que si se muestran las opciones del botón de filtro y la opción de descargar los diferentes extensiones</text:p>
          </table:table-cell>
          <table:table-cell table:style-name="ce12"/>
          <table:table-cell table:style-name="ce29"/>
          <table:table-cell table:style-name="ce137"/>
          <table:table-cell table:style-name="ce30" table:number-columns-repeated="20"/>
          <table:table-cell table:number-columns-repeated="16357"/>
        </table:table-row>
        <table:table-row table:style-name="ro56">
          <table:table-cell table:style-name="ce6" office:value-type="string" calcext:value-type="string">
            <text:p>CP68-04</text:p>
          </table:table-cell>
          <table:table-cell table:style-name="ce12" office:value-type="string" calcext:value-type="string">
            <text:p>Validar que al dar clic en el botón “FILTROS” se despliegue una series de campos que pueden ser utilizados para filtrar la información que se esta mostrando, se debe validar que todos los filtros funcionen de forma correcta, importante probar los campos de fechas para poder filtrar por rango de fechas.</text:p>
          </table:table-cell>
          <table:table-cell table:style-name="ce11" office:value-type="string" calcext:value-type="string">
            <text:p>ok</text:p>
          </table:table-cell>
          <table:table-cell table:style-name="ce13" office:value-type="string" calcext:value-type="string">
            <text:p>1. Se ingresa con el usuario admin y se valida que se tiene el permiso al módulo</text:p>
            <text:p>2. Se da clic en el módulo Auditoria – Auditoria</text:p>
            <text:p>3. Se da clic en el botón de FILTROS y se ingresa el criterio de rango de fechas desde el mes de julio al mes de agosto, mostrando todos</text:p>
            <text:p>4. Se da clic en el botón de procesar y se muestra un total de 2495 registros en la auditoria</text:p>
          </table:table-cell>
          <table:table-cell table:style-name="ce12"/>
          <table:table-cell table:style-name="ce29"/>
          <table:table-cell table:style-name="ce30" table:number-columns-repeated="21"/>
          <table:table-cell table:number-columns-repeated="16357"/>
        </table:table-row>
        <table:table-row table:style-name="ro74">
          <table:table-cell table:style-name="ce6" office:value-type="string" calcext:value-type="string">
            <text:p>CP68-05</text:p>
          </table:table-cell>
          <table:table-cell table:style-name="ce64" office:value-type="string" calcext:value-type="string">
            <text:p>Validar que al dar clic en alguna de las opciones de descarga el sistema genere el correspondiente archivo en la extensión escogida, se debe validar cada una de las opciones (“CSV”, “EXCEL”, “PDF” y “IMPRIMIR”), y ese archivo debe contener la misma información que se muestra en las columnas</text:p>
          </table:table-cell>
          <table:table-cell table:style-name="ce6" office:value-type="string" calcext:value-type="string">
            <text:p>ok</text:p>
          </table:table-cell>
          <table:table-cell table:style-name="ce90" office:value-type="string" calcext:value-type="string" table:number-columns-spanned="1" table:number-rows-spanned="2">
            <text:p>1. se da clic en la opción de EXCEL que se muestra en la parte inferior, al hacer este proceso se descarga un archivo con el nombre Listado registro de auditoría.xlsx</text:p>
            <text:p>2. Se da clic en la opción de CSV que se muestra en la parte inferior, al hacer este proceso se descarga un archivo con el nombre Listado registro de auditoría.csv</text:p>
            <text:p>3. Se da clic en la opción de PDF que se muestra en la parte inferior, al hacer este proceso se descarga un archivo con el nombre Listado registro de auditoría.pdf</text:p>
            <text:p>4. se valida que se muestran las columnas Usuario, Fecha, Módulo, Evento, Estado</text:p>
          </table:table-cell>
          <table:table-cell table:style-name="ce125"/>
          <table:table-cell table:style-name="ce4"/>
          <table:table-cell table:number-columns-repeated="16378"/>
        </table:table-row>
        <table:table-row table:style-name="ro7">
          <table:table-cell table:style-name="ce6" office:value-type="string" calcext:value-type="string">
            <text:p>CP68-06</text:p>
          </table:table-cell>
          <table:table-cell table:style-name="ce64" office:value-type="string" calcext:value-type="string">
            <text:p>Validar que cuando se seleccione alguno de los registros, en el botón dinámico de color naranja ubicado en la parte inferior, se muestren las opciones de “ver” y cuando se de clic en dicha opción se debe desplegar el detalle del registro de auditoria, mostrando “Usuario”, “Nombres Usuario”, “Ip”, “Fecha”, “Modulo”, “Evento”, “Antes”, “Despues”</text:p>
          </table:table-cell>
          <table:table-cell table:style-name="ce6" office:value-type="string" calcext:value-type="string">
            <text:p>ok</text:p>
          </table:table-cell>
          <table:covered-table-cell/>
          <table:table-cell table:style-name="ce125"/>
          <table:table-cell table:style-name="ce4"/>
          <table:table-cell table:number-columns-repeated="16378"/>
        </table:table-row>
        <table:table-row table:style-name="ro144">
          <table:table-cell table:style-name="ce49" office:value-type="string" calcext:value-type="string" table:number-columns-spanned="2" table:number-rows-spanned="1">
            <text:p>CP69 – Acuse Recibido Radicado</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145">
          <table:table-cell table:style-name="ce6" office:value-type="string" calcext:value-type="string">
            <text:p>CP69-01</text:p>
          </table:table-cell>
          <table:table-cell table:style-name="ce64" office:value-type="string" calcext:value-type="string">
            <text:p>Validar que cuando se de clic en el modulo de Gestión Correspondencia y luego de haber dado clic en la opción "Acuses De Recibido" esto debe ser valido siempre y cuando el usuario tenga el permiso asignado</text:p>
          </table:table-cell>
          <table:table-cell table:style-name="ce6" office:value-type="string" calcext:value-type="string">
            <text:p>ok</text:p>
          </table:table-cell>
          <table:table-cell table:style-name="ce8" office:value-type="string" calcext:value-type="string">
            <text:p>1. Se ingresa con el usuario admin y se valida que se tiene el permiso al módulo</text:p>
            <text:p>2. Se da clic en el módulo Gestión de Correspondencia – Generación de Plantillas</text:p>
          </table:table-cell>
          <table:table-cell table:style-name="ce64"/>
          <table:table-cell table:style-name="ce4"/>
          <table:table-cell table:number-columns-repeated="16378"/>
        </table:table-row>
        <table:table-row table:style-name="ro58">
          <table:table-cell table:style-name="ce6" office:value-type="string" calcext:value-type="string">
            <text:p>CP69-02</text:p>
          </table:table-cell>
          <table:table-cell table:style-name="ce64" office:value-type="string" calcext:value-type="string">
            <text:p>Validar que cuando se haga el proceso anterior se despliegue una tabla donde por defecto se muestre todos los acuses de recibido, que se han realizado en el sistema asociado al radicado, esto debe mostrar las columnas "Numero Radicado", "Asunto", "Dependencia Origen", "Usuario Origen", "Fecha y hora evento", "Dependencia destino", "Usuario destino", "Fecha y hora lectura" y "Origen lectura"</text:p>
          </table:table-cell>
          <table:table-cell table:style-name="ce6" office:value-type="string" calcext:value-type="string">
            <text:p>ok</text:p>
          </table:table-cell>
          <table:table-cell table:style-name="ce8" office:value-type="string" calcext:value-type="string">
            <text:p>1. Se ingresa con el usuario admin y se valida que se tiene el permiso al módulo</text:p>
            <text:p>2. Se da clic en el módulo Gestión de Correspondencia –Generación de Plantillas</text:p>
            <text:p>3. Se valida que efectivamente se muestran las columnas que se mencionan en el item evaluado</text:p>
          </table:table-cell>
          <table:table-cell table:style-name="ce64"/>
          <table:table-cell table:style-name="ce4"/>
          <table:table-cell table:number-columns-repeated="16378"/>
        </table:table-row>
        <table:table-row table:style-name="ro7">
          <table:table-cell table:style-name="ce6" office:value-type="string" calcext:value-type="string">
            <text:p>CP69-03</text:p>
          </table:table-cell>
          <table:table-cell table:style-name="ce12" office:value-type="string" calcext:value-type="string">
            <text:p>Validar que cuando se ingrese al modulo se muestre un botón de “FILTROS” en la parte superior y en la parte inferior se muestren los botón “CSV”, “EXCEL”, “PDF” y “IMPRIMIR”</text:p>
          </table:table-cell>
          <table:table-cell table:style-name="ce6" office:value-type="string" calcext:value-type="string">
            <text:p>ok</text:p>
          </table:table-cell>
          <table:table-cell table:style-name="ce8" office:value-type="string" calcext:value-type="string">
            <text:p>1. Se evidencia que si se muestran las opciones del botón de filtro y la opción de descargar los diferentes extensiones</text:p>
          </table:table-cell>
          <table:table-cell table:style-name="ce64"/>
          <table:table-cell table:style-name="ce4"/>
          <table:table-cell table:number-columns-repeated="16378"/>
        </table:table-row>
        <table:table-row table:style-name="ro146">
          <table:table-cell table:style-name="ce6" office:value-type="string" calcext:value-type="string">
            <text:p>CP69-04</text:p>
          </table:table-cell>
          <table:table-cell table:style-name="ce33" office:value-type="string" calcext:value-type="string">
            <text:p>Validar que cuando se de clic en el botón “FILTROS” se despliegue una ventana nueva donde se muestren los campos Numero Radicado, Asunto, Usuario envio, Usuario abrio, Forma de apertura, Rango Fechas, adicional de mostrar una lista desplegable indicando la cantidad de registros a mostrar</text:p>
          </table:table-cell>
          <table:table-cell table:style-name="ce6" office:value-type="string" calcext:value-type="string">
            <text:p>ok</text:p>
          </table:table-cell>
          <table:table-cell table:style-name="ce13" office:value-type="string" calcext:value-type="string">
            <text:p>1. Se ingresa con el usuario admin y se valida que se tiene el permiso al módulo</text:p>
            <text:p>2. Se da clic en el módulo Gestión de Correspondencia –Generación de Plantillas</text:p>
            <text:p>3. Se da clic en el botón de FILTROS y se ingresa el criterio de rango de fechas desde el mes de julio al mes de agosto, en la fecha de apertura</text:p>
            <text:p>4. Se da clic en el botón de procesar y se muestra un total de 100 registros</text:p>
          </table:table-cell>
          <table:table-cell table:style-name="ce64"/>
          <table:table-cell table:style-name="ce4"/>
          <table:table-cell table:number-columns-repeated="16378"/>
        </table:table-row>
        <table:table-row table:style-name="ro25">
          <table:table-cell table:style-name="ce6" office:value-type="string" calcext:value-type="string">
            <text:p>CP69-05</text:p>
          </table:table-cell>
          <table:table-cell table:style-name="ce37" office:value-type="string" calcext:value-type="string">
            <text:p>Validar que el sistema muestre resultados por cada uno de los campos que se mencionan anteriormente, ya sea que se ingrese solo un campo o que se ingresen una combinación de campos</text:p>
          </table:table-cell>
          <table:table-cell table:style-name="ce6" office:value-type="string" calcext:value-type="string">
            <text:p>ok</text:p>
          </table:table-cell>
          <table:table-cell table:style-name="ce90" office:value-type="string" calcext:value-type="string" table:number-columns-spanned="1" table:number-rows-spanned="3">
            <text:p>1. se da clic en la opción de EXCEL que se muestra en la parte inferior, al hacer este proceso se descarga un archivo con el nombre Listado de acuses de recibido de radicados en el sistema.xlsx</text:p>
            <text:p>2. Se da clic en la opción de CSV que se muestra en la parte inferior, al hacer este proceso se descarga un archivo con el nombre Listado de acuses de recibido de radicados en el sistema.csv</text:p>
            <text:p>3. Se da clic en la opción de PDF que se muestra en la parte inferior, al hacer este proceso se descarga un archivo con el nombre Listado de acuses de recibido de radicados en el sistema.pdf</text:p>
            <text:p>4. se valida que se muestran las columnas Numero Radicado,Asunto Radicado,Dependencia Origen,Usuario Origen,Fecha y hora de envío,Dependencia Destino, Usuario Destino, Fecha y Hora Lectura, Origen de lectura, Estado</text:p>
          </table:table-cell>
          <table:table-cell table:style-name="ce64"/>
          <table:table-cell table:style-name="ce4"/>
          <table:table-cell table:number-columns-repeated="16378"/>
        </table:table-row>
        <table:table-row table:style-name="ro31">
          <table:table-cell table:style-name="ce6" office:value-type="string" calcext:value-type="string">
            <text:p>CP69-06</text:p>
          </table:table-cell>
          <table:table-cell table:style-name="ce37" office:value-type="string" calcext:value-type="string">
            <text:p>Validar que cuando se de clic en alguno de los botones de “CSV”, “EXCEL”, “PDF” y “IMPRIMIR” el sistema descargue o genere el correspondiente archiv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54">
          <table:table-cell table:style-name="ce6" office:value-type="string" calcext:value-type="string">
            <text:p>CP69-07</text:p>
          </table:table-cell>
          <table:table-cell table:style-name="ce64" office:value-type="string" calcext:value-type="string">
            <text:p>Validar que cuando se de clic en el botón dinámico de color naranja en la parte inferior se muestre la opción “Imprimir Formato”, este formato se debe generar en pdf, <text:s/>la descarga de este proceso debe quedar guardado en el log del sistema</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62">
          <table:table-cell table:style-name="ce49" office:value-type="string" calcext:value-type="string" table:number-columns-spanned="2" table:number-rows-spanned="1">
            <text:p>CP65 – Portal de PQRS</text:p>
          </table:table-cell>
          <table:covered-table-cell/>
          <table:table-cell table:style-name="ce2" office:value-type="string" calcext:value-type="string">
            <text:p>Resultado</text:p>
          </table:table-cell>
          <table:table-cell table:style-name="ce3"/>
          <table:table-cell table:style-name="ce3" office:value-type="string" calcext:value-type="string">
            <text:p>Observaciones</text:p>
          </table:table-cell>
          <table:table-cell table:style-name="ce4"/>
          <table:table-cell table:number-columns-repeated="16378"/>
        </table:table-row>
        <table:table-row table:style-name="ro42">
          <table:table-cell table:style-name="ce6" office:value-type="string" calcext:value-type="string">
            <text:p>CP65-01</text:p>
          </table:table-cell>
          <table:table-cell table:style-name="ce64" office:value-type="string" calcext:value-type="string">
            <text:p>Validar que cuando se ingrese al formulario de PQRS se muestre en el menu las opciones de "Consultar PQRS" y "Registrar PQRSD", adicional que se muestre el logo del cliente y el nombre del mismo</text:p>
          </table:table-cell>
          <table:table-cell table:style-name="ce6" office:value-type="string" calcext:value-type="string">
            <text:p>ok</text:p>
          </table:table-cell>
          <table:table-cell table:style-name="ce8" office:value-type="string" calcext:value-type="string">
            <text:p>1. Se ingresa a la pagina web de PQRS del OrfeoNG</text:p>
            <text:p>2. al siguiente enlace https://medicinalegal.orfeoexpress.com/pruebas/ng_backend/frontend/web/</text:p>
            <text:p>3. Se observa que se muestran las opciones que se indican en el item mencionado</text:p>
          </table:table-cell>
          <table:table-cell table:style-name="ce64"/>
          <table:table-cell table:style-name="ce4"/>
          <table:table-cell table:number-columns-repeated="16378"/>
        </table:table-row>
        <table:table-row table:style-name="ro147">
          <table:table-cell table:style-name="ce6" office:value-type="string" calcext:value-type="string">
            <text:p>CP65-02</text:p>
          </table:table-cell>
          <table:table-cell table:style-name="ce64" office:value-type="string" calcext:value-type="string">
            <text:p>Validar que cuando se de clic en la opción "Registrar PQRSD" se despliegue el formulario de caracterización del ciudadano, antes de mostrar el formulario se debe desplegar una ventana donde se observe el mensaje de protección de datos personales que el cliente haya definido y debe permitir dar clic en "Acepto" o "No Acepto",</text:p>
          </table:table-cell>
          <table:table-cell table:style-name="ce6" office:value-type="string" calcext:value-type="string">
            <text:p>ok</text:p>
          </table:table-cell>
          <table:table-cell table:style-name="ce8" office:value-type="string" calcext:value-type="string">
            <text:p>1. Se ingresa a la pagina web de PQRS del OrfeoNG</text:p>
            <text:p>2. al siguiente enlace https://medicinalegal.orfeoexpress.com/pruebas/ng_backend/frontend/web/</text:p>
            <text:p>3. Se da clic en la opción de Registrar PQRSD</text:p>
            <text:p>4. Se despliega el mensaje de política de tratamiento de datos personales</text:p>
          </table:table-cell>
          <table:table-cell table:style-name="ce64"/>
          <table:table-cell table:style-name="ce4"/>
          <table:table-cell table:number-columns-repeated="16378"/>
        </table:table-row>
        <table:table-row table:style-name="ro109">
          <table:table-cell table:style-name="ce6" office:value-type="string" calcext:value-type="string">
            <text:p>CP65-03</text:p>
          </table:table-cell>
          <table:table-cell table:style-name="ce64" office:value-type="string" calcext:value-type="string">
            <text:p>Validar que cuando se de clic en la opción "Acepto", se muestre una nueva ventana donde se explique que es Petición, Queja, Reclamo, Sugerencia y Denuncia, adicional indicar los dias de terminos que aplican para cada una de estas opciones adicional <text:s/>y debe permitir dar clic en "Acepto" o "No Acepto",</text:p>
          </table:table-cell>
          <table:table-cell table:style-name="ce6" office:value-type="string" calcext:value-type="string">
            <text:p>ok</text:p>
          </table:table-cell>
          <table:table-cell table:style-name="ce8" office:value-type="string" calcext:value-type="string">
            <text:p>1. Se ingresa a la pagina web de PQRS del OrfeoNG</text:p>
            <text:p>2. al siguiente enlace https://medicinalegal.orfeoexpress.com/pruebas/ng_backend/frontend/web/</text:p>
            <text:p>3. Se da clic en la opción de Registrar PQRSD</text:p>
            <text:p>4. Se despliega el mensaje de política de tratamiento de datos personales y se da clic en la opción de acepto</text:p>
            <text:p>5. Se despliega un nuevo mensaje donde se muestra la descripción de cada una de las solicitudes que se pueden hacer</text:p>
          </table:table-cell>
          <table:table-cell table:style-name="ce64"/>
          <table:table-cell table:style-name="ce4"/>
          <table:table-cell table:number-columns-repeated="16378"/>
        </table:table-row>
        <table:table-row table:style-name="ro104">
          <table:table-cell table:style-name="ce6" office:value-type="string" calcext:value-type="string">
            <text:p>CP65-04</text:p>
          </table:table-cell>
          <table:table-cell table:style-name="ce64" office:value-type="string" calcext:value-type="string">
            <text:p>Validar que en el formulario que se muestra se observe un botón "Registro Anónimo", y al dar clic en dicha opción el sistema despliegue y muestre un listado donde se pueda seleccionar el "tipo de tramite", ahi se debe mostrar una opción que se llame Peticiones, Quejas, Reclamos, Sugerencias y Denuncias</text:p>
          </table:table-cell>
          <table:table-cell table:style-name="ce6" office:value-type="string" calcext:value-type="string">
            <text:p>ok</text:p>
          </table:table-cell>
          <table:table-cell table:style-name="ce8" office:value-type="string" calcext:value-type="string">
            <text:p>1. Se ingresa a la pagina web de PQRS del OrfeoNG</text:p>
            <text:p>2. al siguiente enlace https://medicinalegal.orfeoexpress.com/pruebas/ng_backend/frontend/web/</text:p>
            <text:p>3. Se da clic en la opción de Registrar PQRSD</text:p>
            <text:p>4. Se despliega el mensaje de política de tratamiento de datos personales y se da clic en la opción de acepto</text:p>
            <text:p>5. Se despliega un nuevo mensaje donde se muestra la descripción de cada una de las solicitudes que se pueden hacer</text:p>
            <text:p>6. Se da clic al botón de Registro Anonimo y se evidencia que ya despliega una nueva opción para seleccionar el tipo de requerimiento o solicitud</text:p>
          </table:table-cell>
          <table:table-cell table:style-name="ce64"/>
          <table:table-cell table:style-name="ce4"/>
          <table:table-cell table:number-columns-repeated="16378"/>
        </table:table-row>
        <table:table-row table:style-name="ro7">
          <table:table-cell table:style-name="ce6" office:value-type="string" calcext:value-type="string">
            <text:p>CP65-05</text:p>
          </table:table-cell>
          <table:table-cell table:style-name="ce64" office:value-type="string" calcext:value-type="string">
            <text:p>Validar que cuando se seleccione dicha opción se muestre el formulario donde se puede diligenciar el registro de la PQRSD, se debe poder seleccionar el tipo de requerimiento, Causa Requerimiento, Descripción de Hechos, Agregar anexos y una opción por donde se pueda indicar porque medio se va a notificar al peticionario</text:p>
          </table:table-cell>
          <table:table-cell table:style-name="ce6" office:value-type="string" calcext:value-type="string">
            <text:p>ok</text:p>
          </table:table-cell>
          <table:table-cell table:style-name="ce90" office:value-type="string" calcext:value-type="string" table:number-columns-spanned="1" table:number-rows-spanned="8">
            <text:p>1. Se ingresa a la pagina web de PQRS del OrfeoNG</text:p>
            <text:p>2. al siguiente enlace https://medicinalegal.orfeoexpress.com/pruebas/ng_backend/frontend/web/</text:p>
            <text:p>3. Se da clic en la opción de Registrar PQRSD</text:p>
            <text:p>4. Se despliega el mensaje de política de tratamiento de datos personales y se da clic en la opción de acepto</text:p>
            <text:p>5. Se despliega un nuevo mensaje donde se muestra la descripción de cada una de las solicitudes que se pueden hacer</text:p>
            <text:p>6. Se da clic al botón de Registro Anonimo y se evidencia que ya despliega una nueva opción para seleccionar el tipo de requerimiento o solicitud</text:p>
            <text:p>7. Se selecciona la opción de queja y se muestra el campo fecha del evento</text:p>
            <text:p>8. Luego se diligencia el resto de la información que se solicita y se indica que si van a cargar anexos</text:p>
            <text:p>9. Se valida que efectivamente si deja seleccionar un archivo o varios archivos al tiempo y adicional de que muestra la miniatura del anexo cargado.</text:p>
            <text:p>10. Se da clic en enviar solicitud y se asigna el radicado XXXXXXX</text:p>
          </table:table-cell>
          <table:table-cell table:style-name="ce64"/>
          <table:table-cell table:style-name="ce4"/>
          <table:table-cell table:number-columns-repeated="16378"/>
        </table:table-row>
        <table:table-row table:style-name="ro44">
          <table:table-cell table:style-name="ce6" office:value-type="string" calcext:value-type="string">
            <text:p>CP65-06</text:p>
          </table:table-cell>
          <table:table-cell table:style-name="ce64" office:value-type="string" calcext:value-type="string">
            <text:p>Validar que cuando en el <text:s/>listado de "Tipo de requerimiento" la opción de Queja se habilite un campo donde se solicite la fecha del evento y el nombre de la persona a la que se interpone la queja</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44">
          <table:table-cell table:style-name="ce6" office:value-type="string" calcext:value-type="string">
            <text:p>CP65-07</text:p>
          </table:table-cell>
          <table:table-cell table:style-name="ce64" office:value-type="string" calcext:value-type="string">
            <text:p>Validar que cuando en el <text:s/>listado de "Tipo de requerimiento" la opción de Reclamo se habilite un campo donde se solicite la fecha del evento y el nombre de la dependencia a la que se interpone el reclam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44">
          <table:table-cell table:style-name="ce6" office:value-type="string" calcext:value-type="string">
            <text:p>CP65-08</text:p>
          </table:table-cell>
          <table:table-cell table:style-name="ce64" office:value-type="string" calcext:value-type="string">
            <text:p>Validar que cuando en el <text:s/>listado de "Tipo de requerimiento" la opción de Denuncia se habilite un campo donde se solicite la fecha del event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44">
          <table:table-cell table:style-name="ce6" office:value-type="string" calcext:value-type="string">
            <text:p>CP65-09</text:p>
          </table:table-cell>
          <table:table-cell table:style-name="ce64" office:value-type="string" calcext:value-type="string">
            <text:p>Validar que en la opción y campo "Agregar Anexos", se seleccione la opción de SI, se muestre una nueva sección donde se permita seleccionar los archivos que serán asociados a la solicitud que se esta interponiendo ante a entidad</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7">
          <table:table-cell table:style-name="ce6" office:value-type="string" calcext:value-type="string">
            <text:p>CP65-10</text:p>
          </table:table-cell>
          <table:table-cell table:style-name="ce64" office:value-type="string" calcext:value-type="string">
            <text:p>Validar que cuando se de clic en la opción de "Examinar" el sistema despliegue el filesystem donde se pueda seleccionar un documento, varios documentos al tiempo o uno por uno en caso de ser necesario, adicional de ver la vista previa y miniatura de cada uno de los documentos cargados</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44">
          <table:table-cell table:style-name="ce6" office:value-type="string" calcext:value-type="string">
            <text:p>CP65-11</text:p>
          </table:table-cell>
          <table:table-cell table:style-name="ce64" office:value-type="string" calcext:value-type="string">
            <text:p>Validar que cuando se diligencie toda la información del formulario y se de clic en la opción "Enviar Solicitud" el sistema muestre una alerta con el número de radicado entregado por el sistema y asociado al tramite que se esta registrand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44">
          <table:table-cell table:style-name="ce6" office:value-type="string" calcext:value-type="string">
            <text:p>CP65-12</text:p>
          </table:table-cell>
          <table:table-cell table:style-name="ce64" office:value-type="string" calcext:value-type="string">
            <text:p>Validar que cuando se de clic en la opción de cerrar sesión que se encuentra en la parte superior de la pantalla, al lado del nombre del peticionario, el sistema lo rediriga a la pagina inicial del portal de PQRS</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148">
          <table:table-cell table:style-name="ce6" office:value-type="string" calcext:value-type="string">
            <text:p>CP65-13</text:p>
          </table:table-cell>
          <table:table-cell table:style-name="ce64" office:value-type="string" calcext:value-type="string">
            <text:p>Validar que cuando se de clic en la opción "Registrar PQRSD" en el formulario que se despliega se puedan ingresar los datos basicos del peticionario, donde se muestre el campo Tipo de Solicitante, Tipo de Identificación, Numero de Identificación, el correo electrónico, el celular y el telefono fijo</text:p>
          </table:table-cell>
          <table:table-cell table:style-name="ce6" office:value-type="string" calcext:value-type="string">
            <text:p>ok</text:p>
          </table:table-cell>
          <table:table-cell table:style-name="ce90" office:value-type="string" calcext:value-type="string" table:number-columns-spanned="1" table:number-rows-spanned="5">
            <text:p>1. Se ingresa a la pagina web de PQRS del OrfeoNG</text:p>
            <text:p>2. al siguiente enlace https://medicinalegal.orfeoexpress.com/pruebas/ng_backend/frontend/web/</text:p>
            <text:p>3. Se da clic en la opción de Registrar PQRSD</text:p>
            <text:p>4. Se despliega el mensaje de política de tratamiento de datos personales y se da clic en la opción de acepto</text:p>
            <text:p>5. Se despliega un nuevo mensaje donde se muestra la descripción de cada una de las solicitudes que se pueden hacer</text:p>
            <text:p>6. Se diligencian los datos que se solicita, se ingresa el tipo de solicitante, el documento y tipo de identidad, los nombres y apellidos, el correo electrónico.</text:p>
            <text:p>7. Se diligencia la información asociada a la caracterización asociado a si pertenece al grupo de caracterización, grupo poblacional, genero, rango de edad, si he sido victima de conflicto armado</text:p>
            <text:p>8. Se ingresa la información asociada a la dirección de residencia</text:p>
          </table:table-cell>
          <table:table-cell table:style-name="ce64"/>
          <table:table-cell table:style-name="ce4"/>
          <table:table-cell table:number-columns-repeated="16378"/>
        </table:table-row>
        <table:table-row table:style-name="ro7">
          <table:table-cell table:style-name="ce6" office:value-type="string" calcext:value-type="string">
            <text:p>CP65-14</text:p>
          </table:table-cell>
          <table:table-cell table:style-name="ce64" office:value-type="string" calcext:value-type="string">
            <text:p>Validar al proceso anterior que tambien se solicite información relacionada a la caracterización del peticionario, haciendo referencia a los datos de Pertenece a Grupos de Caracterización e Inclusión,Pertenece Algún Grupo Poblacional, Genero, Rango de Edad, ¿Ha sido victima de desplazamiento forzado?, ¿Ha sido victima del conflicto armad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7">
          <table:table-cell table:style-name="ce6" office:value-type="string" calcext:value-type="string">
            <text:p>CP65-15</text:p>
          </table:table-cell>
          <table:table-cell table:style-name="ce64" office:value-type="string" calcext:value-type="string">
            <text:p>Validar que en el campo de "Pertenece a Grupos de Caracterización e Inclusión" se permita seleccionar mas de una opción y que al seleccionar la opción <text:s/>"Personas en condición de discapacidad" se muestre un nuevo campo donde se solicite seleccionar la opción de cual discapacidad</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149">
          <table:table-cell table:style-name="ce6" office:value-type="string" calcext:value-type="string">
            <text:p>CP65-16</text:p>
          </table:table-cell>
          <table:table-cell table:style-name="ce64" office:value-type="string" calcext:value-type="string">
            <text:p>Validar que en el campo de "Pertenece Algún Grupo Poblacional", se permita seleccionar mas de una opción</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150">
          <table:table-cell table:style-name="ce6" office:value-type="string" calcext:value-type="string">
            <text:p>CP65-17</text:p>
          </table:table-cell>
          <table:table-cell table:style-name="ce64" office:value-type="string" calcext:value-type="string">
            <text:p>Validar que se solicite información asociada al lugar de residencia, donde se solicite el País, Departamento, Ciudad - Municipio, Dirección y complemento de la dirección</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38">
          <table:table-cell table:style-name="ce6" office:value-type="string" calcext:value-type="string">
            <text:p>CP65-18</text:p>
          </table:table-cell>
          <table:table-cell table:style-name="ce64" office:value-type="string" calcext:value-type="string">
            <text:p>Validar que cuando se ingrese un documento de identidad que existe ya en el sistema, el sistema precargue la información que ya se halla diligenciado para dicho documento de identidad y permitir diligenciar mas información en caso de ser necesario o modificar la información diligenciada</text:p>
          </table:table-cell>
          <table:table-cell table:style-name="ce6" office:value-type="string" calcext:value-type="string">
            <text:p>ok</text:p>
          </table:table-cell>
          <table:table-cell table:style-name="ce90" office:value-type="string" calcext:value-type="string" table:number-columns-spanned="1" table:number-rows-spanned="3">
            <text:p>1. Se ingresa a la pagina web de PQRS del OrfeoNG</text:p>
            <text:p>2. al siguiente enlace https://medicinalegal.orfeoexpress.com/pruebas/ng_backend/frontend/web/</text:p>
            <text:p>3. Se da clic en la opción de Registrar PQRSD</text:p>
            <text:p>4. Se despliega el mensaje de política de tratamiento de datos personales y se da clic en la opción de acepto</text:p>
            <text:p>5. Se despliega un nuevo mensaje donde se muestra la descripción de cada una de las solicitudes que se pueden hacer</text:p>
            <text:p>6. Se da clic al botón de Registro Anonimo y se evidencia que ya despliega una nueva opción para seleccionar el tipo de requerimiento o solicitud</text:p>
            <text:p>7. Se selecciona la opción de queja y se muestra el campo fecha del evento</text:p>
            <text:p>8. Luego se diligencia el resto de la información que se solicita y se indica que si van a cargar anexos</text:p>
            <text:p>9. Se valida que efectivamente si deja seleccionar un archivo o varios archivos al tiempo y adicional de que muestra la miniatura del anexo cargado.</text:p>
            <text:p>10. Se da clic en enviar solicitud y se asigna el radicado 2024-10111-000001-4</text:p>
          </table:table-cell>
          <table:table-cell table:style-name="ce64"/>
          <table:table-cell table:style-name="ce4"/>
          <table:table-cell table:number-columns-repeated="16378"/>
        </table:table-row>
        <table:table-row table:style-name="ro38">
          <table:table-cell table:style-name="ce6" office:value-type="string" calcext:value-type="string">
            <text:p>CP65-19</text:p>
          </table:table-cell>
          <table:table-cell table:style-name="ce64" office:value-type="string" calcext:value-type="string">
            <text:p>Validar que cuando se de clic en el botón de "Continuar" el sistema despliegue y muestre un listado donde se pueda seleccionar el "tipo de tramite", ahi se debe mostrar una opción que se llame Peticiones, Quejas, Reclamos, Sugerencias y Denuncias</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38">
          <table:table-cell table:style-name="ce6" office:value-type="string" calcext:value-type="string">
            <text:p>CP65-20</text:p>
          </table:table-cell>
          <table:table-cell table:style-name="ce64" office:value-type="string" calcext:value-type="string">
            <text:p>Validar que cuando se seleccione dicha opción se muestre el formulario donde se puede diligenciar el registro de la PQRSD, se debe poder seleccionar el tipo de requerimiento, Causa Requerimiento, Descripción de Hechos, Agregar anexos y una opción por donde se pueda indicar porque medio se va a notificar al peticionari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151">
          <table:table-cell table:style-name="ce6" office:value-type="string" calcext:value-type="string">
            <text:p>CP65-21</text:p>
          </table:table-cell>
          <table:table-cell table:style-name="ce64" office:value-type="string" calcext:value-type="string">
            <text:p>Validar que cuando se de clic en la opción "Consultar PQRSD" se muestre un campo donde se pueda ingresar el numero de radicado, al ingresar dicho valor y dar clic en el botón de "Consultar PQRSD" el sistema muestre el resultado correspondiente, asociado a dicho radicado.</text:p>
          </table:table-cell>
          <table:table-cell table:style-name="ce6" office:value-type="string" calcext:value-type="string">
            <text:p>ok</text:p>
          </table:table-cell>
          <table:table-cell table:style-name="ce90" office:value-type="string" calcext:value-type="string" table:number-columns-spanned="1" table:number-rows-spanned="6">
            <text:p>1. Se ingresa a la pagina web de PQRS del OrfeoNG</text:p>
            <text:p>2. al siguiente enlace https://medicinalegal.orfeoexpress.com/pruebas/ng_backend/frontend/web/</text:p>
            <text:p>3. Se da clic en la opción de Consultar PQRSD se ingresa el radicado 2024-10111-000001-4</text:p>
            <text:p>4. El sistema muestra la información del radicado</text:p>
            <text:p>5. Se da clic a la opción de trazabilidad y se despliega el detalle de lo que se ha hecho con ese radicado</text:p>
            <text:p>6. Se da clic a la opción de Anexos y se despliega el listado de todos los anexos que se cargaron al radicado</text:p>
            <text:p>7. Se da clic a la opción de comentario y el sistema despliega un formulario par ingresar el comentario correspondiente y tambien permite que se seleccione un documento nuevo</text:p>
          </table:table-cell>
          <table:table-cell table:style-name="ce64"/>
          <table:table-cell table:style-name="ce4"/>
          <table:table-cell table:number-columns-repeated="16378"/>
        </table:table-row>
        <table:table-row table:style-name="ro152">
          <table:table-cell table:style-name="ce6" office:value-type="string" calcext:value-type="string">
            <text:p>CP65-22</text:p>
          </table:table-cell>
          <table:table-cell table:style-name="ce64" office:value-type="string" calcext:value-type="string">
            <text:p>Validar que con el radicado se muestren 5 opciones " Trazabilidad", "Respuestas", <text:s/>"Anexos", "Agregar comentario" y <text:s/>"Desistimient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7">
          <table:table-cell table:style-name="ce6" office:value-type="string" calcext:value-type="string">
            <text:p>CP65-23</text:p>
          </table:table-cell>
          <table:table-cell table:style-name="ce64" office:value-type="string" calcext:value-type="string">
            <text:p>Validar que cuando se de clic en la opción " Trazabilidad", el sistema muestre el histórico de cada una de las acciones o transacciones que se han realizado con el radicado, donde se observe la fecha de cuando se hizo el proceso, el usuario y dependencia que hizo el proceso y de forma adicional la observación que se ingres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7">
          <table:table-cell table:style-name="ce6" office:value-type="string" calcext:value-type="string">
            <text:p>CP65-24</text:p>
          </table:table-cell>
          <table:table-cell table:style-name="ce64" office:value-type="string" calcext:value-type="string">
            <text:p>Validar que cuando se de clic en la opción "Respuestas", el sistema muestre todas las respuesta que se le hayan cargado al radicado registrado, adicional validar que se pueda dar clic en la opción de visualizar documento y al hacer este proceso se muestre una vista previa del pdf generad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5">
          <table:table-cell table:style-name="ce6" office:value-type="string" calcext:value-type="string">
            <text:p>CP65-25</text:p>
          </table:table-cell>
          <table:table-cell table:style-name="ce64" office:value-type="string" calcext:value-type="string">
            <text:p>Validar que cuando se de clic en la opción "Anexos", el sistema muestre todos los anexos que se han cargado al raicado, tanto por el peticionario como los asociados a la respuesta o gestión que se le hace al radicado desde Orfe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33">
          <table:table-cell table:style-name="ce6" office:value-type="string" calcext:value-type="string">
            <text:p>CP65-26</text:p>
          </table:table-cell>
          <table:table-cell table:style-name="ce64" office:value-type="string" calcext:value-type="string">
            <text:p>Validar que cuando se de clic en la opción "Agregar comentario", el sistema despliegue una nueva ventana donde se pueda ingresar de forma adicional una observación al radicado, poder cargar un archivo nuevo y que al dar clic en el botón de "Enviar Solicirud" el sistema muestre mensaje de confirmación de que el proceso se hizo de forma correcta, y se vea reflejado en la trazabilidad del radicado</text:p>
          </table:table-cell>
          <table:table-cell table:style-name="ce6" office:value-type="string" calcext:value-type="string">
            <text:p>ok</text:p>
          </table:table-cell>
          <table:covered-table-cell/>
          <table:table-cell table:style-name="ce64"/>
          <table:table-cell table:style-name="ce4"/>
          <table:table-cell table:number-columns-repeated="16378"/>
        </table:table-row>
        <table:table-row table:style-name="ro153" table:number-rows-repeated="16">
          <table:table-cell/>
          <table:table-cell table:style-name="ce87"/>
          <table:table-cell table:style-name="ce92"/>
          <table:table-cell table:style-name="ce111"/>
          <table:table-cell table:style-name="ce87"/>
          <table:table-cell table:style-name="ce4"/>
          <table:table-cell table:number-columns-repeated="16378"/>
        </table:table-row>
        <table:table-row table:style-name="ro153" table:number-rows-repeated="83">
          <table:table-cell table:number-columns-repeated="16384"/>
        </table:table-row>
        <table:table-row table:style-name="ro154" table:number-rows-repeated="1047468">
          <table:table-cell table:number-columns-repeated="16384"/>
        </table:table-row>
        <table:table-row table:style-name="ro155" table:number-rows-repeated="13">
          <table:table-cell table:number-columns-repeated="16384"/>
        </table:table-row>
        <table:table-row table:style-name="ro155">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Cantarell" svg:font-family="Cantarell"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pitch="variable"/>
  </office:font-face-decls>
  <office:styles>
    <style:default-style style:family="table-cell">
      <style:paragraph-properties style:tab-stop-distance="1.25cm"/>
      <style:text-properties style:font-name="Liberation Sans" fo:font-size="10pt" fo:language="es" fo:country="CO"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53cm" svg:stroke-color="#042433" draw:stroke-linejoin="miter" svg:stroke-linecap="butt" draw:fill-color="#156082" fo:wrap-option="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s" fo:country="CO" style:letter-kerning="true" style:font-name-asian="Cantarell"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style:vertical-align="automatic"/>
      <style:text-properties fo:color="#808080" fo:font-style="italic" style:font-style-asian="italic" style:font-style-complex="italic"/>
    </style:style>
    <style:style style:name="Hyperlink" style:family="table-cell" style:parent-style-name="Default" style:data-style-name="N0">
      <style:table-cell-properties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2cm" fo:margin-right="2cm" style:print-page-order="ttb" style:first-page-number="continue" style:scale-to="100%" style:print="charts drawings objects"/>
      <style:header-style>
        <style:header-footer-properties fo:min-height="4.854cm" fo:margin-left="0cm" fo:margin-right="0cm" fo:margin-bottom="0cm"/>
      </style:header-style>
      <style:footer-style>
        <style:header-footer-properties fo:min-height="4.854cm" fo:margin-left="0cm" fo:margin-right="0cm" fo:margin-top="0cm"/>
      </style:footer-style>
    </style:page-layout>
    <style:style style:name="MT1" style:family="text">
      <style:text-properties fo:color="#000000" loext:opacity="100%" fo:font-size="10pt" style:font-size-asian="10pt" style:font-size-complex="10pt"/>
    </style:style>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02">00/00/0000</text:date>, <text:time style:data-style-name="N2" text:time-value="14:21:13.881781048">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mp1" style:page-layout-name="Mpm3">
      <style:header>
        <text:p><text:span text:style-name="MT1"><text:sheet-name>???</text:sheet-name></text:span></text:p>
      </style:header>
      <style:header-left style:display="false"/>
      <style:header-first/>
      <style:footer>
        <text:p><text:span text:style-name="MT1">Page </text:span><text:span text:style-name="MT1"><text:page-number>1</text:page-number></text:span></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Paola Utrera Martinez</meta:initial-creator>
    <meta:creation-date>2024-10-24T21:33:58Z</meta:creation-date>
    <dc:date>2026-06-02T07:15:32.871886197</dc:date>
    <meta:editing-cycles>97</meta:editing-cycles>
    <meta:editing-duration>P23DT7H25M54S</meta:editing-duration>
    <meta:document-statistic meta:table-count="1" meta:cell-count="3366" meta:object-count="0"/>
    <meta:user-defined meta:name="AppVersion">15.0000</meta:user-defined>
  </office:meta>
</office:document-meta>
</file>